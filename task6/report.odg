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D000000E9948E8E6E.png" manifest:media-type="image/png"/>
  <manifest:file-entry manifest:full-path="Pictures/10000000000002D6000000D60D6CD974.png" manifest:media-type="image/png"/>
  <manifest:file-entry manifest:full-path="Pictures/10000000000002CD000000FFABCEB32B.png" manifest:media-type="image/png"/>
  <manifest:file-entry manifest:full-path="Pictures/100000010000006D00000027FEA0B56D.png" manifest:media-type="image/png"/>
  <manifest:file-entry manifest:full-path="Pictures/100000010000006D0000001D9605F9DE.png" manifest:media-type="image/png"/>
  <manifest:file-entry manifest:full-path="Pictures/100000010000006D0000001AF5C6F42A.png" manifest:media-type="image/png"/>
  <manifest:file-entry manifest:full-path="Pictures/100000010000006D000001CE060F9B0A.png" manifest:media-type="image/png"/>
  <manifest:file-entry manifest:full-path="Pictures/100000010000006D000000396B630DE9.png" manifest:media-type="image/png"/>
  <manifest:file-entry manifest:full-path="Pictures/100000010000006D0000001B86EDDBA8.png" manifest:media-type="image/png"/>
  <manifest:file-entry manifest:full-path="Pictures/100000010000006D000000DF701DE9B0.png" manifest:media-type="image/png"/>
  <manifest:file-entry manifest:full-path="Pictures/100000010000006D00000042DB1E8C2F.png" manifest:media-type="image/png"/>
  <manifest:file-entry manifest:full-path="Pictures/1000000000000340000000CEA5747780.png" manifest:media-type="image/png"/>
  <manifest:file-entry manifest:full-path="Pictures/100000010000006D000000230EEE68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0.55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solid" svg:stroke-width="0.026cm" svg:stroke-color="#d9d9d9" draw:stroke-linejoin="round" svg:stroke-linecap="butt" draw:fill="none" fo:padding-top="0.013cm" fo:padding-bottom="0.013cm" fo:padding-left="0.013cm" fo:padding-right="0.013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solid" draw:fill-color="#6083cb" loext:decorative="false"/>
    </style:style>
    <style:style style:name="gr7" style:family="graphic" style:parent-style-name="standard">
      <style:graphic-properties draw:stroke="none" draw:fill="solid" draw:fill-color="#5f83cb" loext:decorative="false"/>
    </style:style>
    <style:style style:name="gr8" style:family="graphic" style:parent-style-name="standard">
      <style:graphic-properties draw:stroke="none" draw:fill="solid" draw:fill-color="#5f82cb" loext:decorative="false"/>
    </style:style>
    <style:style style:name="gr9" style:family="graphic" style:parent-style-name="standard">
      <style:graphic-properties draw:stroke="none" draw:fill="solid" draw:fill-color="#5e82cb" loext:decorative="false"/>
    </style:style>
    <style:style style:name="gr10" style:family="graphic" style:parent-style-name="standard">
      <style:graphic-properties draw:stroke="none" draw:fill="solid" draw:fill-color="#5d81cb" loext:decorative="false"/>
    </style:style>
    <style:style style:name="gr11" style:family="graphic" style:parent-style-name="standard">
      <style:graphic-properties draw:stroke="none" draw:fill="solid" draw:fill-color="#5c81cb" loext:decorative="false"/>
    </style:style>
    <style:style style:name="gr12" style:family="graphic" style:parent-style-name="standard">
      <style:graphic-properties draw:stroke="none" draw:fill="solid" draw:fill-color="#5c80cb" loext:decorative="false"/>
    </style:style>
    <style:style style:name="gr13" style:family="graphic" style:parent-style-name="standard">
      <style:graphic-properties draw:stroke="none" draw:fill="solid" draw:fill-color="#5b80cb" loext:decorative="false"/>
    </style:style>
    <style:style style:name="gr14" style:family="graphic" style:parent-style-name="standard">
      <style:graphic-properties draw:stroke="none" draw:fill="solid" draw:fill-color="#5a80cb" loext:decorative="false"/>
    </style:style>
    <style:style style:name="gr15" style:family="graphic" style:parent-style-name="standard">
      <style:graphic-properties draw:stroke="none" draw:fill="solid" draw:fill-color="#597fcb" loext:decorative="false"/>
    </style:style>
    <style:style style:name="gr16" style:family="graphic" style:parent-style-name="standard">
      <style:graphic-properties draw:stroke="none" draw:fill="solid" draw:fill-color="#587fcb" loext:decorative="false"/>
    </style:style>
    <style:style style:name="gr17" style:family="graphic" style:parent-style-name="standard">
      <style:graphic-properties draw:stroke="none" draw:fill="solid" draw:fill-color="#587ecb" loext:decorative="false"/>
    </style:style>
    <style:style style:name="gr18" style:family="graphic" style:parent-style-name="standard">
      <style:graphic-properties draw:stroke="none" draw:fill="solid" draw:fill-color="#577ecb" loext:decorative="false"/>
    </style:style>
    <style:style style:name="gr19" style:family="graphic" style:parent-style-name="standard">
      <style:graphic-properties draw:stroke="none" draw:fill="solid" draw:fill-color="#567ecb" loext:decorative="false"/>
    </style:style>
    <style:style style:name="gr20" style:family="graphic" style:parent-style-name="standard">
      <style:graphic-properties draw:stroke="none" draw:fill="solid" draw:fill-color="#567dcb" loext:decorative="false"/>
    </style:style>
    <style:style style:name="gr21" style:family="graphic" style:parent-style-name="standard">
      <style:graphic-properties draw:stroke="none" draw:fill="solid" draw:fill-color="#557dcb" loext:decorative="false"/>
    </style:style>
    <style:style style:name="gr22" style:family="graphic" style:parent-style-name="standard">
      <style:graphic-properties draw:stroke="none" draw:fill="solid" draw:fill-color="#547ccb" loext:decorative="false"/>
    </style:style>
    <style:style style:name="gr23" style:family="graphic" style:parent-style-name="standard">
      <style:graphic-properties draw:stroke="none" draw:fill="solid" draw:fill-color="#537ccb" loext:decorative="false"/>
    </style:style>
    <style:style style:name="gr24" style:family="graphic" style:parent-style-name="standard">
      <style:graphic-properties draw:stroke="none" draw:fill="solid" draw:fill-color="#527bcb" loext:decorative="false"/>
    </style:style>
    <style:style style:name="gr25" style:family="graphic" style:parent-style-name="standard">
      <style:graphic-properties draw:stroke="none" draw:fill="solid" draw:fill-color="#517bcb" loext:decorative="false"/>
    </style:style>
    <style:style style:name="gr26" style:family="graphic" style:parent-style-name="standard">
      <style:graphic-properties draw:stroke="none" draw:fill="solid" draw:fill-color="#507acb" loext:decorative="false"/>
    </style:style>
    <style:style style:name="gr27" style:family="graphic" style:parent-style-name="standard">
      <style:graphic-properties draw:stroke="none" draw:fill="solid" draw:fill-color="#4f7acb" loext:decorative="false"/>
    </style:style>
    <style:style style:name="gr28" style:family="graphic" style:parent-style-name="standard">
      <style:graphic-properties draw:stroke="none" draw:fill="solid" draw:fill-color="#4f79ca" loext:decorative="false"/>
    </style:style>
    <style:style style:name="gr29" style:family="graphic" style:parent-style-name="standard">
      <style:graphic-properties draw:stroke="none" draw:fill="solid" draw:fill-color="#4e79ca" loext:decorative="false"/>
    </style:style>
    <style:style style:name="gr30" style:family="graphic" style:parent-style-name="standard">
      <style:graphic-properties draw:stroke="none" draw:fill="solid" draw:fill-color="#4d78ca" loext:decorative="false"/>
    </style:style>
    <style:style style:name="gr31" style:family="graphic" style:parent-style-name="standard">
      <style:graphic-properties draw:stroke="none" draw:fill="solid" draw:fill-color="#4c78ca" loext:decorative="false"/>
    </style:style>
    <style:style style:name="gr32" style:family="graphic" style:parent-style-name="standard">
      <style:graphic-properties draw:stroke="none" draw:fill="solid" draw:fill-color="#4b77ca" loext:decorative="false"/>
    </style:style>
    <style:style style:name="gr33" style:family="graphic" style:parent-style-name="standard">
      <style:graphic-properties draw:stroke="none" draw:fill="solid" draw:fill-color="#4a77ca" loext:decorative="false"/>
    </style:style>
    <style:style style:name="gr34" style:family="graphic" style:parent-style-name="standard">
      <style:graphic-properties draw:stroke="none" draw:fill="solid" draw:fill-color="#4976ca" loext:decorative="false"/>
    </style:style>
    <style:style style:name="gr35" style:family="graphic" style:parent-style-name="standard">
      <style:graphic-properties draw:stroke="none" draw:fill="solid" draw:fill-color="#4876ca" loext:decorative="false"/>
    </style:style>
    <style:style style:name="gr36" style:family="graphic" style:parent-style-name="standard">
      <style:graphic-properties draw:stroke="none" draw:fill="solid" draw:fill-color="#4775ca" loext:decorative="false"/>
    </style:style>
    <style:style style:name="gr37" style:family="graphic" style:parent-style-name="standard">
      <style:graphic-properties draw:stroke="none" draw:fill="solid" draw:fill-color="#4675ca" loext:decorative="false"/>
    </style:style>
    <style:style style:name="gr38" style:family="graphic" style:parent-style-name="standard">
      <style:graphic-properties draw:stroke="none" draw:fill="solid" draw:fill-color="#4674ca" loext:decorative="false"/>
    </style:style>
    <style:style style:name="gr39" style:family="graphic" style:parent-style-name="standard">
      <style:graphic-properties draw:stroke="none" draw:fill="solid" draw:fill-color="#4574ca" loext:decorative="false"/>
    </style:style>
    <style:style style:name="gr40" style:family="graphic" style:parent-style-name="standard">
      <style:graphic-properties draw:stroke="none" draw:fill="solid" draw:fill-color="#4473ca" loext:decorative="false"/>
    </style:style>
    <style:style style:name="gr41" style:family="graphic" style:parent-style-name="standard">
      <style:graphic-properties draw:stroke="none" draw:fill="solid" draw:fill-color="#4373ca" loext:decorative="false"/>
    </style:style>
    <style:style style:name="gr42" style:family="graphic" style:parent-style-name="standard">
      <style:graphic-properties draw:stroke="none" draw:fill="solid" draw:fill-color="#4272ca" loext:decorative="false"/>
    </style:style>
    <style:style style:name="gr43" style:family="graphic" style:parent-style-name="standard">
      <style:graphic-properties draw:stroke="none" draw:fill="solid" draw:fill-color="#4172ca" loext:decorative="false"/>
    </style:style>
    <style:style style:name="gr44" style:family="graphic" style:parent-style-name="standard">
      <style:graphic-properties draw:stroke="none" draw:fill="solid" draw:fill-color="#4071ca" loext:decorative="false"/>
    </style:style>
    <style:style style:name="gr45" style:family="graphic" style:parent-style-name="standard">
      <style:graphic-properties draw:stroke="none" draw:fill="solid" draw:fill-color="#3f71ca" loext:decorative="false"/>
    </style:style>
    <style:style style:name="gr46" style:family="graphic" style:parent-style-name="standard">
      <style:graphic-properties draw:stroke="none" draw:fill="solid" draw:fill-color="#3f70ca" loext:decorative="false"/>
    </style:style>
    <style:style style:name="gr47" style:family="graphic" style:parent-style-name="standard">
      <style:graphic-properties draw:stroke="none" draw:fill="solid" draw:fill-color="#3e70ca" loext:decorative="false"/>
    </style:style>
    <style:style style:name="gr48" style:family="graphic" style:parent-style-name="standard">
      <style:graphic-properties draw:stroke="none" draw:fill="solid" draw:fill-color="#3d6fc9" loext:decorative="false"/>
    </style:style>
    <style:style style:name="gr49" style:family="graphic" style:parent-style-name="standard">
      <style:graphic-properties draw:stroke="none" draw:fill="solid" draw:fill-color="#3c6ec8" loext:decorative="false"/>
    </style:style>
    <style:style style:name="gr50" style:family="graphic" style:parent-style-name="standard">
      <style:graphic-properties draw:stroke="none" draw:fill="solid" draw:fill-color="#3b6dc7" loext:decorative="false"/>
    </style:style>
    <style:style style:name="gr51" style:family="graphic" style:parent-style-name="standard">
      <style:graphic-properties draw:stroke="none" draw:fill="solid" draw:fill-color="#3a6cc6" loext:decorative="false"/>
    </style:style>
    <style:style style:name="gr52" style:family="graphic" style:parent-style-name="standard">
      <style:graphic-properties draw:stroke="none" draw:fill="solid" draw:fill-color="#396cc5" loext:decorative="false"/>
    </style:style>
    <style:style style:name="gr53" style:family="graphic" style:parent-style-name="standard">
      <style:graphic-properties draw:stroke="none" draw:fill="solid" draw:fill-color="#396bc5" loext:decorative="false"/>
    </style:style>
    <style:style style:name="gr54" style:family="graphic" style:parent-style-name="standard">
      <style:graphic-properties draw:stroke="none" draw:fill="solid" draw:fill-color="#386bc4" loext:decorative="false"/>
    </style:style>
    <style:style style:name="gr55" style:family="graphic" style:parent-style-name="standard">
      <style:graphic-properties draw:stroke="none" draw:fill="solid" draw:fill-color="#386ac4" loext:decorative="false"/>
    </style:style>
    <style:style style:name="gr56" style:family="graphic" style:parent-style-name="standard">
      <style:graphic-properties draw:stroke="none" draw:fill="solid" draw:fill-color="#376ac3" loext:decorative="false"/>
    </style:style>
    <style:style style:name="gr57" style:family="graphic" style:parent-style-name="standard">
      <style:graphic-properties draw:stroke="none" draw:fill="solid" draw:fill-color="#3769c3" loext:decorative="false"/>
    </style:style>
    <style:style style:name="gr58" style:family="graphic" style:parent-style-name="standard">
      <style:graphic-properties draw:stroke="none" draw:fill="solid" draw:fill-color="#3669c2" loext:decorative="false"/>
    </style:style>
    <style:style style:name="gr59" style:family="graphic" style:parent-style-name="standard">
      <style:graphic-properties draw:stroke="none" draw:fill="solid" draw:fill-color="#3668c2" loext:decorative="false"/>
    </style:style>
    <style:style style:name="gr60" style:family="graphic" style:parent-style-name="standard">
      <style:graphic-properties draw:stroke="none" draw:fill="solid" draw:fill-color="#3568c1" loext:decorative="false"/>
    </style:style>
    <style:style style:name="gr61" style:family="graphic" style:parent-style-name="standard">
      <style:graphic-properties draw:stroke="none" draw:fill="solid" draw:fill-color="#3567c1" loext:decorative="false"/>
    </style:style>
    <style:style style:name="gr62" style:family="graphic" style:parent-style-name="standard">
      <style:graphic-properties draw:stroke="none" draw:fill="solid" draw:fill-color="#3467c0" loext:decorative="false"/>
    </style:style>
    <style:style style:name="gr63" style:family="graphic" style:parent-style-name="standard">
      <style:graphic-properties draw:stroke="none" draw:fill="solid" draw:fill-color="#3466c0" loext:decorative="false"/>
    </style:style>
    <style:style style:name="gr64" style:family="graphic" style:parent-style-name="standard">
      <style:graphic-properties draw:stroke="none" draw:fill="solid" draw:fill-color="#3366bf" loext:decorative="false"/>
    </style:style>
    <style:style style:name="gr65" style:family="graphic" style:parent-style-name="standard">
      <style:graphic-properties draw:stroke="none" draw:fill="solid" draw:fill-color="#3365bf" loext:decorative="false"/>
    </style:style>
    <style:style style:name="gr66" style:family="graphic" style:parent-style-name="standard">
      <style:graphic-properties draw:stroke="none" draw:fill="solid" draw:fill-color="#3265be" loext:decorative="false"/>
    </style:style>
    <style:style style:name="gr67" style:family="graphic" style:parent-style-name="standard">
      <style:graphic-properties draw:stroke="none" draw:fill="solid" draw:fill-color="#3164bd" loext:decorative="false"/>
    </style:style>
    <style:style style:name="gr68" style:family="graphic" style:parent-style-name="standard">
      <style:graphic-properties draw:stroke="none" draw:fill="solid" draw:fill-color="#3063bc" loext:decorative="false"/>
    </style:style>
    <style:style style:name="gr69" style:family="graphic" style:parent-style-name="standard">
      <style:graphic-properties draw:stroke="none" draw:fill="solid" draw:fill-color="#2f62bb" loext:decorative="false"/>
    </style:style>
    <style:style style:name="gr70" style:family="graphic" style:parent-style-name="standard">
      <style:graphic-properties draw:stroke="none" draw:fill="solid" draw:fill-color="#2e61ba" loext:decorative="false"/>
    </style:style>
    <style:style style:name="gr71" style:family="graphic" style:parent-style-name="standard">
      <style:graphic-properties draw:stroke="none" draw:fill="solid" draw:fill-color="#4875ca" loext:decorative="false"/>
    </style:style>
    <style:style style:name="gr72" style:family="graphic" style:parent-style-name="standard">
      <style:graphic-properties draw:stroke="none" draw:fill="solid" draw:fill-color="#f18c55" loext:decorative="false"/>
    </style:style>
    <style:style style:name="gr73" style:family="graphic" style:parent-style-name="standard">
      <style:graphic-properties draw:stroke="none" draw:fill="solid" draw:fill-color="#f18c54" loext:decorative="false"/>
    </style:style>
    <style:style style:name="gr74" style:family="graphic" style:parent-style-name="standard">
      <style:graphic-properties draw:stroke="none" draw:fill="solid" draw:fill-color="#f18b53" loext:decorative="false"/>
    </style:style>
    <style:style style:name="gr75" style:family="graphic" style:parent-style-name="standard">
      <style:graphic-properties draw:stroke="none" draw:fill="solid" draw:fill-color="#f18b52" loext:decorative="false"/>
    </style:style>
    <style:style style:name="gr76" style:family="graphic" style:parent-style-name="standard">
      <style:graphic-properties draw:stroke="none" draw:fill="solid" draw:fill-color="#f18b51" loext:decorative="false"/>
    </style:style>
    <style:style style:name="gr77" style:family="graphic" style:parent-style-name="standard">
      <style:graphic-properties draw:stroke="none" draw:fill="solid" draw:fill-color="#f18a51" loext:decorative="false"/>
    </style:style>
    <style:style style:name="gr78" style:family="graphic" style:parent-style-name="standard">
      <style:graphic-properties draw:stroke="none" draw:fill="solid" draw:fill-color="#f28a50" loext:decorative="false"/>
    </style:style>
    <style:style style:name="gr79" style:family="graphic" style:parent-style-name="standard">
      <style:graphic-properties draw:stroke="none" draw:fill="solid" draw:fill-color="#f28a4f" loext:decorative="false"/>
    </style:style>
    <style:style style:name="gr80" style:family="graphic" style:parent-style-name="standard">
      <style:graphic-properties draw:stroke="none" draw:fill="solid" draw:fill-color="#f28a4e" loext:decorative="false"/>
    </style:style>
    <style:style style:name="gr81" style:family="graphic" style:parent-style-name="standard">
      <style:graphic-properties draw:stroke="none" draw:fill="solid" draw:fill-color="#f2894e" loext:decorative="false"/>
    </style:style>
    <style:style style:name="gr82" style:family="graphic" style:parent-style-name="standard">
      <style:graphic-properties draw:stroke="none" draw:fill="solid" draw:fill-color="#f2894d" loext:decorative="false"/>
    </style:style>
    <style:style style:name="gr83" style:family="graphic" style:parent-style-name="standard">
      <style:graphic-properties draw:stroke="none" draw:fill="solid" draw:fill-color="#f2894c" loext:decorative="false"/>
    </style:style>
    <style:style style:name="gr84" style:family="graphic" style:parent-style-name="standard">
      <style:graphic-properties draw:stroke="none" draw:fill="solid" draw:fill-color="#f2884c" loext:decorative="false"/>
    </style:style>
    <style:style style:name="gr85" style:family="graphic" style:parent-style-name="standard">
      <style:graphic-properties draw:stroke="none" draw:fill="solid" draw:fill-color="#f2884b" loext:decorative="false"/>
    </style:style>
    <style:style style:name="gr86" style:family="graphic" style:parent-style-name="standard">
      <style:graphic-properties draw:stroke="none" draw:fill="solid" draw:fill-color="#f2884a" loext:decorative="false"/>
    </style:style>
    <style:style style:name="gr87" style:family="graphic" style:parent-style-name="standard">
      <style:graphic-properties draw:stroke="none" draw:fill="solid" draw:fill-color="#f28749" loext:decorative="false"/>
    </style:style>
    <style:style style:name="gr88" style:family="graphic" style:parent-style-name="standard">
      <style:graphic-properties draw:stroke="none" draw:fill="solid" draw:fill-color="#f28748" loext:decorative="false"/>
    </style:style>
    <style:style style:name="gr89" style:family="graphic" style:parent-style-name="standard">
      <style:graphic-properties draw:stroke="none" draw:fill="solid" draw:fill-color="#f38747" loext:decorative="false"/>
    </style:style>
    <style:style style:name="gr90" style:family="graphic" style:parent-style-name="standard">
      <style:graphic-properties draw:stroke="none" draw:fill="solid" draw:fill-color="#f38646" loext:decorative="false"/>
    </style:style>
    <style:style style:name="gr91" style:family="graphic" style:parent-style-name="standard">
      <style:graphic-properties draw:stroke="none" draw:fill="solid" draw:fill-color="#f38645" loext:decorative="false"/>
    </style:style>
    <style:style style:name="gr92" style:family="graphic" style:parent-style-name="standard">
      <style:graphic-properties draw:stroke="none" draw:fill="solid" draw:fill-color="#f38644" loext:decorative="false"/>
    </style:style>
    <style:style style:name="gr93" style:family="graphic" style:parent-style-name="standard">
      <style:graphic-properties draw:stroke="none" draw:fill="solid" draw:fill-color="#f38543" loext:decorative="false"/>
    </style:style>
    <style:style style:name="gr94" style:family="graphic" style:parent-style-name="standard">
      <style:graphic-properties draw:stroke="none" draw:fill="solid" draw:fill-color="#f38542" loext:decorative="false"/>
    </style:style>
    <style:style style:name="gr95" style:family="graphic" style:parent-style-name="standard">
      <style:graphic-properties draw:stroke="none" draw:fill="solid" draw:fill-color="#f38441" loext:decorative="false"/>
    </style:style>
    <style:style style:name="gr96" style:family="graphic" style:parent-style-name="standard">
      <style:graphic-properties draw:stroke="none" draw:fill="solid" draw:fill-color="#f38440" loext:decorative="false"/>
    </style:style>
    <style:style style:name="gr97" style:family="graphic" style:parent-style-name="standard">
      <style:graphic-properties draw:stroke="none" draw:fill="solid" draw:fill-color="#f3843f" loext:decorative="false"/>
    </style:style>
    <style:style style:name="gr98" style:family="graphic" style:parent-style-name="standard">
      <style:graphic-properties draw:stroke="none" draw:fill="solid" draw:fill-color="#f4833e" loext:decorative="false"/>
    </style:style>
    <style:style style:name="gr99" style:family="graphic" style:parent-style-name="standard">
      <style:graphic-properties draw:stroke="none" draw:fill="solid" draw:fill-color="#f4833d" loext:decorative="false"/>
    </style:style>
    <style:style style:name="gr100" style:family="graphic" style:parent-style-name="standard">
      <style:graphic-properties draw:stroke="none" draw:fill="solid" draw:fill-color="#f4833c" loext:decorative="false"/>
    </style:style>
    <style:style style:name="gr101" style:family="graphic" style:parent-style-name="standard">
      <style:graphic-properties draw:stroke="none" draw:fill="solid" draw:fill-color="#f4823b" loext:decorative="false"/>
    </style:style>
    <style:style style:name="gr102" style:family="graphic" style:parent-style-name="standard">
      <style:graphic-properties draw:stroke="none" draw:fill="solid" draw:fill-color="#f4823a" loext:decorative="false"/>
    </style:style>
    <style:style style:name="gr103" style:family="graphic" style:parent-style-name="standard">
      <style:graphic-properties draw:stroke="none" draw:fill="solid" draw:fill-color="#f48239" loext:decorative="false"/>
    </style:style>
    <style:style style:name="gr104" style:family="graphic" style:parent-style-name="standard">
      <style:graphic-properties draw:stroke="none" draw:fill="solid" draw:fill-color="#f48139" loext:decorative="false"/>
    </style:style>
    <style:style style:name="gr105" style:family="graphic" style:parent-style-name="standard">
      <style:graphic-properties draw:stroke="none" draw:fill="solid" draw:fill-color="#f48138" loext:decorative="false"/>
    </style:style>
    <style:style style:name="gr106" style:family="graphic" style:parent-style-name="standard">
      <style:graphic-properties draw:stroke="none" draw:fill="solid" draw:fill-color="#f48137" loext:decorative="false"/>
    </style:style>
    <style:style style:name="gr107" style:family="graphic" style:parent-style-name="standard">
      <style:graphic-properties draw:stroke="none" draw:fill="solid" draw:fill-color="#f48037" loext:decorative="false"/>
    </style:style>
    <style:style style:name="gr108" style:family="graphic" style:parent-style-name="standard">
      <style:graphic-properties draw:stroke="none" draw:fill="solid" draw:fill-color="#f48036" loext:decorative="false"/>
    </style:style>
    <style:style style:name="gr109" style:family="graphic" style:parent-style-name="standard">
      <style:graphic-properties draw:stroke="none" draw:fill="solid" draw:fill-color="#f58035" loext:decorative="false"/>
    </style:style>
    <style:style style:name="gr110" style:family="graphic" style:parent-style-name="standard">
      <style:graphic-properties draw:stroke="none" draw:fill="solid" draw:fill-color="#f58034" loext:decorative="false"/>
    </style:style>
    <style:style style:name="gr111" style:family="graphic" style:parent-style-name="standard">
      <style:graphic-properties draw:stroke="none" draw:fill="solid" draw:fill-color="#f57f34" loext:decorative="false"/>
    </style:style>
    <style:style style:name="gr112" style:family="graphic" style:parent-style-name="standard">
      <style:graphic-properties draw:stroke="none" draw:fill="solid" draw:fill-color="#f57f33" loext:decorative="false"/>
    </style:style>
    <style:style style:name="gr113" style:family="graphic" style:parent-style-name="standard">
      <style:graphic-properties draw:stroke="none" draw:fill="solid" draw:fill-color="#f57f32" loext:decorative="false"/>
    </style:style>
    <style:style style:name="gr114" style:family="graphic" style:parent-style-name="standard">
      <style:graphic-properties draw:stroke="none" draw:fill="solid" draw:fill-color="#f57e31" loext:decorative="false"/>
    </style:style>
    <style:style style:name="gr115" style:family="graphic" style:parent-style-name="standard">
      <style:graphic-properties draw:stroke="none" draw:fill="solid" draw:fill-color="#f57e30" loext:decorative="false"/>
    </style:style>
    <style:style style:name="gr116" style:family="graphic" style:parent-style-name="standard">
      <style:graphic-properties draw:stroke="none" draw:fill="solid" draw:fill-color="#f57e2f" loext:decorative="false"/>
    </style:style>
    <style:style style:name="gr117" style:family="graphic" style:parent-style-name="standard">
      <style:graphic-properties draw:stroke="none" draw:fill="solid" draw:fill-color="#f57d2e" loext:decorative="false"/>
    </style:style>
    <style:style style:name="gr118" style:family="graphic" style:parent-style-name="standard">
      <style:graphic-properties draw:stroke="none" draw:fill="solid" draw:fill-color="#f57d2d" loext:decorative="false"/>
    </style:style>
    <style:style style:name="gr119" style:family="graphic" style:parent-style-name="standard">
      <style:graphic-properties draw:stroke="none" draw:fill="solid" draw:fill-color="#f67c2c" loext:decorative="false"/>
    </style:style>
    <style:style style:name="gr120" style:family="graphic" style:parent-style-name="standard">
      <style:graphic-properties draw:stroke="none" draw:fill="solid" draw:fill-color="#f67c2b" loext:decorative="false"/>
    </style:style>
    <style:style style:name="gr121" style:family="graphic" style:parent-style-name="standard">
      <style:graphic-properties draw:stroke="none" draw:fill="solid" draw:fill-color="#f67c2a" loext:decorative="false"/>
    </style:style>
    <style:style style:name="gr122" style:family="graphic" style:parent-style-name="standard">
      <style:graphic-properties draw:stroke="none" draw:fill="solid" draw:fill-color="#f67b29" loext:decorative="false"/>
    </style:style>
    <style:style style:name="gr123" style:family="graphic" style:parent-style-name="standard">
      <style:graphic-properties draw:stroke="none" draw:fill="solid" draw:fill-color="#f67b28" loext:decorative="false"/>
    </style:style>
    <style:style style:name="gr124" style:family="graphic" style:parent-style-name="standard">
      <style:graphic-properties draw:stroke="none" draw:fill="solid" draw:fill-color="#f57a27" loext:decorative="false"/>
    </style:style>
    <style:style style:name="gr125" style:family="graphic" style:parent-style-name="standard">
      <style:graphic-properties draw:stroke="none" draw:fill="solid" draw:fill-color="#f47926" loext:decorative="false"/>
    </style:style>
    <style:style style:name="gr126" style:family="graphic" style:parent-style-name="standard">
      <style:graphic-properties draw:stroke="none" draw:fill="solid" draw:fill-color="#f37825" loext:decorative="false"/>
    </style:style>
    <style:style style:name="gr127" style:family="graphic" style:parent-style-name="standard">
      <style:graphic-properties draw:stroke="none" draw:fill="solid" draw:fill-color="#f27724" loext:decorative="false"/>
    </style:style>
    <style:style style:name="gr128" style:family="graphic" style:parent-style-name="standard">
      <style:graphic-properties draw:stroke="none" draw:fill="solid" draw:fill-color="#f17623" loext:decorative="false"/>
    </style:style>
    <style:style style:name="gr129" style:family="graphic" style:parent-style-name="standard">
      <style:graphic-properties draw:stroke="none" draw:fill="solid" draw:fill-color="#f07622" loext:decorative="false"/>
    </style:style>
    <style:style style:name="gr130" style:family="graphic" style:parent-style-name="standard">
      <style:graphic-properties draw:stroke="none" draw:fill="solid" draw:fill-color="#f07522" loext:decorative="false"/>
    </style:style>
    <style:style style:name="gr131" style:family="graphic" style:parent-style-name="standard">
      <style:graphic-properties draw:stroke="none" draw:fill="solid" draw:fill-color="#ef7521" loext:decorative="false"/>
    </style:style>
    <style:style style:name="gr132" style:family="graphic" style:parent-style-name="standard">
      <style:graphic-properties draw:stroke="none" draw:fill="solid" draw:fill-color="#ef7421" loext:decorative="false"/>
    </style:style>
    <style:style style:name="gr133" style:family="graphic" style:parent-style-name="standard">
      <style:graphic-properties draw:stroke="none" draw:fill="solid" draw:fill-color="#ee7420" loext:decorative="false"/>
    </style:style>
    <style:style style:name="gr134" style:family="graphic" style:parent-style-name="standard">
      <style:graphic-properties draw:stroke="none" draw:fill="solid" draw:fill-color="#ee7320" loext:decorative="false"/>
    </style:style>
    <style:style style:name="gr135" style:family="graphic" style:parent-style-name="standard">
      <style:graphic-properties draw:stroke="none" draw:fill="solid" draw:fill-color="#ed731f" loext:decorative="false"/>
    </style:style>
    <style:style style:name="gr136" style:family="graphic" style:parent-style-name="standard">
      <style:graphic-properties draw:stroke="none" draw:fill="solid" draw:fill-color="#ed721f" loext:decorative="false"/>
    </style:style>
    <style:style style:name="gr137" style:family="graphic" style:parent-style-name="standard">
      <style:graphic-properties draw:stroke="none" draw:fill="solid" draw:fill-color="#ec721e" loext:decorative="false"/>
    </style:style>
    <style:style style:name="gr138" style:family="graphic" style:parent-style-name="standard">
      <style:graphic-properties draw:stroke="none" draw:fill="solid" draw:fill-color="#ec711e" loext:decorative="false"/>
    </style:style>
    <style:style style:name="gr139" style:family="graphic" style:parent-style-name="standard">
      <style:graphic-properties draw:stroke="none" draw:fill="solid" draw:fill-color="#eb711d" loext:decorative="false"/>
    </style:style>
    <style:style style:name="gr140" style:family="graphic" style:parent-style-name="standard">
      <style:graphic-properties draw:stroke="none" draw:fill="solid" draw:fill-color="#eb701d" loext:decorative="false"/>
    </style:style>
    <style:style style:name="gr141" style:family="graphic" style:parent-style-name="standard">
      <style:graphic-properties draw:stroke="none" draw:fill="solid" draw:fill-color="#ea701c" loext:decorative="false"/>
    </style:style>
    <style:style style:name="gr142" style:family="graphic" style:parent-style-name="standard">
      <style:graphic-properties draw:stroke="none" draw:fill="solid" draw:fill-color="#ea6f1c" loext:decorative="false"/>
    </style:style>
    <style:style style:name="gr143" style:family="graphic" style:parent-style-name="standard">
      <style:graphic-properties draw:stroke="none" draw:fill="solid" draw:fill-color="#e96f1b" loext:decorative="false"/>
    </style:style>
    <style:style style:name="gr144" style:family="graphic" style:parent-style-name="standard">
      <style:graphic-properties draw:stroke="none" draw:fill="solid" draw:fill-color="#e86e1a" loext:decorative="false"/>
    </style:style>
    <style:style style:name="gr145" style:family="graphic" style:parent-style-name="standard">
      <style:graphic-properties draw:stroke="none" draw:fill="solid" draw:fill-color="#e76d19" loext:decorative="false"/>
    </style:style>
    <style:style style:name="gr146" style:family="graphic" style:parent-style-name="standard">
      <style:graphic-properties draw:stroke="none" draw:fill="solid" draw:fill-color="#e66c18" loext:decorative="false"/>
    </style:style>
    <style:style style:name="gr147" style:family="graphic" style:parent-style-name="standard">
      <style:graphic-properties draw:stroke="none" draw:fill="solid" draw:fill-color="#e56b17" loext:decorative="false"/>
    </style:style>
    <style:style style:name="gr148" style:family="graphic" style:parent-style-name="standard">
      <style:graphic-properties draw:stroke="none" draw:fill="solid" draw:fill-color="#f28849" loext:decorative="false"/>
    </style:style>
    <style:style style:name="gr149" style:family="graphic" style:parent-style-name="standard">
      <style:graphic-properties draw:stroke="none" draw:fill="solid" draw:fill-color="#f38544" loext:decorative="false"/>
    </style:style>
    <style:style style:name="gr150" style:family="graphic" style:parent-style-name="standard">
      <style:graphic-properties draw:stroke="none" draw:fill="solid" draw:fill-color="#f57f31" loext:decorative="false"/>
    </style:style>
    <style:style style:name="gr151" style:family="graphic" style:parent-style-name="standard">
      <style:graphic-properties draw:stroke="none" draw:fill="solid" draw:fill-color="#f17723" loext:decorative="false"/>
    </style:style>
    <style:style style:name="gr152" style:family="graphic" style:parent-style-name="standard">
      <style:graphic-properties draw:stroke="none" draw:fill="solid" draw:fill-color="#afafaf" loext:decorative="false"/>
    </style:style>
    <style:style style:name="gr153" style:family="graphic" style:parent-style-name="standard">
      <style:graphic-properties draw:stroke="none" draw:fill="solid" draw:fill-color="#aeaeae" loext:decorative="false"/>
    </style:style>
    <style:style style:name="gr154" style:family="graphic" style:parent-style-name="standard">
      <style:graphic-properties draw:stroke="none" draw:fill="solid" draw:fill-color="#adadad" loext:decorative="false"/>
    </style:style>
    <style:style style:name="gr155" style:family="graphic" style:parent-style-name="standard">
      <style:graphic-properties draw:stroke="none" draw:fill="solid" draw:fill-color="#acacac" loext:decorative="false"/>
    </style:style>
    <style:style style:name="gr156" style:family="graphic" style:parent-style-name="standard">
      <style:graphic-properties draw:stroke="none" draw:fill="solid" draw:fill-color="#ababab" loext:decorative="false"/>
    </style:style>
    <style:style style:name="gr157" style:family="graphic" style:parent-style-name="standard">
      <style:graphic-properties draw:stroke="none" draw:fill="solid" draw:fill-color="#aaaaaa" loext:decorative="false"/>
    </style:style>
    <style:style style:name="gr158" style:family="graphic" style:parent-style-name="standard">
      <style:graphic-properties draw:stroke="none" draw:fill="solid" draw:fill-color="#a9a9a9" loext:decorative="false"/>
    </style:style>
    <style:style style:name="gr159" style:family="graphic" style:parent-style-name="standard">
      <style:graphic-properties draw:stroke="none" draw:fill="solid" draw:fill-color="#a8a8a8" loext:decorative="false"/>
    </style:style>
    <style:style style:name="gr160" style:family="graphic" style:parent-style-name="standard">
      <style:graphic-properties draw:stroke="none" draw:fill="solid" draw:fill-color="#a7a7a7" loext:decorative="false"/>
    </style:style>
    <style:style style:name="gr161" style:family="graphic" style:parent-style-name="standard">
      <style:graphic-properties draw:stroke="none" draw:fill="solid" draw:fill-color="#a6a6a6" loext:decorative="false"/>
    </style:style>
    <style:style style:name="gr162" style:family="graphic" style:parent-style-name="standard">
      <style:graphic-properties draw:stroke="none" draw:fill="solid" draw:fill-color="#a5a5a5" loext:decorative="false"/>
    </style:style>
    <style:style style:name="gr163" style:family="graphic" style:parent-style-name="standard">
      <style:graphic-properties draw:stroke="none" draw:fill="solid" draw:fill-color="#a4a4a4" loext:decorative="false"/>
    </style:style>
    <style:style style:name="gr164" style:family="graphic" style:parent-style-name="standard">
      <style:graphic-properties draw:stroke="none" draw:fill="solid" draw:fill-color="#a3a3a3" loext:decorative="false"/>
    </style:style>
    <style:style style:name="gr165" style:family="graphic" style:parent-style-name="standard">
      <style:graphic-properties draw:stroke="none" draw:fill="solid" draw:fill-color="#a2a2a2" loext:decorative="false"/>
    </style:style>
    <style:style style:name="gr166" style:family="graphic" style:parent-style-name="standard">
      <style:graphic-properties draw:stroke="none" draw:fill="solid" draw:fill-color="#a1a1a1" loext:decorative="false"/>
    </style:style>
    <style:style style:name="gr167" style:family="graphic" style:parent-style-name="standard">
      <style:graphic-properties draw:stroke="none" draw:fill="solid" draw:fill-color="#a0a0a0" loext:decorative="false"/>
    </style:style>
    <style:style style:name="gr168" style:family="graphic" style:parent-style-name="standard">
      <style:graphic-properties draw:stroke="none" draw:fill="solid" draw:fill-color="#9f9f9f" loext:decorative="false"/>
    </style:style>
    <style:style style:name="gr169" style:family="graphic" style:parent-style-name="standard">
      <style:graphic-properties draw:stroke="none" draw:fill="solid" draw:fill-color="#9e9e9e" loext:decorative="false"/>
    </style:style>
    <style:style style:name="gr170" style:family="graphic" style:parent-style-name="standard">
      <style:graphic-properties draw:stroke="none" draw:fill="solid" draw:fill-color="#9d9d9d" loext:decorative="false"/>
    </style:style>
    <style:style style:name="gr171" style:family="graphic" style:parent-style-name="standard">
      <style:graphic-properties draw:stroke="none" draw:fill="solid" draw:fill-color="#9c9c9c" loext:decorative="false"/>
    </style:style>
    <style:style style:name="gr172" style:family="graphic" style:parent-style-name="standard">
      <style:graphic-properties draw:stroke="none" draw:fill="solid" draw:fill-color="#9b9b9b" loext:decorative="false"/>
    </style:style>
    <style:style style:name="gr173" style:family="graphic" style:parent-style-name="standard">
      <style:graphic-properties draw:stroke="none" draw:fill="solid" draw:fill-color="#9a9a9a" loext:decorative="false"/>
    </style:style>
    <style:style style:name="gr174" style:family="graphic" style:parent-style-name="standard">
      <style:graphic-properties draw:stroke="none" draw:fill="solid" draw:fill-color="#999999" loext:decorative="false"/>
    </style:style>
    <style:style style:name="gr175" style:family="graphic" style:parent-style-name="standard">
      <style:graphic-properties draw:stroke="none" draw:fill="solid" draw:fill-color="#989898" loext:decorative="false"/>
    </style:style>
    <style:style style:name="gr176" style:family="graphic" style:parent-style-name="standard">
      <style:graphic-properties draw:stroke="none" draw:fill="solid" draw:fill-color="#979797" loext:decorative="false"/>
    </style:style>
    <style:style style:name="gr177" style:family="graphic" style:parent-style-name="standard">
      <style:graphic-properties draw:stroke="none" draw:fill="solid" draw:fill-color="#969696" loext:decorative="false"/>
    </style:style>
    <style:style style:name="gr178" style:family="graphic" style:parent-style-name="standard">
      <style:graphic-properties draw:stroke="none" draw:fill="solid" draw:fill-color="#959595" loext:decorative="false"/>
    </style:style>
    <style:style style:name="gr179" style:family="graphic" style:parent-style-name="standard">
      <style:graphic-properties draw:stroke="none" draw:fill="solid" draw:fill-color="#949494" loext:decorative="false"/>
    </style:style>
    <style:style style:name="gr180" style:family="graphic" style:parent-style-name="standard">
      <style:graphic-properties draw:stroke="none" draw:fill="solid" draw:fill-color="#939393" loext:decorative="false"/>
    </style:style>
    <style:style style:name="gr181" style:family="graphic" style:parent-style-name="standard">
      <style:graphic-properties draw:stroke="none" draw:fill="solid" draw:fill-color="#929292" loext:decorative="false"/>
    </style:style>
    <style:style style:name="gr182" style:family="graphic" style:parent-style-name="standard">
      <style:graphic-properties draw:stroke="solid" svg:stroke-width="0.035cm" svg:stroke-color="#d9d9d9" draw:stroke-linejoin="round" svg:stroke-linecap="butt" draw:fill="none" fo:padding-top="0.017cm" fo:padding-bottom="0.017cm" fo:padding-left="0.017cm" fo:padding-right="0.017cm" loext:decorative="false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0.85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solid" draw:fill-color="#4472c4" loext:decorative="false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6083cb"/>
    </style:style>
    <style:style style:name="P7" style:family="paragraph">
      <loext:graphic-properties draw:fill="solid" draw:fill-color="#5f83cb"/>
    </style:style>
    <style:style style:name="P8" style:family="paragraph">
      <loext:graphic-properties draw:fill="solid" draw:fill-color="#5f82cb"/>
    </style:style>
    <style:style style:name="P9" style:family="paragraph">
      <loext:graphic-properties draw:fill="solid" draw:fill-color="#5e82cb"/>
    </style:style>
    <style:style style:name="P10" style:family="paragraph">
      <loext:graphic-properties draw:fill="solid" draw:fill-color="#5d81cb"/>
    </style:style>
    <style:style style:name="P11" style:family="paragraph">
      <loext:graphic-properties draw:fill="solid" draw:fill-color="#5c81cb"/>
    </style:style>
    <style:style style:name="P12" style:family="paragraph">
      <loext:graphic-properties draw:fill="solid" draw:fill-color="#5c80cb"/>
    </style:style>
    <style:style style:name="P13" style:family="paragraph">
      <loext:graphic-properties draw:fill="solid" draw:fill-color="#5b80cb"/>
    </style:style>
    <style:style style:name="P14" style:family="paragraph">
      <loext:graphic-properties draw:fill="solid" draw:fill-color="#5a80cb"/>
    </style:style>
    <style:style style:name="P15" style:family="paragraph">
      <loext:graphic-properties draw:fill="solid" draw:fill-color="#597fcb"/>
    </style:style>
    <style:style style:name="P16" style:family="paragraph">
      <loext:graphic-properties draw:fill="solid" draw:fill-color="#587fcb"/>
    </style:style>
    <style:style style:name="P17" style:family="paragraph">
      <loext:graphic-properties draw:fill="solid" draw:fill-color="#587ecb"/>
    </style:style>
    <style:style style:name="P18" style:family="paragraph">
      <loext:graphic-properties draw:fill="solid" draw:fill-color="#577ecb"/>
    </style:style>
    <style:style style:name="P19" style:family="paragraph">
      <loext:graphic-properties draw:fill="solid" draw:fill-color="#567ecb"/>
    </style:style>
    <style:style style:name="P20" style:family="paragraph">
      <loext:graphic-properties draw:fill="solid" draw:fill-color="#567dcb"/>
    </style:style>
    <style:style style:name="P21" style:family="paragraph">
      <loext:graphic-properties draw:fill="solid" draw:fill-color="#557dcb"/>
    </style:style>
    <style:style style:name="P22" style:family="paragraph">
      <loext:graphic-properties draw:fill="solid" draw:fill-color="#547ccb"/>
    </style:style>
    <style:style style:name="P23" style:family="paragraph">
      <loext:graphic-properties draw:fill="solid" draw:fill-color="#537ccb"/>
    </style:style>
    <style:style style:name="P24" style:family="paragraph">
      <loext:graphic-properties draw:fill="solid" draw:fill-color="#527bcb"/>
    </style:style>
    <style:style style:name="P25" style:family="paragraph">
      <loext:graphic-properties draw:fill="solid" draw:fill-color="#517bcb"/>
    </style:style>
    <style:style style:name="P26" style:family="paragraph">
      <loext:graphic-properties draw:fill="solid" draw:fill-color="#507acb"/>
    </style:style>
    <style:style style:name="P27" style:family="paragraph">
      <loext:graphic-properties draw:fill="solid" draw:fill-color="#4f7acb"/>
    </style:style>
    <style:style style:name="P28" style:family="paragraph">
      <loext:graphic-properties draw:fill="solid" draw:fill-color="#4f79ca"/>
    </style:style>
    <style:style style:name="P29" style:family="paragraph">
      <loext:graphic-properties draw:fill="solid" draw:fill-color="#4e79ca"/>
    </style:style>
    <style:style style:name="P30" style:family="paragraph">
      <loext:graphic-properties draw:fill="solid" draw:fill-color="#4d78ca"/>
    </style:style>
    <style:style style:name="P31" style:family="paragraph">
      <loext:graphic-properties draw:fill="solid" draw:fill-color="#4c78ca"/>
    </style:style>
    <style:style style:name="P32" style:family="paragraph">
      <loext:graphic-properties draw:fill="solid" draw:fill-color="#4b77ca"/>
    </style:style>
    <style:style style:name="P33" style:family="paragraph">
      <loext:graphic-properties draw:fill="solid" draw:fill-color="#4a77ca"/>
    </style:style>
    <style:style style:name="P34" style:family="paragraph">
      <loext:graphic-properties draw:fill="solid" draw:fill-color="#4976ca"/>
    </style:style>
    <style:style style:name="P35" style:family="paragraph">
      <loext:graphic-properties draw:fill="solid" draw:fill-color="#4876ca"/>
    </style:style>
    <style:style style:name="P36" style:family="paragraph">
      <loext:graphic-properties draw:fill="solid" draw:fill-color="#4775ca"/>
    </style:style>
    <style:style style:name="P37" style:family="paragraph">
      <loext:graphic-properties draw:fill="solid" draw:fill-color="#4675ca"/>
    </style:style>
    <style:style style:name="P38" style:family="paragraph">
      <loext:graphic-properties draw:fill="solid" draw:fill-color="#4674ca"/>
    </style:style>
    <style:style style:name="P39" style:family="paragraph">
      <loext:graphic-properties draw:fill="solid" draw:fill-color="#4574ca"/>
    </style:style>
    <style:style style:name="P40" style:family="paragraph">
      <loext:graphic-properties draw:fill="solid" draw:fill-color="#4473ca"/>
    </style:style>
    <style:style style:name="P41" style:family="paragraph">
      <loext:graphic-properties draw:fill="solid" draw:fill-color="#4373ca"/>
    </style:style>
    <style:style style:name="P42" style:family="paragraph">
      <loext:graphic-properties draw:fill="solid" draw:fill-color="#4272ca"/>
    </style:style>
    <style:style style:name="P43" style:family="paragraph">
      <loext:graphic-properties draw:fill="solid" draw:fill-color="#4172ca"/>
    </style:style>
    <style:style style:name="P44" style:family="paragraph">
      <loext:graphic-properties draw:fill="solid" draw:fill-color="#4071ca"/>
    </style:style>
    <style:style style:name="P45" style:family="paragraph">
      <loext:graphic-properties draw:fill="solid" draw:fill-color="#3f71ca"/>
    </style:style>
    <style:style style:name="P46" style:family="paragraph">
      <loext:graphic-properties draw:fill="solid" draw:fill-color="#3f70ca"/>
    </style:style>
    <style:style style:name="P47" style:family="paragraph">
      <loext:graphic-properties draw:fill="solid" draw:fill-color="#3e70ca"/>
    </style:style>
    <style:style style:name="P48" style:family="paragraph">
      <loext:graphic-properties draw:fill="solid" draw:fill-color="#3d6fc9"/>
    </style:style>
    <style:style style:name="P49" style:family="paragraph">
      <loext:graphic-properties draw:fill="solid" draw:fill-color="#3c6ec8"/>
    </style:style>
    <style:style style:name="P50" style:family="paragraph">
      <loext:graphic-properties draw:fill="solid" draw:fill-color="#3b6dc7"/>
    </style:style>
    <style:style style:name="P51" style:family="paragraph">
      <loext:graphic-properties draw:fill="solid" draw:fill-color="#3a6cc6"/>
    </style:style>
    <style:style style:name="P52" style:family="paragraph">
      <loext:graphic-properties draw:fill="solid" draw:fill-color="#396cc5"/>
    </style:style>
    <style:style style:name="P53" style:family="paragraph">
      <loext:graphic-properties draw:fill="solid" draw:fill-color="#396bc5"/>
    </style:style>
    <style:style style:name="P54" style:family="paragraph">
      <loext:graphic-properties draw:fill="solid" draw:fill-color="#386bc4"/>
    </style:style>
    <style:style style:name="P55" style:family="paragraph">
      <loext:graphic-properties draw:fill="solid" draw:fill-color="#386ac4"/>
    </style:style>
    <style:style style:name="P56" style:family="paragraph">
      <loext:graphic-properties draw:fill="solid" draw:fill-color="#376ac3"/>
    </style:style>
    <style:style style:name="P57" style:family="paragraph">
      <loext:graphic-properties draw:fill="solid" draw:fill-color="#3769c3"/>
    </style:style>
    <style:style style:name="P58" style:family="paragraph">
      <loext:graphic-properties draw:fill="solid" draw:fill-color="#3669c2"/>
    </style:style>
    <style:style style:name="P59" style:family="paragraph">
      <loext:graphic-properties draw:fill="solid" draw:fill-color="#3668c2"/>
    </style:style>
    <style:style style:name="P60" style:family="paragraph">
      <loext:graphic-properties draw:fill="solid" draw:fill-color="#3568c1"/>
    </style:style>
    <style:style style:name="P61" style:family="paragraph">
      <loext:graphic-properties draw:fill="solid" draw:fill-color="#3567c1"/>
    </style:style>
    <style:style style:name="P62" style:family="paragraph">
      <loext:graphic-properties draw:fill="solid" draw:fill-color="#3467c0"/>
    </style:style>
    <style:style style:name="P63" style:family="paragraph">
      <loext:graphic-properties draw:fill="solid" draw:fill-color="#3466c0"/>
    </style:style>
    <style:style style:name="P64" style:family="paragraph">
      <loext:graphic-properties draw:fill="solid" draw:fill-color="#3366bf"/>
    </style:style>
    <style:style style:name="P65" style:family="paragraph">
      <loext:graphic-properties draw:fill="solid" draw:fill-color="#3365bf"/>
    </style:style>
    <style:style style:name="P66" style:family="paragraph">
      <loext:graphic-properties draw:fill="solid" draw:fill-color="#3265be"/>
    </style:style>
    <style:style style:name="P67" style:family="paragraph">
      <loext:graphic-properties draw:fill="solid" draw:fill-color="#3164bd"/>
    </style:style>
    <style:style style:name="P68" style:family="paragraph">
      <loext:graphic-properties draw:fill="solid" draw:fill-color="#3063bc"/>
    </style:style>
    <style:style style:name="P69" style:family="paragraph">
      <loext:graphic-properties draw:fill="solid" draw:fill-color="#2f62bb"/>
    </style:style>
    <style:style style:name="P70" style:family="paragraph">
      <loext:graphic-properties draw:fill="solid" draw:fill-color="#2e61ba"/>
    </style:style>
    <style:style style:name="P71" style:family="paragraph">
      <loext:graphic-properties draw:fill="solid" draw:fill-color="#4875ca"/>
    </style:style>
    <style:style style:name="P72" style:family="paragraph">
      <loext:graphic-properties draw:fill="solid" draw:fill-color="#f18c55"/>
    </style:style>
    <style:style style:name="P73" style:family="paragraph">
      <loext:graphic-properties draw:fill="solid" draw:fill-color="#f18c54"/>
    </style:style>
    <style:style style:name="P74" style:family="paragraph">
      <loext:graphic-properties draw:fill="solid" draw:fill-color="#f18b53"/>
    </style:style>
    <style:style style:name="P75" style:family="paragraph">
      <loext:graphic-properties draw:fill="solid" draw:fill-color="#f18b52"/>
    </style:style>
    <style:style style:name="P76" style:family="paragraph">
      <loext:graphic-properties draw:fill="solid" draw:fill-color="#f18b51"/>
    </style:style>
    <style:style style:name="P77" style:family="paragraph">
      <loext:graphic-properties draw:fill="solid" draw:fill-color="#f18a51"/>
    </style:style>
    <style:style style:name="P78" style:family="paragraph">
      <loext:graphic-properties draw:fill="solid" draw:fill-color="#f28a50"/>
    </style:style>
    <style:style style:name="P79" style:family="paragraph">
      <loext:graphic-properties draw:fill="solid" draw:fill-color="#f28a4f"/>
    </style:style>
    <style:style style:name="P80" style:family="paragraph">
      <loext:graphic-properties draw:fill="solid" draw:fill-color="#f28a4e"/>
    </style:style>
    <style:style style:name="P81" style:family="paragraph">
      <loext:graphic-properties draw:fill="solid" draw:fill-color="#f2894e"/>
    </style:style>
    <style:style style:name="P82" style:family="paragraph">
      <loext:graphic-properties draw:fill="solid" draw:fill-color="#f2894d"/>
    </style:style>
    <style:style style:name="P83" style:family="paragraph">
      <loext:graphic-properties draw:fill="solid" draw:fill-color="#f2894c"/>
    </style:style>
    <style:style style:name="P84" style:family="paragraph">
      <loext:graphic-properties draw:fill="solid" draw:fill-color="#f2884c"/>
    </style:style>
    <style:style style:name="P85" style:family="paragraph">
      <loext:graphic-properties draw:fill="solid" draw:fill-color="#f2884b"/>
    </style:style>
    <style:style style:name="P86" style:family="paragraph">
      <loext:graphic-properties draw:fill="solid" draw:fill-color="#f2884a"/>
    </style:style>
    <style:style style:name="P87" style:family="paragraph">
      <loext:graphic-properties draw:fill="solid" draw:fill-color="#f28749"/>
    </style:style>
    <style:style style:name="P88" style:family="paragraph">
      <loext:graphic-properties draw:fill="solid" draw:fill-color="#f28748"/>
    </style:style>
    <style:style style:name="P89" style:family="paragraph">
      <loext:graphic-properties draw:fill="solid" draw:fill-color="#f38747"/>
    </style:style>
    <style:style style:name="P90" style:family="paragraph">
      <loext:graphic-properties draw:fill="solid" draw:fill-color="#f38646"/>
    </style:style>
    <style:style style:name="P91" style:family="paragraph">
      <loext:graphic-properties draw:fill="solid" draw:fill-color="#f38645"/>
    </style:style>
    <style:style style:name="P92" style:family="paragraph">
      <loext:graphic-properties draw:fill="solid" draw:fill-color="#f38644"/>
    </style:style>
    <style:style style:name="P93" style:family="paragraph">
      <loext:graphic-properties draw:fill="solid" draw:fill-color="#f38543"/>
    </style:style>
    <style:style style:name="P94" style:family="paragraph">
      <loext:graphic-properties draw:fill="solid" draw:fill-color="#f38542"/>
    </style:style>
    <style:style style:name="P95" style:family="paragraph">
      <loext:graphic-properties draw:fill="solid" draw:fill-color="#f38441"/>
    </style:style>
    <style:style style:name="P96" style:family="paragraph">
      <loext:graphic-properties draw:fill="solid" draw:fill-color="#f38440"/>
    </style:style>
    <style:style style:name="P97" style:family="paragraph">
      <loext:graphic-properties draw:fill="solid" draw:fill-color="#f3843f"/>
    </style:style>
    <style:style style:name="P98" style:family="paragraph">
      <loext:graphic-properties draw:fill="solid" draw:fill-color="#f4833e"/>
    </style:style>
    <style:style style:name="P99" style:family="paragraph">
      <loext:graphic-properties draw:fill="solid" draw:fill-color="#f4833d"/>
    </style:style>
    <style:style style:name="P100" style:family="paragraph">
      <loext:graphic-properties draw:fill="solid" draw:fill-color="#f4833c"/>
    </style:style>
    <style:style style:name="P101" style:family="paragraph">
      <loext:graphic-properties draw:fill="solid" draw:fill-color="#f4823b"/>
    </style:style>
    <style:style style:name="P102" style:family="paragraph">
      <loext:graphic-properties draw:fill="solid" draw:fill-color="#f4823a"/>
    </style:style>
    <style:style style:name="P103" style:family="paragraph">
      <loext:graphic-properties draw:fill="solid" draw:fill-color="#f48239"/>
    </style:style>
    <style:style style:name="P104" style:family="paragraph">
      <loext:graphic-properties draw:fill="solid" draw:fill-color="#f48139"/>
    </style:style>
    <style:style style:name="P105" style:family="paragraph">
      <loext:graphic-properties draw:fill="solid" draw:fill-color="#f48138"/>
    </style:style>
    <style:style style:name="P106" style:family="paragraph">
      <loext:graphic-properties draw:fill="solid" draw:fill-color="#f48137"/>
    </style:style>
    <style:style style:name="P107" style:family="paragraph">
      <loext:graphic-properties draw:fill="solid" draw:fill-color="#f48037"/>
    </style:style>
    <style:style style:name="P108" style:family="paragraph">
      <loext:graphic-properties draw:fill="solid" draw:fill-color="#f48036"/>
    </style:style>
    <style:style style:name="P109" style:family="paragraph">
      <loext:graphic-properties draw:fill="solid" draw:fill-color="#f58035"/>
    </style:style>
    <style:style style:name="P110" style:family="paragraph">
      <loext:graphic-properties draw:fill="solid" draw:fill-color="#f58034"/>
    </style:style>
    <style:style style:name="P111" style:family="paragraph">
      <loext:graphic-properties draw:fill="solid" draw:fill-color="#f57f34"/>
    </style:style>
    <style:style style:name="P112" style:family="paragraph">
      <loext:graphic-properties draw:fill="solid" draw:fill-color="#f57f33"/>
    </style:style>
    <style:style style:name="P113" style:family="paragraph">
      <loext:graphic-properties draw:fill="solid" draw:fill-color="#f57f32"/>
    </style:style>
    <style:style style:name="P114" style:family="paragraph">
      <loext:graphic-properties draw:fill="solid" draw:fill-color="#f57e31"/>
    </style:style>
    <style:style style:name="P115" style:family="paragraph">
      <loext:graphic-properties draw:fill="solid" draw:fill-color="#f57e30"/>
    </style:style>
    <style:style style:name="P116" style:family="paragraph">
      <loext:graphic-properties draw:fill="solid" draw:fill-color="#f57e2f"/>
    </style:style>
    <style:style style:name="P117" style:family="paragraph">
      <loext:graphic-properties draw:fill="solid" draw:fill-color="#f57d2e"/>
    </style:style>
    <style:style style:name="P118" style:family="paragraph">
      <loext:graphic-properties draw:fill="solid" draw:fill-color="#f57d2d"/>
    </style:style>
    <style:style style:name="P119" style:family="paragraph">
      <loext:graphic-properties draw:fill="solid" draw:fill-color="#f67c2c"/>
    </style:style>
    <style:style style:name="P120" style:family="paragraph">
      <loext:graphic-properties draw:fill="solid" draw:fill-color="#f67c2b"/>
    </style:style>
    <style:style style:name="P121" style:family="paragraph">
      <loext:graphic-properties draw:fill="solid" draw:fill-color="#f67c2a"/>
    </style:style>
    <style:style style:name="P122" style:family="paragraph">
      <loext:graphic-properties draw:fill="solid" draw:fill-color="#f67b29"/>
    </style:style>
    <style:style style:name="P123" style:family="paragraph">
      <loext:graphic-properties draw:fill="solid" draw:fill-color="#f67b28"/>
    </style:style>
    <style:style style:name="P124" style:family="paragraph">
      <loext:graphic-properties draw:fill="solid" draw:fill-color="#f57a27"/>
    </style:style>
    <style:style style:name="P125" style:family="paragraph">
      <loext:graphic-properties draw:fill="solid" draw:fill-color="#f47926"/>
    </style:style>
    <style:style style:name="P126" style:family="paragraph">
      <loext:graphic-properties draw:fill="solid" draw:fill-color="#f37825"/>
    </style:style>
    <style:style style:name="P127" style:family="paragraph">
      <loext:graphic-properties draw:fill="solid" draw:fill-color="#f27724"/>
    </style:style>
    <style:style style:name="P128" style:family="paragraph">
      <loext:graphic-properties draw:fill="solid" draw:fill-color="#f17623"/>
    </style:style>
    <style:style style:name="P129" style:family="paragraph">
      <loext:graphic-properties draw:fill="solid" draw:fill-color="#f07622"/>
    </style:style>
    <style:style style:name="P130" style:family="paragraph">
      <loext:graphic-properties draw:fill="solid" draw:fill-color="#f07522"/>
    </style:style>
    <style:style style:name="P131" style:family="paragraph">
      <loext:graphic-properties draw:fill="solid" draw:fill-color="#ef7521"/>
    </style:style>
    <style:style style:name="P132" style:family="paragraph">
      <loext:graphic-properties draw:fill="solid" draw:fill-color="#ef7421"/>
    </style:style>
    <style:style style:name="P133" style:family="paragraph">
      <loext:graphic-properties draw:fill="solid" draw:fill-color="#ee7420"/>
    </style:style>
    <style:style style:name="P134" style:family="paragraph">
      <loext:graphic-properties draw:fill="solid" draw:fill-color="#ee7320"/>
    </style:style>
    <style:style style:name="P135" style:family="paragraph">
      <loext:graphic-properties draw:fill="solid" draw:fill-color="#ed731f"/>
    </style:style>
    <style:style style:name="P136" style:family="paragraph">
      <loext:graphic-properties draw:fill="solid" draw:fill-color="#ed721f"/>
    </style:style>
    <style:style style:name="P137" style:family="paragraph">
      <loext:graphic-properties draw:fill="solid" draw:fill-color="#ec721e"/>
    </style:style>
    <style:style style:name="P138" style:family="paragraph">
      <loext:graphic-properties draw:fill="solid" draw:fill-color="#ec711e"/>
    </style:style>
    <style:style style:name="P139" style:family="paragraph">
      <loext:graphic-properties draw:fill="solid" draw:fill-color="#eb711d"/>
    </style:style>
    <style:style style:name="P140" style:family="paragraph">
      <loext:graphic-properties draw:fill="solid" draw:fill-color="#eb701d"/>
    </style:style>
    <style:style style:name="P141" style:family="paragraph">
      <loext:graphic-properties draw:fill="solid" draw:fill-color="#ea701c"/>
    </style:style>
    <style:style style:name="P142" style:family="paragraph">
      <loext:graphic-properties draw:fill="solid" draw:fill-color="#ea6f1c"/>
    </style:style>
    <style:style style:name="P143" style:family="paragraph">
      <loext:graphic-properties draw:fill="solid" draw:fill-color="#e96f1b"/>
    </style:style>
    <style:style style:name="P144" style:family="paragraph">
      <loext:graphic-properties draw:fill="solid" draw:fill-color="#e86e1a"/>
    </style:style>
    <style:style style:name="P145" style:family="paragraph">
      <loext:graphic-properties draw:fill="solid" draw:fill-color="#e76d19"/>
    </style:style>
    <style:style style:name="P146" style:family="paragraph">
      <loext:graphic-properties draw:fill="solid" draw:fill-color="#e66c18"/>
    </style:style>
    <style:style style:name="P147" style:family="paragraph">
      <loext:graphic-properties draw:fill="solid" draw:fill-color="#e56b17"/>
    </style:style>
    <style:style style:name="P148" style:family="paragraph">
      <loext:graphic-properties draw:fill="solid" draw:fill-color="#f28849"/>
    </style:style>
    <style:style style:name="P149" style:family="paragraph">
      <loext:graphic-properties draw:fill="solid" draw:fill-color="#f38544"/>
    </style:style>
    <style:style style:name="P150" style:family="paragraph">
      <loext:graphic-properties draw:fill="solid" draw:fill-color="#f57f31"/>
    </style:style>
    <style:style style:name="P151" style:family="paragraph">
      <loext:graphic-properties draw:fill="solid" draw:fill-color="#f17723"/>
    </style:style>
    <style:style style:name="P152" style:family="paragraph">
      <loext:graphic-properties draw:fill="solid" draw:fill-color="#afafaf"/>
    </style:style>
    <style:style style:name="P153" style:family="paragraph">
      <loext:graphic-properties draw:fill="solid" draw:fill-color="#aeaeae"/>
    </style:style>
    <style:style style:name="P154" style:family="paragraph">
      <loext:graphic-properties draw:fill="solid" draw:fill-color="#adadad"/>
    </style:style>
    <style:style style:name="P155" style:family="paragraph">
      <loext:graphic-properties draw:fill="solid" draw:fill-color="#acacac"/>
    </style:style>
    <style:style style:name="P156" style:family="paragraph">
      <loext:graphic-properties draw:fill="solid" draw:fill-color="#ababab"/>
    </style:style>
    <style:style style:name="P157" style:family="paragraph">
      <loext:graphic-properties draw:fill="solid" draw:fill-color="#aaaaaa"/>
    </style:style>
    <style:style style:name="P158" style:family="paragraph">
      <loext:graphic-properties draw:fill="solid" draw:fill-color="#a9a9a9"/>
    </style:style>
    <style:style style:name="P159" style:family="paragraph">
      <loext:graphic-properties draw:fill="solid" draw:fill-color="#a8a8a8"/>
    </style:style>
    <style:style style:name="P160" style:family="paragraph">
      <loext:graphic-properties draw:fill="solid" draw:fill-color="#a7a7a7"/>
    </style:style>
    <style:style style:name="P161" style:family="paragraph">
      <loext:graphic-properties draw:fill="solid" draw:fill-color="#a6a6a6"/>
    </style:style>
    <style:style style:name="P162" style:family="paragraph">
      <loext:graphic-properties draw:fill="solid" draw:fill-color="#a5a5a5"/>
    </style:style>
    <style:style style:name="P163" style:family="paragraph">
      <loext:graphic-properties draw:fill="solid" draw:fill-color="#a4a4a4"/>
    </style:style>
    <style:style style:name="P164" style:family="paragraph">
      <loext:graphic-properties draw:fill="solid" draw:fill-color="#a3a3a3"/>
    </style:style>
    <style:style style:name="P165" style:family="paragraph">
      <loext:graphic-properties draw:fill="solid" draw:fill-color="#a2a2a2"/>
    </style:style>
    <style:style style:name="P166" style:family="paragraph">
      <loext:graphic-properties draw:fill="solid" draw:fill-color="#a1a1a1"/>
    </style:style>
    <style:style style:name="P167" style:family="paragraph">
      <loext:graphic-properties draw:fill="solid" draw:fill-color="#a0a0a0"/>
    </style:style>
    <style:style style:name="P168" style:family="paragraph">
      <loext:graphic-properties draw:fill="solid" draw:fill-color="#9f9f9f"/>
    </style:style>
    <style:style style:name="P169" style:family="paragraph">
      <loext:graphic-properties draw:fill="solid" draw:fill-color="#9e9e9e"/>
    </style:style>
    <style:style style:name="P170" style:family="paragraph">
      <loext:graphic-properties draw:fill="solid" draw:fill-color="#9d9d9d"/>
    </style:style>
    <style:style style:name="P171" style:family="paragraph">
      <loext:graphic-properties draw:fill="solid" draw:fill-color="#9c9c9c"/>
    </style:style>
    <style:style style:name="P172" style:family="paragraph">
      <loext:graphic-properties draw:fill="solid" draw:fill-color="#9b9b9b"/>
    </style:style>
    <style:style style:name="P173" style:family="paragraph">
      <loext:graphic-properties draw:fill="solid" draw:fill-color="#9a9a9a"/>
    </style:style>
    <style:style style:name="P174" style:family="paragraph">
      <loext:graphic-properties draw:fill="solid" draw:fill-color="#999999"/>
    </style:style>
    <style:style style:name="P175" style:family="paragraph">
      <loext:graphic-properties draw:fill="solid" draw:fill-color="#989898"/>
    </style:style>
    <style:style style:name="P176" style:family="paragraph">
      <loext:graphic-properties draw:fill="solid" draw:fill-color="#979797"/>
    </style:style>
    <style:style style:name="P177" style:family="paragraph">
      <loext:graphic-properties draw:fill="solid" draw:fill-color="#969696"/>
    </style:style>
    <style:style style:name="P178" style:family="paragraph">
      <loext:graphic-properties draw:fill="solid" draw:fill-color="#959595"/>
    </style:style>
    <style:style style:name="P179" style:family="paragraph">
      <loext:graphic-properties draw:fill="solid" draw:fill-color="#949494"/>
    </style:style>
    <style:style style:name="P180" style:family="paragraph">
      <loext:graphic-properties draw:fill="solid" draw:fill-color="#939393"/>
    </style:style>
    <style:style style:name="P181" style:family="paragraph">
      <loext:graphic-properties draw:fill="solid" draw:fill-color="#929292"/>
    </style:style>
    <style:style style:name="P182" style:family="paragraph">
      <loext:graphic-properties draw:fill="none"/>
      <style:text-properties fo:font-size="9pt" style:font-size-asian="9pt" style:font-size-complex="9pt"/>
    </style:style>
    <style:style style:name="P183" style:family="paragraph">
      <style:paragraph-properties fo:text-align="start" style:writing-mode="lr-tb"/>
      <style:text-properties fo:font-size="15.8000001907349pt"/>
    </style:style>
    <style:style style:name="P184" style:family="paragraph">
      <loext:graphic-properties draw:fill="none"/>
      <style:paragraph-properties fo:text-align="start"/>
      <style:text-properties fo:font-size="15.8000001907349pt" style:font-size-asian="15.8000001907349pt" style:font-size-complex="15.8000001907349pt"/>
    </style:style>
    <style:style style:name="P185" style:family="paragraph">
      <loext:graphic-properties draw:fill="solid" draw:fill-color="#4472c4"/>
    </style:style>
    <style:style style:name="P18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imesNewRoman" fo:font-size="15.8000001907349pt" fo:font-weight="normal" style:font-name-asian="TimesNewRoman" style:font-size-asian="15.8000001907349pt" style:font-weight-asian="normal" style:font-name-complex="TimesNewRoman" style:font-size-complex="15.8000001907349pt" style:font-weight-complex="normal"/>
    </style:style>
    <style:style style:name="T2" style:family="text">
      <style:text-properties fo:color="#000000" loext:opacity="100%" style:font-name="Times New Roman" fo:font-size="15.8000001907349pt" fo:font-weight="normal" style:font-name-asian="Times New Roman" style:font-size-asian="15.8000001907349pt" style:font-weight-asian="normal" style:font-name-complex="Times New Roman" style:font-size-complex="15.8000001907349pt" style:font-weight-complex="normal"/>
    </style:style>
    <style:style style:name="T3" style:family="text">
      <style:text-properties fo:color="#000000" loext:opacity="100%" style:font-name="TimesNewRoman" fo:font-size="15.8000001907349pt" fo:font-weight="bold" style:font-name-asian="TimesNewRoman" style:font-size-asian="15.8000001907349pt" style:font-weight-asian="bold" style:font-name-complex="TimesNewRoman" style:font-size-complex="15.8000001907349pt" style:font-weight-complex="bold"/>
    </style:style>
    <style:style style:name="T4" style:family="text">
      <style:text-properties fo:color="#595959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5" style:family="text">
      <style:text-properties fo:color="#595959" loext:opacity="100%" style:font-name="Calibri" fo:font-size="15.8000001907349pt" fo:font-weight="bold" style:font-name-asian="Calibri" style:font-size-asian="15.8000001907349pt" style:font-weight-asian="bold" style:font-name-complex="Calibri" style:font-size-complex="15.8000001907349pt" style:font-weight-complex="bold"/>
    </style:style>
    <style:style style:name="T6" style:family="text">
      <style:text-properties fo:color="#595959" loext:opacity="100%" style:font-name="Calibri" fo:font-size="15.8000001907349pt" fo:font-weight="normal" style:font-name-asian="Calibri" style:font-size-asian="15.8000001907349pt" style:font-weight-asian="normal" style:font-name-complex="Calibri" style:font-size-complex="15.8000001907349pt" style:font-weight-complex="normal"/>
    </style:style>
    <style:style style:name="T7" style:family="text">
      <style:text-properties fo:color="#000000" loext:opacity="100%" fo:font-size="15.8000001907349pt" style:font-size-asian="15.8000001907349pt" style:font-size-complex="15.8000001907349pt"/>
    </style:style>
    <style:style style:name="T8" style:family="text">
      <style:text-properties fo:color="#000000" loext:opacity="100%" style:font-name="TimesNewRoman" fo:font-size="15.8000001907349pt" fo:font-style="italic" fo:font-weight="normal" style:font-name-asian="TimesNewRoman" style:font-size-asian="15.8000001907349pt" style:font-style-asian="italic" style:font-weight-asian="normal" style:font-name-complex="TimesNewRoman" style:font-size-complex="15.8000001907349pt" style:font-style-complex="italic" style:font-weight-complex="normal"/>
    </style:style>
    <style:style style:name="T9" style:family="text">
      <style:text-properties fo:color="#000000" loext:opacity="100%" style:font-name="Times New Roman" fo:font-size="15.8000001907349pt" fo:font-style="italic" fo:font-weight="normal" style:font-name-asian="Times New Roman" style:font-size-asian="15.8000001907349pt" style:font-style-asian="italic" style:font-weight-asian="normal" style:font-name-complex="Times New Roman" style:font-size-complex="15.8000001907349pt" style:font-style-complex="italic" style:font-weight-complex="normal"/>
    </style:style>
    <style:style style:name="T10" style:family="text">
      <style:text-properties fo:color="#595959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266cm" svg:height="0.624cm" svg:x="8.654cm" svg:y="2.017cm">
          <draw:text-box>
            <text:p text:style-name="P1"><text:span text:style-name="T1">Т</text:span><text:span text:style-name="T1">е</text:span><text:span text:style-name="T1">о</text:span><text:span text:style-name="T1">р</text:span><text:span text:style-name="T1">и</text:span><text:span text:style-name="T1">я</text:span><text:span text:style-name="T1"> </text:span><text:span text:style-name="T1">п</text:span><text:span text:style-name="T1">а</text:span><text:span text:style-name="T1">р</text:span><text:span text:style-name="T1">а</text:span><text:span text:style-name="T1">л</text:span><text:span text:style-name="T1">л</text:span><text:span text:style-name="T1">е</text:span><text:span text:style-name="T1">л</text:span><text:span text:style-name="T1">и</text:span><text:span text:style-name="T1">з</text:span><text:span text:style-name="T1">м</text:span><text:span text:style-name="T1">а</text:span><text:span text:style-name="T1"> </text:span></text:p>
          </draw:text-box>
        </draw:frame>
        <draw:frame draw:style-name="gr1" draw:text-style-name="P2" draw:layer="layout" svg:width="0.558cm" svg:height="0.624cm" svg:x="11.246cm" svg:y="3.0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1.246cm" svg:y="3.9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1.246cm" svg:y="4.9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1.246cm" svg:y="5.9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1.246cm" svg:y="6.9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1.246cm" svg:y="7.92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563cm" svg:height="0.624cm" svg:x="10.535cm" svg:y="8.904cm">
          <draw:text-box>
            <text:p text:style-name="P1"><text:span text:style-name="T1">Отчет </text:span></text:p>
          </draw:text-box>
        </draw:frame>
        <draw:frame draw:style-name="gr1" draw:text-style-name="P2" draw:layer="layout" svg:width="0.558cm" svg:height="0.624cm" svg:x="11.246cm" svg:y="9.8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67cm" svg:height="0.624cm" svg:x="10.077cm" svg:y="10.874cm">
          <draw:text-box>
            <text:p text:style-name="P1"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е</text:span><text:span text:style-name="T1"> </text:span><text:span text:style-name="T1">6</text:span><text:span text:style-name="T1"> </text:span></text:p>
          </draw:text-box>
        </draw:frame>
        <draw:frame draw:style-name="gr1" draw:text-style-name="P2" draw:layer="layout" svg:width="0.558cm" svg:height="0.624cm" svg:x="2.999cm" svg:y="11.8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2.8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3.82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4.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5.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6.7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7.7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8.7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9.7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20.7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21.6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22.66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205cm" svg:height="0.624cm" svg:x="2.999cm" svg:y="23.656cm">
          <draw:text-box>
            <text:p text:style-name="P1"><text:span text:style-name="T1">Выпол</text:span><text:span text:style-name="T1">нила </text:span><text:span text:style-name="T1">Жильц</text:span><text:span text:style-name="T1">ова </text:span><text:span text:style-name="T1">М.П., </text:span><text:span text:style-name="T1">24943 </text:span><text:span text:style-name="T1">группа </text:span></text:p>
          </draw:text-box>
        </draw:frame>
        <draw:frame draw:style-name="gr1" draw:text-style-name="P2" draw:layer="layout" svg:width="0.558cm" svg:height="0.624cm" svg:x="11.246cm" svg:y="24.6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1.246cm" svg:y="25.6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886cm" svg:height="0.624cm" svg:x="9.861cm" svg:y="26.603cm">
          <draw:text-box>
            <text:p text:style-name="P1"><text:span text:style-name="T2">18</text:span><text:span text:style-name="T1">.05.202</text:span><text:span text:style-name="T1">6г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296cm" svg:height="0.624cm" svg:x="8.616cm" svg:y="2.017cm">
          <draw:text-box>
            <text:p text:style-name="P1"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е</text:span><text:span text:style-name="T3">н</text:span><text:span text:style-name="T3">и</text:span><text:span text:style-name="T3">е</text:span><text:span text:style-name="T3"> </text:span><text:span text:style-name="T3">н</text:span><text:span text:style-name="T3">а</text:span><text:span text:style-name="T3"> </text:span><text:span text:style-name="T2">C</text:span><text:span text:style-name="T2">P</text:span><text:span text:style-name="T2">U</text:span><text:span text:style-name="T2"> </text:span></text:p>
          </draw:text-box>
        </draw:frame>
        <draw:frame draw:style-name="gr1" draw:text-style-name="P2" draw:layer="layout" svg:width="0.558cm" svg:height="0.624cm" svg:x="11.246cm" svg:y="3.0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183cm" svg:height="0.624cm" svg:x="9.709cm" svg:y="3.987cm">
          <draw:text-box>
            <text:p text:style-name="P1"><text:span text:style-name="T2">CPU-</text:span><text:span text:style-name="T2">onecore </text:span></text:p>
          </draw:text-box>
        </draw:frame>
        <draw:frame draw:style-name="gr1" draw:text-style-name="P2" draw:layer="layout" svg:width="0.558cm" svg:height="0.624cm" svg:x="11.246cm" svg:y="4.9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253cm" svg:height="0.624cm" svg:x="3.495cm" svg:y="5.969cm">
          <draw:text-box>
            <text:p text:style-name="P1"><text:span text:style-name="T1">Размер </text:span><text:span text:style-name="T1">сетки </text:span></text:p>
          </draw:text-box>
        </draw:frame>
        <draw:frame draw:style-name="gr1" draw:text-style-name="P2" draw:layer="layout" svg:width="1.652cm" svg:height="0.624cm" svg:x="8.425cm" svg:y="5.969cm">
          <draw:text-box>
            <text:p text:style-name="P1"><text:span text:style-name="T1">Время </text:span></text:p>
          </draw:text-box>
        </draw:frame>
        <draw:frame draw:style-name="gr1" draw:text-style-name="P2" draw:layer="layout" svg:width="3.04cm" svg:height="0.624cm" svg:x="7.714cm" svg:y="6.618cm">
          <draw:text-box>
            <text:p text:style-name="P1"><text:span text:style-name="T1">выполнения </text:span></text:p>
          </draw:text-box>
        </draw:frame>
        <draw:frame draw:style-name="gr1" draw:text-style-name="P2" draw:layer="layout" svg:width="2.369cm" svg:height="0.624cm" svg:x="12.187cm" svg:y="5.969cm">
          <draw:text-box>
            <text:p text:style-name="P1"><text:span text:style-name="T1">Точность </text:span></text:p>
          </draw:text-box>
        </draw:frame>
        <draw:frame draw:style-name="gr1" draw:text-style-name="P2" draw:layer="layout" svg:width="2.936cm" svg:height="0.624cm" svg:x="16.037cm" svg:y="5.969cm">
          <draw:text-box>
            <text:p text:style-name="P1"><text:span text:style-name="T1">Количество </text:span></text:p>
          </draw:text-box>
        </draw:frame>
        <draw:polygon draw:style-name="gr2" draw:text-style-name="P3" draw:layer="layout" svg:width="0.013cm" svg:height="0.014cm" svg:x="2.998cm" svg:y="5.933cm" svg:viewBox="0 0 14 15" draw:points="0,0 14,0 14,15 0,15">
          <text:p/>
        </draw:polygon>
        <draw:polygon draw:style-name="gr2" draw:text-style-name="P3" draw:layer="layout" svg:width="0.013cm" svg:height="0.014cm" svg:x="2.998cm" svg:y="5.933cm" svg:viewBox="0 0 14 15" draw:points="0,0 14,0 14,15 0,15">
          <text:p/>
        </draw:polygon>
        <draw:polygon draw:style-name="gr2" draw:text-style-name="P3" draw:layer="layout" svg:width="4.105cm" svg:height="0.014cm" svg:x="3.011cm" svg:y="5.933cm" svg:viewBox="0 0 4106 15" draw:points="0,0 4106,0 4106,15 0,15">
          <text:p/>
        </draw:polygon>
        <draw:polygon draw:style-name="gr2" draw:text-style-name="P3" draw:layer="layout" svg:width="0.012cm" svg:height="0.014cm" svg:x="7.116cm" svg:y="5.933cm" svg:viewBox="0 0 13 15" draw:points="0,0 13,0 13,15 0,15">
          <text:p/>
        </draw:polygon>
        <draw:polygon draw:style-name="gr2" draw:text-style-name="P3" draw:layer="layout" svg:width="4.118cm" svg:height="0.014cm" svg:x="7.128cm" svg:y="5.933cm" svg:viewBox="0 0 4119 15" draw:points="0,0 4119,0 4119,15 0,15">
          <text:p/>
        </draw:polygon>
        <draw:polygon draw:style-name="gr2" draw:text-style-name="P3" draw:layer="layout" svg:width="0.012cm" svg:height="0.014cm" svg:x="11.246cm" svg:y="5.933cm" svg:viewBox="0 0 13 15" draw:points="0,0 13,0 13,15 0,15">
          <text:p/>
        </draw:polygon>
        <draw:polygon draw:style-name="gr2" draw:text-style-name="P3" draw:layer="layout" svg:width="4.105cm" svg:height="0.014cm" svg:x="11.258cm" svg:y="5.933cm" svg:viewBox="0 0 4106 15" draw:points="0,0 4106,0 4106,15 0,15">
          <text:p/>
        </draw:polygon>
        <draw:polygon draw:style-name="gr2" draw:text-style-name="P3" draw:layer="layout" svg:width="0.013cm" svg:height="0.014cm" svg:x="15.363cm" svg:y="5.933cm" svg:viewBox="0 0 14 15" draw:points="0,0 14,0 14,15 0,15">
          <text:p/>
        </draw:polygon>
        <draw:polygon draw:style-name="gr2" draw:text-style-name="P3" draw:layer="layout" svg:width="4.117cm" svg:height="0.014cm" svg:x="15.376cm" svg:y="5.933cm" svg:viewBox="0 0 4118 15" draw:points="0,0 4118,0 4118,15 0,15">
          <text:p/>
        </draw:polygon>
        <draw:polygon draw:style-name="gr2" draw:text-style-name="P3" draw:layer="layout" svg:width="0.014cm" svg:height="0.014cm" svg:x="19.493cm" svg:y="5.933cm" svg:viewBox="0 0 15 15" draw:points="0,0 15,0 15,15 0,15">
          <text:p/>
        </draw:polygon>
        <draw:polygon draw:style-name="gr2" draw:text-style-name="P3" draw:layer="layout" svg:width="0.014cm" svg:height="0.014cm" svg:x="19.493cm" svg:y="5.933cm" svg:viewBox="0 0 15 15" draw:points="0,0 15,0 15,15 0,15">
          <text:p/>
        </draw:polygon>
        <draw:polygon draw:style-name="gr2" draw:text-style-name="P3" draw:layer="layout" svg:width="0.013cm" svg:height="1.309cm" svg:x="2.998cm" svg:y="5.946cm" svg:viewBox="0 0 14 1310" draw:points="0,0 14,0 14,1310 0,1310">
          <text:p/>
        </draw:polygon>
        <draw:polygon draw:style-name="gr2" draw:text-style-name="P3" draw:layer="layout" svg:width="0.012cm" svg:height="1.309cm" svg:x="7.116cm" svg:y="5.946cm" svg:viewBox="0 0 13 1310" draw:points="0,0 13,0 13,1310 0,1310">
          <text:p/>
        </draw:polygon>
        <draw:polygon draw:style-name="gr2" draw:text-style-name="P3" draw:layer="layout" svg:width="0.012cm" svg:height="1.309cm" svg:x="11.246cm" svg:y="5.946cm" svg:viewBox="0 0 13 1310" draw:points="0,0 13,0 13,1310 0,1310">
          <text:p/>
        </draw:polygon>
        <draw:polygon draw:style-name="gr2" draw:text-style-name="P3" draw:layer="layout" svg:width="0.013cm" svg:height="1.309cm" svg:x="15.363cm" svg:y="5.946cm" svg:viewBox="0 0 14 1310" draw:points="0,0 14,0 14,1310 0,1310">
          <text:p/>
        </draw:polygon>
        <draw:polygon draw:style-name="gr2" draw:text-style-name="P3" draw:layer="layout" svg:width="0.014cm" svg:height="1.309cm" svg:x="19.493cm" svg:y="5.946cm" svg:viewBox="0 0 15 1310" draw:points="0,0 15,0 15,1310 0,1310">
          <text:p/>
        </draw:polygon>
        <draw:frame draw:style-name="gr1" draw:text-style-name="P2" draw:layer="layout" svg:width="2.358cm" svg:height="0.624cm" svg:x="16.317cm" svg:y="6.618cm">
          <draw:text-box>
            <text:p text:style-name="P1"><text:span text:style-name="T1">итераций </text:span></text:p>
          </draw:text-box>
        </draw:frame>
        <draw:frame draw:style-name="gr1" draw:text-style-name="P2" draw:layer="layout" svg:width="2.098cm" svg:height="0.624cm" svg:x="4.079cm" svg:y="7.291cm">
          <draw:text-box>
            <text:p text:style-name="P1"><text:span text:style-name="T2">128x128 </text:span></text:p>
          </draw:text-box>
        </draw:frame>
        <draw:frame draw:style-name="gr1" draw:text-style-name="P2" draw:layer="layout" svg:width="2.237cm" svg:height="0.624cm" svg:x="8.12cm" svg:y="7.291cm">
          <draw:text-box>
            <text:p text:style-name="P1"><text:span text:style-name="T2">0</text:span><text:span text:style-name="T2">.</text:span><text:span text:style-name="T2">8</text:span><text:span text:style-name="T2">2</text:span><text:span text:style-name="T2">8</text:span><text:span text:style-name="T2">3</text:span><text:span text:style-name="T2">1</text:span><text:span text:style-name="T2">1</text:span><text:span text:style-name="T2"> </text:span></text:p>
          </draw:text-box>
        </draw:frame>
        <draw:frame draw:style-name="gr1" draw:text-style-name="P2" draw:layer="layout" svg:width="2.951cm" svg:height="0.624cm" svg:x="11.895cm" svg:y="7.291cm">
          <draw:text-box>
            <text:p text:style-name="P1"><text:span text:style-name="T2">7</text:span><text:span text:style-name="T2">.</text:span><text:span text:style-name="T2">5</text:span><text:span text:style-name="T2">3</text:span><text:span text:style-name="T2">0</text:span><text:span text:style-name="T2">1</text:span><text:span text:style-name="T2">4</text:span><text:span text:style-name="T2">e</text:span><text:span text:style-name="T2">-</text:span><text:span text:style-name="T2">0</text:span><text:span text:style-name="T2">7</text:span><text:span text:style-name="T2"> </text:span></text:p>
          </draw:text-box>
        </draw:frame>
        <draw:polygon draw:style-name="gr2" draw:text-style-name="P3" draw:layer="layout" svg:width="0.013cm" svg:height="0.012cm" svg:x="2.998cm" svg:y="7.255cm" svg:viewBox="0 0 14 13" draw:points="0,0 14,0 14,13 0,13">
          <text:p/>
        </draw:polygon>
        <draw:polygon draw:style-name="gr2" draw:text-style-name="P3" draw:layer="layout" svg:width="4.105cm" svg:height="0.012cm" svg:x="3.011cm" svg:y="7.255cm" svg:viewBox="0 0 4106 13" draw:points="0,0 4106,0 4106,13 0,13">
          <text:p/>
        </draw:polygon>
        <draw:polygon draw:style-name="gr2" draw:text-style-name="P3" draw:layer="layout" svg:width="0.012cm" svg:height="0.012cm" svg:x="7.116cm" svg:y="7.255cm" svg:viewBox="0 0 13 13" draw:points="0,0 13,0 13,13 0,13">
          <text:p/>
        </draw:polygon>
        <draw:polygon draw:style-name="gr2" draw:text-style-name="P3" draw:layer="layout" svg:width="4.118cm" svg:height="0.012cm" svg:x="7.128cm" svg:y="7.255cm" svg:viewBox="0 0 4119 13" draw:points="0,0 4119,0 4119,13 0,13">
          <text:p/>
        </draw:polygon>
        <draw:polygon draw:style-name="gr2" draw:text-style-name="P3" draw:layer="layout" svg:width="0.012cm" svg:height="0.012cm" svg:x="11.246cm" svg:y="7.255cm" svg:viewBox="0 0 13 13" draw:points="0,0 13,0 13,13 0,13">
          <text:p/>
        </draw:polygon>
        <draw:polygon draw:style-name="gr2" draw:text-style-name="P3" draw:layer="layout" svg:width="4.105cm" svg:height="0.012cm" svg:x="11.258cm" svg:y="7.255cm" svg:viewBox="0 0 4106 13" draw:points="0,0 4106,0 4106,13 0,13">
          <text:p/>
        </draw:polygon>
        <draw:polygon draw:style-name="gr2" draw:text-style-name="P3" draw:layer="layout" svg:width="0.013cm" svg:height="0.012cm" svg:x="15.363cm" svg:y="7.255cm" svg:viewBox="0 0 14 13" draw:points="0,0 14,0 14,13 0,13">
          <text:p/>
        </draw:polygon>
        <draw:polygon draw:style-name="gr2" draw:text-style-name="P3" draw:layer="layout" svg:width="4.117cm" svg:height="0.012cm" svg:x="15.376cm" svg:y="7.255cm" svg:viewBox="0 0 4118 13" draw:points="0,0 4118,0 4118,13 0,13">
          <text:p/>
        </draw:polygon>
        <draw:polygon draw:style-name="gr2" draw:text-style-name="P3" draw:layer="layout" svg:width="0.014cm" svg:height="0.012cm" svg:x="19.493cm" svg:y="7.255cm" svg:viewBox="0 0 15 13" draw:points="0,0 15,0 15,13 0,13">
          <text:p/>
        </draw:polygon>
        <draw:polygon draw:style-name="gr2" draw:text-style-name="P3" draw:layer="layout" svg:width="0.013cm" svg:height="0.648cm" svg:x="2.998cm" svg:y="7.267cm" svg:viewBox="0 0 14 649" draw:points="0,0 14,0 14,649 0,649">
          <text:p/>
        </draw:polygon>
        <draw:polygon draw:style-name="gr2" draw:text-style-name="P3" draw:layer="layout" svg:width="0.012cm" svg:height="0.648cm" svg:x="7.116cm" svg:y="7.267cm" svg:viewBox="0 0 13 649" draw:points="0,0 13,0 13,649 0,649">
          <text:p/>
        </draw:polygon>
        <draw:polygon draw:style-name="gr2" draw:text-style-name="P3" draw:layer="layout" svg:width="0.012cm" svg:height="0.648cm" svg:x="11.246cm" svg:y="7.267cm" svg:viewBox="0 0 13 649" draw:points="0,0 13,0 13,649 0,649">
          <text:p/>
        </draw:polygon>
        <draw:polygon draw:style-name="gr2" draw:text-style-name="P3" draw:layer="layout" svg:width="0.013cm" svg:height="0.648cm" svg:x="15.363cm" svg:y="7.267cm" svg:viewBox="0 0 14 649" draw:points="0,0 14,0 14,649 0,649">
          <text:p/>
        </draw:polygon>
        <draw:polygon draw:style-name="gr2" draw:text-style-name="P3" draw:layer="layout" svg:width="0.014cm" svg:height="0.648cm" svg:x="19.493cm" svg:y="7.267cm" svg:viewBox="0 0 15 649" draw:points="0,0 15,0 15,649 0,649">
          <text:p/>
        </draw:polygon>
        <draw:frame draw:style-name="gr1" draw:text-style-name="P2" draw:layer="layout" svg:width="2.377cm" svg:height="0.624cm" svg:x="16.304cm" svg:y="7.291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2.098cm" svg:height="0.624cm" svg:x="4.079cm" svg:y="7.951cm">
          <draw:text-box>
            <text:p text:style-name="P1"><text:span text:style-name="T2">256x256 </text:span></text:p>
          </draw:text-box>
        </draw:frame>
        <draw:frame draw:style-name="gr1" draw:text-style-name="P2" draw:layer="layout" svg:width="1.958cm" svg:height="0.624cm" svg:x="8.273cm" svg:y="7.951cm">
          <draw:text-box>
            <text:p text:style-name="P1"><text:span text:style-name="T2">11.0707 </text:span></text:p>
          </draw:text-box>
        </draw:frame>
        <draw:frame draw:style-name="gr1" draw:text-style-name="P2" draw:layer="layout" svg:width="2.951cm" svg:height="0.624cm" svg:x="11.895cm" svg:y="7.951cm">
          <draw:text-box>
            <text:p text:style-name="P1"><text:span text:style-name="T2">9.91166e-07 </text:span></text:p>
          </draw:text-box>
        </draw:frame>
        <draw:polygon draw:style-name="gr2" draw:text-style-name="P3" draw:layer="layout" svg:width="0.013cm" svg:height="0.013cm" svg:x="2.998cm" svg:y="7.915cm" svg:viewBox="0 0 14 14" draw:points="0,0 14,0 14,14 0,14">
          <text:p/>
        </draw:polygon>
        <draw:polygon draw:style-name="gr2" draw:text-style-name="P3" draw:layer="layout" svg:width="4.105cm" svg:height="0.013cm" svg:x="3.011cm" svg:y="7.915cm" svg:viewBox="0 0 4106 14" draw:points="0,0 4106,0 4106,14 0,14">
          <text:p/>
        </draw:polygon>
        <draw:polygon draw:style-name="gr2" draw:text-style-name="P3" draw:layer="layout" svg:width="0.012cm" svg:height="0.013cm" svg:x="7.116cm" svg:y="7.915cm" svg:viewBox="0 0 13 14" draw:points="0,0 13,0 13,14 0,14">
          <text:p/>
        </draw:polygon>
        <draw:polygon draw:style-name="gr2" draw:text-style-name="P3" draw:layer="layout" svg:width="4.118cm" svg:height="0.013cm" svg:x="7.128cm" svg:y="7.915cm" svg:viewBox="0 0 4119 14" draw:points="0,0 4119,0 4119,14 0,14">
          <text:p/>
        </draw:polygon>
        <draw:polygon draw:style-name="gr2" draw:text-style-name="P3" draw:layer="layout" svg:width="0.012cm" svg:height="0.013cm" svg:x="11.246cm" svg:y="7.915cm" svg:viewBox="0 0 13 14" draw:points="0,0 13,0 13,14 0,14">
          <text:p/>
        </draw:polygon>
        <draw:polygon draw:style-name="gr2" draw:text-style-name="P3" draw:layer="layout" svg:width="4.105cm" svg:height="0.013cm" svg:x="11.258cm" svg:y="7.915cm" svg:viewBox="0 0 4106 14" draw:points="0,0 4106,0 4106,14 0,14">
          <text:p/>
        </draw:polygon>
        <draw:polygon draw:style-name="gr2" draw:text-style-name="P3" draw:layer="layout" svg:width="0.013cm" svg:height="0.013cm" svg:x="15.363cm" svg:y="7.915cm" svg:viewBox="0 0 14 14" draw:points="0,0 14,0 14,14 0,14">
          <text:p/>
        </draw:polygon>
        <draw:polygon draw:style-name="gr2" draw:text-style-name="P3" draw:layer="layout" svg:width="4.117cm" svg:height="0.013cm" svg:x="15.376cm" svg:y="7.915cm" svg:viewBox="0 0 4118 14" draw:points="0,0 4118,0 4118,14 0,14">
          <text:p/>
        </draw:polygon>
        <draw:polygon draw:style-name="gr2" draw:text-style-name="P3" draw:layer="layout" svg:width="0.014cm" svg:height="0.013cm" svg:x="19.493cm" svg:y="7.915cm" svg:viewBox="0 0 15 14" draw:points="0,0 15,0 15,14 0,14">
          <text:p/>
        </draw:polygon>
        <draw:polygon draw:style-name="gr2" draw:text-style-name="P3" draw:layer="layout" svg:width="0.013cm" svg:height="0.66cm" svg:x="2.998cm" svg:y="7.928cm" svg:viewBox="0 0 14 661" draw:points="0,0 14,0 14,661 0,661">
          <text:p/>
        </draw:polygon>
        <draw:polygon draw:style-name="gr2" draw:text-style-name="P3" draw:layer="layout" svg:width="0.012cm" svg:height="0.66cm" svg:x="7.116cm" svg:y="7.928cm" svg:viewBox="0 0 13 661" draw:points="0,0 13,0 13,661 0,661">
          <text:p/>
        </draw:polygon>
        <draw:polygon draw:style-name="gr2" draw:text-style-name="P3" draw:layer="layout" svg:width="0.012cm" svg:height="0.66cm" svg:x="11.246cm" svg:y="7.928cm" svg:viewBox="0 0 13 661" draw:points="0,0 13,0 13,661 0,661">
          <text:p/>
        </draw:polygon>
        <draw:polygon draw:style-name="gr2" draw:text-style-name="P3" draw:layer="layout" svg:width="0.013cm" svg:height="0.66cm" svg:x="15.363cm" svg:y="7.928cm" svg:viewBox="0 0 14 661" draw:points="0,0 14,0 14,661 0,661">
          <text:p/>
        </draw:polygon>
        <draw:polygon draw:style-name="gr2" draw:text-style-name="P3" draw:layer="layout" svg:width="0.014cm" svg:height="0.66cm" svg:x="19.493cm" svg:y="7.928cm" svg:viewBox="0 0 15 661" draw:points="0,0 15,0 15,661 0,661">
          <text:p/>
        </draw:polygon>
        <draw:frame draw:style-name="gr1" draw:text-style-name="P2" draw:layer="layout" svg:width="2.377cm" svg:height="0.624cm" svg:x="16.304cm" svg:y="7.951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2.098cm" svg:height="0.624cm" svg:x="4.079cm" svg:y="8.625cm">
          <draw:text-box>
            <text:p text:style-name="P1"><text:span text:style-name="T2">512x512 </text:span></text:p>
          </draw:text-box>
        </draw:frame>
        <draw:frame draw:style-name="gr1" draw:text-style-name="P2" draw:layer="layout" svg:width="1.958cm" svg:height="0.624cm" svg:x="8.273cm" svg:y="8.625cm">
          <draw:text-box>
            <text:p text:style-name="P1"><text:span text:style-name="T2">151.382 </text:span></text:p>
          </draw:text-box>
        </draw:frame>
        <draw:frame draw:style-name="gr1" draw:text-style-name="P2" draw:layer="layout" svg:width="2.951cm" svg:height="0.624cm" svg:x="11.895cm" svg:y="8.625cm">
          <draw:text-box>
            <text:p text:style-name="P1"><text:span text:style-name="T2">9.92416e-07 </text:span></text:p>
          </draw:text-box>
        </draw:frame>
        <draw:polygon draw:style-name="gr2" draw:text-style-name="P3" draw:layer="layout" svg:width="0.013cm" svg:height="0.013cm" svg:x="2.998cm" svg:y="8.588cm" svg:viewBox="0 0 14 14" draw:points="0,0 14,0 14,14 0,14">
          <text:p/>
        </draw:polygon>
        <draw:polygon draw:style-name="gr2" draw:text-style-name="P3" draw:layer="layout" svg:width="4.105cm" svg:height="0.013cm" svg:x="3.011cm" svg:y="8.588cm" svg:viewBox="0 0 4106 14" draw:points="0,0 4106,0 4106,14 0,14">
          <text:p/>
        </draw:polygon>
        <draw:polygon draw:style-name="gr2" draw:text-style-name="P3" draw:layer="layout" svg:width="0.012cm" svg:height="0.013cm" svg:x="7.116cm" svg:y="8.588cm" svg:viewBox="0 0 13 14" draw:points="0,0 13,0 13,14 0,14">
          <text:p/>
        </draw:polygon>
        <draw:polygon draw:style-name="gr2" draw:text-style-name="P3" draw:layer="layout" svg:width="4.118cm" svg:height="0.013cm" svg:x="7.128cm" svg:y="8.588cm" svg:viewBox="0 0 4119 14" draw:points="0,0 4119,0 4119,14 0,14">
          <text:p/>
        </draw:polygon>
        <draw:polygon draw:style-name="gr2" draw:text-style-name="P3" draw:layer="layout" svg:width="0.012cm" svg:height="0.013cm" svg:x="11.246cm" svg:y="8.588cm" svg:viewBox="0 0 13 14" draw:points="0,0 13,0 13,14 0,14">
          <text:p/>
        </draw:polygon>
        <draw:polygon draw:style-name="gr2" draw:text-style-name="P3" draw:layer="layout" svg:width="4.105cm" svg:height="0.013cm" svg:x="11.258cm" svg:y="8.588cm" svg:viewBox="0 0 4106 14" draw:points="0,0 4106,0 4106,14 0,14">
          <text:p/>
        </draw:polygon>
        <draw:polygon draw:style-name="gr2" draw:text-style-name="P3" draw:layer="layout" svg:width="0.013cm" svg:height="0.013cm" svg:x="15.363cm" svg:y="8.588cm" svg:viewBox="0 0 14 14" draw:points="0,0 14,0 14,14 0,14">
          <text:p/>
        </draw:polygon>
        <draw:polygon draw:style-name="gr2" draw:text-style-name="P3" draw:layer="layout" svg:width="4.117cm" svg:height="0.013cm" svg:x="15.376cm" svg:y="8.588cm" svg:viewBox="0 0 4118 14" draw:points="0,0 4118,0 4118,14 0,14">
          <text:p/>
        </draw:polygon>
        <draw:polygon draw:style-name="gr2" draw:text-style-name="P3" draw:layer="layout" svg:width="0.014cm" svg:height="0.013cm" svg:x="19.493cm" svg:y="8.588cm" svg:viewBox="0 0 15 14" draw:points="0,0 15,0 15,14 0,14">
          <text:p/>
        </draw:polygon>
        <draw:polygon draw:style-name="gr2" draw:text-style-name="P3" draw:layer="layout" svg:width="0.013cm" svg:height="0.648cm" svg:x="2.998cm" svg:y="8.601cm" svg:viewBox="0 0 14 649" draw:points="0,0 14,0 14,649 0,649">
          <text:p/>
        </draw:polygon>
        <draw:polygon draw:style-name="gr2" draw:text-style-name="P3" draw:layer="layout" svg:width="0.013cm" svg:height="0.013cm" svg:x="2.998cm" svg:y="9.249cm" svg:viewBox="0 0 14 14" draw:points="0,0 14,0 14,14 0,14">
          <text:p/>
        </draw:polygon>
        <draw:polygon draw:style-name="gr2" draw:text-style-name="P3" draw:layer="layout" svg:width="0.013cm" svg:height="0.013cm" svg:x="2.998cm" svg:y="9.249cm" svg:viewBox="0 0 14 14" draw:points="0,0 14,0 14,14 0,14">
          <text:p/>
        </draw:polygon>
        <draw:polygon draw:style-name="gr2" draw:text-style-name="P3" draw:layer="layout" svg:width="4.105cm" svg:height="0.013cm" svg:x="3.011cm" svg:y="9.249cm" svg:viewBox="0 0 4106 14" draw:points="0,0 4106,0 4106,14 0,14">
          <text:p/>
        </draw:polygon>
        <draw:polygon draw:style-name="gr2" draw:text-style-name="P3" draw:layer="layout" svg:width="0.012cm" svg:height="0.648cm" svg:x="7.116cm" svg:y="8.601cm" svg:viewBox="0 0 13 649" draw:points="0,0 13,0 13,649 0,649">
          <text:p/>
        </draw:polygon>
        <draw:polygon draw:style-name="gr2" draw:text-style-name="P3" draw:layer="layout" svg:width="0.012cm" svg:height="0.013cm" svg:x="7.116cm" svg:y="9.249cm" svg:viewBox="0 0 13 14" draw:points="0,0 13,0 13,14 0,14">
          <text:p/>
        </draw:polygon>
        <draw:polygon draw:style-name="gr2" draw:text-style-name="P3" draw:layer="layout" svg:width="4.118cm" svg:height="0.013cm" svg:x="7.128cm" svg:y="9.249cm" svg:viewBox="0 0 4119 14" draw:points="0,0 4119,0 4119,14 0,14">
          <text:p/>
        </draw:polygon>
        <draw:polygon draw:style-name="gr2" draw:text-style-name="P3" draw:layer="layout" svg:width="0.012cm" svg:height="0.648cm" svg:x="11.246cm" svg:y="8.601cm" svg:viewBox="0 0 13 649" draw:points="0,0 13,0 13,649 0,649">
          <text:p/>
        </draw:polygon>
        <draw:polygon draw:style-name="gr2" draw:text-style-name="P3" draw:layer="layout" svg:width="0.012cm" svg:height="0.013cm" svg:x="11.246cm" svg:y="9.249cm" svg:viewBox="0 0 13 14" draw:points="0,0 13,0 13,14 0,14">
          <text:p/>
        </draw:polygon>
        <draw:polygon draw:style-name="gr2" draw:text-style-name="P3" draw:layer="layout" svg:width="4.105cm" svg:height="0.013cm" svg:x="11.258cm" svg:y="9.249cm" svg:viewBox="0 0 4106 14" draw:points="0,0 4106,0 4106,14 0,14">
          <text:p/>
        </draw:polygon>
        <draw:polygon draw:style-name="gr2" draw:text-style-name="P3" draw:layer="layout" svg:width="0.013cm" svg:height="0.648cm" svg:x="15.363cm" svg:y="8.601cm" svg:viewBox="0 0 14 649" draw:points="0,0 14,0 14,649 0,649">
          <text:p/>
        </draw:polygon>
        <draw:polygon draw:style-name="gr2" draw:text-style-name="P3" draw:layer="layout" svg:width="0.013cm" svg:height="0.013cm" svg:x="15.363cm" svg:y="9.249cm" svg:viewBox="0 0 14 14" draw:points="0,0 14,0 14,14 0,14">
          <text:p/>
        </draw:polygon>
        <draw:polygon draw:style-name="gr2" draw:text-style-name="P3" draw:layer="layout" svg:width="4.117cm" svg:height="0.013cm" svg:x="15.376cm" svg:y="9.249cm" svg:viewBox="0 0 4118 14" draw:points="0,0 4118,0 4118,14 0,14">
          <text:p/>
        </draw:polygon>
        <draw:polygon draw:style-name="gr2" draw:text-style-name="P3" draw:layer="layout" svg:width="0.014cm" svg:height="0.648cm" svg:x="19.493cm" svg:y="8.601cm" svg:viewBox="0 0 15 649" draw:points="0,0 15,0 15,649 0,649">
          <text:p/>
        </draw:polygon>
        <draw:polygon draw:style-name="gr2" draw:text-style-name="P3" draw:layer="layout" svg:width="0.014cm" svg:height="0.013cm" svg:x="19.493cm" svg:y="9.249cm" svg:viewBox="0 0 15 14" draw:points="0,0 15,0 15,14 0,14">
          <text:p/>
        </draw:polygon>
        <draw:polygon draw:style-name="gr2" draw:text-style-name="P3" draw:layer="layout" svg:width="0.014cm" svg:height="0.013cm" svg:x="19.493cm" svg:y="9.249cm" svg:viewBox="0 0 15 14" draw:points="0,0 15,0 15,14 0,14">
          <text:p/>
        </draw:polygon>
        <draw:frame draw:style-name="gr1" draw:text-style-name="P2" draw:layer="layout" svg:width="2.377cm" svg:height="0.624cm" svg:x="16.304cm" svg:y="8.625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0.558cm" svg:height="0.624cm" svg:x="11.246cm" svg:y="9.2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556cm" svg:height="0.624cm" svg:x="9.518cm" svg:y="10.277cm">
          <draw:text-box>
            <text:p text:style-name="P1"><text:span text:style-name="T2">CPU-multicore </text:span></text:p>
          </draw:text-box>
        </draw:frame>
        <draw:frame draw:style-name="gr1" draw:text-style-name="P2" draw:layer="layout" svg:width="3.253cm" svg:height="0.624cm" svg:x="3.495cm" svg:y="11.28cm">
          <draw:text-box>
            <text:p text:style-name="P1"><text:span text:style-name="T1">Размер сетки </text:span></text:p>
          </draw:text-box>
        </draw:frame>
        <draw:frame draw:style-name="gr1" draw:text-style-name="P2" draw:layer="layout" svg:width="1.652cm" svg:height="0.624cm" svg:x="8.425cm" svg:y="11.28cm">
          <draw:text-box>
            <text:p text:style-name="P1"><text:span text:style-name="T1">Время </text:span></text:p>
          </draw:text-box>
        </draw:frame>
        <draw:frame draw:style-name="gr1" draw:text-style-name="P2" draw:layer="layout" svg:width="3.04cm" svg:height="0.624cm" svg:x="7.714cm" svg:y="11.928cm">
          <draw:text-box>
            <text:p text:style-name="P1"><text:span text:style-name="T1">выполнения </text:span></text:p>
          </draw:text-box>
        </draw:frame>
        <draw:frame draw:style-name="gr1" draw:text-style-name="P2" draw:layer="layout" svg:width="2.369cm" svg:height="0.624cm" svg:x="12.187cm" svg:y="11.28cm">
          <draw:text-box>
            <text:p text:style-name="P1"><text:span text:style-name="T1">Точность </text:span></text:p>
          </draw:text-box>
        </draw:frame>
        <draw:frame draw:style-name="gr1" draw:text-style-name="P2" draw:layer="layout" svg:width="2.936cm" svg:height="0.624cm" svg:x="16.037cm" svg:y="11.28cm">
          <draw:text-box>
            <text:p text:style-name="P1"><text:span text:style-name="T1">Количество </text:span></text:p>
          </draw:text-box>
        </draw:frame>
        <draw:polygon draw:style-name="gr2" draw:text-style-name="P3" draw:layer="layout" svg:width="0.013cm" svg:height="0.013cm" svg:x="2.998cm" svg:y="11.231cm" svg:viewBox="0 0 14 14" draw:points="0,0 14,0 14,14 0,14">
          <text:p/>
        </draw:polygon>
        <draw:polygon draw:style-name="gr2" draw:text-style-name="P3" draw:layer="layout" svg:width="0.013cm" svg:height="0.013cm" svg:x="2.998cm" svg:y="11.231cm" svg:viewBox="0 0 14 14" draw:points="0,0 14,0 14,14 0,14">
          <text:p/>
        </draw:polygon>
        <draw:polygon draw:style-name="gr2" draw:text-style-name="P3" draw:layer="layout" svg:width="4.105cm" svg:height="0.013cm" svg:x="3.011cm" svg:y="11.231cm" svg:viewBox="0 0 4106 14" draw:points="0,0 4106,0 4106,14 0,14">
          <text:p/>
        </draw:polygon>
        <draw:polygon draw:style-name="gr2" draw:text-style-name="P3" draw:layer="layout" svg:width="0.012cm" svg:height="0.013cm" svg:x="7.116cm" svg:y="11.231cm" svg:viewBox="0 0 13 14" draw:points="0,0 13,0 13,14 0,14">
          <text:p/>
        </draw:polygon>
        <draw:polygon draw:style-name="gr2" draw:text-style-name="P3" draw:layer="layout" svg:width="4.118cm" svg:height="0.013cm" svg:x="7.128cm" svg:y="11.231cm" svg:viewBox="0 0 4119 14" draw:points="0,0 4119,0 4119,14 0,14">
          <text:p/>
        </draw:polygon>
        <draw:polygon draw:style-name="gr2" draw:text-style-name="P3" draw:layer="layout" svg:width="0.012cm" svg:height="0.013cm" svg:x="11.246cm" svg:y="11.231cm" svg:viewBox="0 0 13 14" draw:points="0,0 13,0 13,14 0,14">
          <text:p/>
        </draw:polygon>
        <draw:polygon draw:style-name="gr2" draw:text-style-name="P3" draw:layer="layout" svg:width="4.105cm" svg:height="0.013cm" svg:x="11.258cm" svg:y="11.231cm" svg:viewBox="0 0 4106 14" draw:points="0,0 4106,0 4106,14 0,14">
          <text:p/>
        </draw:polygon>
        <draw:polygon draw:style-name="gr2" draw:text-style-name="P3" draw:layer="layout" svg:width="0.013cm" svg:height="0.013cm" svg:x="15.363cm" svg:y="11.231cm" svg:viewBox="0 0 14 14" draw:points="0,0 14,0 14,14 0,14">
          <text:p/>
        </draw:polygon>
        <draw:polygon draw:style-name="gr2" draw:text-style-name="P3" draw:layer="layout" svg:width="4.117cm" svg:height="0.013cm" svg:x="15.376cm" svg:y="11.231cm" svg:viewBox="0 0 4118 14" draw:points="0,0 4118,0 4118,14 0,14">
          <text:p/>
        </draw:polygon>
        <draw:polygon draw:style-name="gr2" draw:text-style-name="P3" draw:layer="layout" svg:width="0.014cm" svg:height="0.013cm" svg:x="19.493cm" svg:y="11.231cm" svg:viewBox="0 0 15 14" draw:points="0,0 15,0 15,14 0,14">
          <text:p/>
        </draw:polygon>
        <draw:polygon draw:style-name="gr2" draw:text-style-name="P3" draw:layer="layout" svg:width="0.014cm" svg:height="0.013cm" svg:x="19.493cm" svg:y="11.231cm" svg:viewBox="0 0 15 14" draw:points="0,0 15,0 15,14 0,14">
          <text:p/>
        </draw:polygon>
        <draw:polygon draw:style-name="gr2" draw:text-style-name="P3" draw:layer="layout" svg:width="0.013cm" svg:height="1.309cm" svg:x="2.998cm" svg:y="11.244cm" svg:viewBox="0 0 14 1310" draw:points="0,0 14,0 14,1310 0,1310">
          <text:p/>
        </draw:polygon>
        <draw:polygon draw:style-name="gr2" draw:text-style-name="P3" draw:layer="layout" svg:width="0.012cm" svg:height="1.309cm" svg:x="7.116cm" svg:y="11.244cm" svg:viewBox="0 0 13 1310" draw:points="0,0 13,0 13,1310 0,1310">
          <text:p/>
        </draw:polygon>
        <draw:polygon draw:style-name="gr2" draw:text-style-name="P3" draw:layer="layout" svg:width="0.012cm" svg:height="1.309cm" svg:x="11.246cm" svg:y="11.244cm" svg:viewBox="0 0 13 1310" draw:points="0,0 13,0 13,1310 0,1310">
          <text:p/>
        </draw:polygon>
        <draw:polygon draw:style-name="gr2" draw:text-style-name="P3" draw:layer="layout" svg:width="0.013cm" svg:height="1.309cm" svg:x="15.363cm" svg:y="11.244cm" svg:viewBox="0 0 14 1310" draw:points="0,0 14,0 14,1310 0,1310">
          <text:p/>
        </draw:polygon>
        <draw:polygon draw:style-name="gr2" draw:text-style-name="P3" draw:layer="layout" svg:width="0.014cm" svg:height="1.309cm" svg:x="19.493cm" svg:y="11.244cm" svg:viewBox="0 0 15 1310" draw:points="0,0 15,0 15,1310 0,1310">
          <text:p/>
        </draw:polygon>
        <draw:frame draw:style-name="gr1" draw:text-style-name="P2" draw:layer="layout" svg:width="2.358cm" svg:height="0.624cm" svg:x="16.317cm" svg:y="11.928cm">
          <draw:text-box>
            <text:p text:style-name="P1"><text:span text:style-name="T1">итераций </text:span></text:p>
          </draw:text-box>
        </draw:frame>
        <draw:frame draw:style-name="gr1" draw:text-style-name="P2" draw:layer="layout" svg:width="2.098cm" svg:height="0.624cm" svg:x="4.079cm" svg:y="12.589cm">
          <draw:text-box>
            <text:p text:style-name="P1"><text:span text:style-name="T2">128x128 </text:span></text:p>
          </draw:text-box>
        </draw:frame>
        <draw:frame draw:style-name="gr1" draw:text-style-name="P2" draw:layer="layout" svg:width="1.958cm" svg:height="0.624cm" svg:x="8.273cm" svg:y="12.589cm">
          <draw:text-box>
            <text:p text:style-name="P1"><text:span text:style-name="T2">3.38594 </text:span></text:p>
          </draw:text-box>
        </draw:frame>
        <draw:frame draw:style-name="gr1" draw:text-style-name="P2" draw:layer="layout" svg:width="2.951cm" svg:height="0.624cm" svg:x="11.895cm" svg:y="12.589cm">
          <draw:text-box>
            <text:p text:style-name="P1"><text:span text:style-name="T2">7.53014e-07 </text:span></text:p>
          </draw:text-box>
        </draw:frame>
        <draw:polygon draw:style-name="gr2" draw:text-style-name="P3" draw:layer="layout" svg:width="0.013cm" svg:height="0.013cm" svg:x="2.998cm" svg:y="12.553cm" svg:viewBox="0 0 14 14" draw:points="0,0 14,0 14,14 0,14">
          <text:p/>
        </draw:polygon>
        <draw:polygon draw:style-name="gr2" draw:text-style-name="P3" draw:layer="layout" svg:width="4.105cm" svg:height="0.013cm" svg:x="3.011cm" svg:y="12.553cm" svg:viewBox="0 0 4106 14" draw:points="0,0 4106,0 4106,14 0,14">
          <text:p/>
        </draw:polygon>
        <draw:polygon draw:style-name="gr2" draw:text-style-name="P3" draw:layer="layout" svg:width="0.012cm" svg:height="0.013cm" svg:x="7.116cm" svg:y="12.553cm" svg:viewBox="0 0 13 14" draw:points="0,0 13,0 13,14 0,14">
          <text:p/>
        </draw:polygon>
        <draw:polygon draw:style-name="gr2" draw:text-style-name="P3" draw:layer="layout" svg:width="4.118cm" svg:height="0.013cm" svg:x="7.128cm" svg:y="12.553cm" svg:viewBox="0 0 4119 14" draw:points="0,0 4119,0 4119,14 0,14">
          <text:p/>
        </draw:polygon>
        <draw:polygon draw:style-name="gr2" draw:text-style-name="P3" draw:layer="layout" svg:width="0.012cm" svg:height="0.013cm" svg:x="11.246cm" svg:y="12.553cm" svg:viewBox="0 0 13 14" draw:points="0,0 13,0 13,14 0,14">
          <text:p/>
        </draw:polygon>
        <draw:polygon draw:style-name="gr2" draw:text-style-name="P3" draw:layer="layout" svg:width="4.105cm" svg:height="0.013cm" svg:x="11.258cm" svg:y="12.553cm" svg:viewBox="0 0 4106 14" draw:points="0,0 4106,0 4106,14 0,14">
          <text:p/>
        </draw:polygon>
        <draw:polygon draw:style-name="gr2" draw:text-style-name="P3" draw:layer="layout" svg:width="0.013cm" svg:height="0.013cm" svg:x="15.363cm" svg:y="12.553cm" svg:viewBox="0 0 14 14" draw:points="0,0 14,0 14,14 0,14">
          <text:p/>
        </draw:polygon>
        <draw:polygon draw:style-name="gr2" draw:text-style-name="P3" draw:layer="layout" svg:width="4.117cm" svg:height="0.013cm" svg:x="15.376cm" svg:y="12.553cm" svg:viewBox="0 0 4118 14" draw:points="0,0 4118,0 4118,14 0,14">
          <text:p/>
        </draw:polygon>
        <draw:polygon draw:style-name="gr2" draw:text-style-name="P3" draw:layer="layout" svg:width="0.014cm" svg:height="0.013cm" svg:x="19.493cm" svg:y="12.553cm" svg:viewBox="0 0 15 14" draw:points="0,0 15,0 15,14 0,14">
          <text:p/>
        </draw:polygon>
        <draw:polygon draw:style-name="gr2" draw:text-style-name="P3" draw:layer="layout" svg:width="0.013cm" svg:height="0.647cm" svg:x="2.998cm" svg:y="12.566cm" svg:viewBox="0 0 14 648" draw:points="0,0 14,0 14,648 0,648">
          <text:p/>
        </draw:polygon>
        <draw:polygon draw:style-name="gr2" draw:text-style-name="P3" draw:layer="layout" svg:width="0.012cm" svg:height="0.647cm" svg:x="7.116cm" svg:y="12.566cm" svg:viewBox="0 0 13 648" draw:points="0,0 13,0 13,648 0,648">
          <text:p/>
        </draw:polygon>
        <draw:polygon draw:style-name="gr2" draw:text-style-name="P3" draw:layer="layout" svg:width="0.012cm" svg:height="0.647cm" svg:x="11.246cm" svg:y="12.566cm" svg:viewBox="0 0 13 648" draw:points="0,0 13,0 13,648 0,648">
          <text:p/>
        </draw:polygon>
        <draw:polygon draw:style-name="gr2" draw:text-style-name="P3" draw:layer="layout" svg:width="0.013cm" svg:height="0.647cm" svg:x="15.363cm" svg:y="12.566cm" svg:viewBox="0 0 14 648" draw:points="0,0 14,0 14,648 0,648">
          <text:p/>
        </draw:polygon>
        <draw:polygon draw:style-name="gr2" draw:text-style-name="P3" draw:layer="layout" svg:width="0.014cm" svg:height="0.647cm" svg:x="19.493cm" svg:y="12.566cm" svg:viewBox="0 0 15 648" draw:points="0,0 15,0 15,648 0,648">
          <text:p/>
        </draw:polygon>
        <draw:frame draw:style-name="gr1" draw:text-style-name="P2" draw:layer="layout" svg:width="2.377cm" svg:height="0.624cm" svg:x="16.304cm" svg:y="12.589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2.098cm" svg:height="0.624cm" svg:x="4.079cm" svg:y="13.262cm">
          <draw:text-box>
            <text:p text:style-name="P1"><text:span text:style-name="T2">256x256 </text:span></text:p>
          </draw:text-box>
        </draw:frame>
        <draw:frame draw:style-name="gr1" draw:text-style-name="P2" draw:layer="layout" svg:width="1.958cm" svg:height="0.624cm" svg:x="8.273cm" svg:y="13.262cm">
          <draw:text-box>
            <text:p text:style-name="P1"><text:span text:style-name="T2">14.1547 </text:span></text:p>
          </draw:text-box>
        </draw:frame>
        <draw:frame draw:style-name="gr1" draw:text-style-name="P2" draw:layer="layout" svg:width="2.951cm" svg:height="0.624cm" svg:x="11.895cm" svg:y="13.262cm">
          <draw:text-box>
            <text:p text:style-name="P1"><text:span text:style-name="T2">9.91166e-07 </text:span></text:p>
          </draw:text-box>
        </draw:frame>
        <draw:polygon draw:style-name="gr2" draw:text-style-name="P3" draw:layer="layout" svg:width="0.013cm" svg:height="0.012cm" svg:x="2.998cm" svg:y="13.214cm" svg:viewBox="0 0 14 13" draw:points="0,0 14,0 14,13 0,13">
          <text:p/>
        </draw:polygon>
        <draw:polygon draw:style-name="gr2" draw:text-style-name="P3" draw:layer="layout" svg:width="4.105cm" svg:height="0.012cm" svg:x="3.011cm" svg:y="13.214cm" svg:viewBox="0 0 4106 13" draw:points="0,0 4106,0 4106,13 0,13">
          <text:p/>
        </draw:polygon>
        <draw:polygon draw:style-name="gr2" draw:text-style-name="P3" draw:layer="layout" svg:width="0.012cm" svg:height="0.012cm" svg:x="7.116cm" svg:y="13.214cm" svg:viewBox="0 0 13 13" draw:points="0,0 13,0 13,13 0,13">
          <text:p/>
        </draw:polygon>
        <draw:polygon draw:style-name="gr2" draw:text-style-name="P3" draw:layer="layout" svg:width="4.118cm" svg:height="0.012cm" svg:x="7.128cm" svg:y="13.214cm" svg:viewBox="0 0 4119 13" draw:points="0,0 4119,0 4119,13 0,13">
          <text:p/>
        </draw:polygon>
        <draw:polygon draw:style-name="gr2" draw:text-style-name="P3" draw:layer="layout" svg:width="0.012cm" svg:height="0.012cm" svg:x="11.246cm" svg:y="13.214cm" svg:viewBox="0 0 13 13" draw:points="0,0 13,0 13,13 0,13">
          <text:p/>
        </draw:polygon>
        <draw:polygon draw:style-name="gr2" draw:text-style-name="P3" draw:layer="layout" svg:width="4.105cm" svg:height="0.012cm" svg:x="11.258cm" svg:y="13.214cm" svg:viewBox="0 0 4106 13" draw:points="0,0 4106,0 4106,13 0,13">
          <text:p/>
        </draw:polygon>
        <draw:polygon draw:style-name="gr2" draw:text-style-name="P3" draw:layer="layout" svg:width="0.013cm" svg:height="0.012cm" svg:x="15.363cm" svg:y="13.214cm" svg:viewBox="0 0 14 13" draw:points="0,0 14,0 14,13 0,13">
          <text:p/>
        </draw:polygon>
        <draw:polygon draw:style-name="gr2" draw:text-style-name="P3" draw:layer="layout" svg:width="4.117cm" svg:height="0.012cm" svg:x="15.376cm" svg:y="13.214cm" svg:viewBox="0 0 4118 13" draw:points="0,0 4118,0 4118,13 0,13">
          <text:p/>
        </draw:polygon>
        <draw:polygon draw:style-name="gr2" draw:text-style-name="P3" draw:layer="layout" svg:width="0.014cm" svg:height="0.012cm" svg:x="19.493cm" svg:y="13.214cm" svg:viewBox="0 0 15 13" draw:points="0,0 15,0 15,13 0,13">
          <text:p/>
        </draw:polygon>
        <draw:polygon draw:style-name="gr2" draw:text-style-name="P3" draw:layer="layout" svg:width="0.013cm" svg:height="0.661cm" svg:x="2.998cm" svg:y="13.226cm" svg:viewBox="0 0 14 662" draw:points="0,0 14,0 14,662 0,662">
          <text:p/>
        </draw:polygon>
        <draw:polygon draw:style-name="gr2" draw:text-style-name="P3" draw:layer="layout" svg:width="0.012cm" svg:height="0.661cm" svg:x="7.116cm" svg:y="13.226cm" svg:viewBox="0 0 13 662" draw:points="0,0 13,0 13,662 0,662">
          <text:p/>
        </draw:polygon>
        <draw:polygon draw:style-name="gr2" draw:text-style-name="P3" draw:layer="layout" svg:width="0.012cm" svg:height="0.661cm" svg:x="11.246cm" svg:y="13.226cm" svg:viewBox="0 0 13 662" draw:points="0,0 13,0 13,662 0,662">
          <text:p/>
        </draw:polygon>
        <draw:polygon draw:style-name="gr2" draw:text-style-name="P3" draw:layer="layout" svg:width="0.013cm" svg:height="0.661cm" svg:x="15.363cm" svg:y="13.226cm" svg:viewBox="0 0 14 662" draw:points="0,0 14,0 14,662 0,662">
          <text:p/>
        </draw:polygon>
        <draw:polygon draw:style-name="gr2" draw:text-style-name="P3" draw:layer="layout" svg:width="0.014cm" svg:height="0.661cm" svg:x="19.493cm" svg:y="13.226cm" svg:viewBox="0 0 15 662" draw:points="0,0 15,0 15,662 0,662">
          <text:p/>
        </draw:polygon>
        <draw:frame draw:style-name="gr1" draw:text-style-name="P2" draw:layer="layout" svg:width="2.377cm" svg:height="0.624cm" svg:x="16.304cm" svg:y="13.262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2.098cm" svg:height="0.624cm" svg:x="4.079cm" svg:y="13.923cm">
          <draw:text-box>
            <text:p text:style-name="P1"><text:span text:style-name="T2">512x512 </text:span></text:p>
          </draw:text-box>
        </draw:frame>
        <draw:frame draw:style-name="gr1" draw:text-style-name="P2" draw:layer="layout" svg:width="1.958cm" svg:height="0.624cm" svg:x="8.273cm" svg:y="13.923cm">
          <draw:text-box>
            <text:p text:style-name="P1"><text:span text:style-name="T2">68.6179 </text:span></text:p>
          </draw:text-box>
        </draw:frame>
        <draw:frame draw:style-name="gr1" draw:text-style-name="P2" draw:layer="layout" svg:width="2.951cm" svg:height="0.624cm" svg:x="11.895cm" svg:y="13.923cm">
          <draw:text-box>
            <text:p text:style-name="P1"><text:span text:style-name="T2">9.92416e-07 </text:span></text:p>
          </draw:text-box>
        </draw:frame>
        <draw:polygon draw:style-name="gr2" draw:text-style-name="P3" draw:layer="layout" svg:width="0.013cm" svg:height="0.012cm" svg:x="2.998cm" svg:y="13.887cm" svg:viewBox="0 0 14 13" draw:points="0,0 14,0 14,13 0,13">
          <text:p/>
        </draw:polygon>
        <draw:polygon draw:style-name="gr2" draw:text-style-name="P3" draw:layer="layout" svg:width="4.105cm" svg:height="0.012cm" svg:x="3.011cm" svg:y="13.887cm" svg:viewBox="0 0 4106 13" draw:points="0,0 4106,0 4106,13 0,13">
          <text:p/>
        </draw:polygon>
        <draw:polygon draw:style-name="gr2" draw:text-style-name="P3" draw:layer="layout" svg:width="0.012cm" svg:height="0.012cm" svg:x="7.116cm" svg:y="13.887cm" svg:viewBox="0 0 13 13" draw:points="0,0 13,0 13,13 0,13">
          <text:p/>
        </draw:polygon>
        <draw:polygon draw:style-name="gr2" draw:text-style-name="P3" draw:layer="layout" svg:width="4.118cm" svg:height="0.012cm" svg:x="7.128cm" svg:y="13.887cm" svg:viewBox="0 0 4119 13" draw:points="0,0 4119,0 4119,13 0,13">
          <text:p/>
        </draw:polygon>
        <draw:polygon draw:style-name="gr2" draw:text-style-name="P3" draw:layer="layout" svg:width="0.012cm" svg:height="0.012cm" svg:x="11.246cm" svg:y="13.887cm" svg:viewBox="0 0 13 13" draw:points="0,0 13,0 13,13 0,13">
          <text:p/>
        </draw:polygon>
        <draw:polygon draw:style-name="gr2" draw:text-style-name="P3" draw:layer="layout" svg:width="4.105cm" svg:height="0.012cm" svg:x="11.258cm" svg:y="13.887cm" svg:viewBox="0 0 4106 13" draw:points="0,0 4106,0 4106,13 0,13">
          <text:p/>
        </draw:polygon>
        <draw:polygon draw:style-name="gr2" draw:text-style-name="P3" draw:layer="layout" svg:width="0.013cm" svg:height="0.012cm" svg:x="15.363cm" svg:y="13.887cm" svg:viewBox="0 0 14 13" draw:points="0,0 14,0 14,13 0,13">
          <text:p/>
        </draw:polygon>
        <draw:polygon draw:style-name="gr2" draw:text-style-name="P3" draw:layer="layout" svg:width="4.117cm" svg:height="0.012cm" svg:x="15.376cm" svg:y="13.887cm" svg:viewBox="0 0 4118 13" draw:points="0,0 4118,0 4118,13 0,13">
          <text:p/>
        </draw:polygon>
        <draw:polygon draw:style-name="gr2" draw:text-style-name="P3" draw:layer="layout" svg:width="0.014cm" svg:height="0.012cm" svg:x="19.493cm" svg:y="13.887cm" svg:viewBox="0 0 15 13" draw:points="0,0 15,0 15,13 0,13">
          <text:p/>
        </draw:polygon>
        <draw:polygon draw:style-name="gr2" draw:text-style-name="P3" draw:layer="layout" svg:width="0.013cm" svg:height="0.649cm" svg:x="2.998cm" svg:y="13.899cm" svg:viewBox="0 0 14 650" draw:points="0,0 14,0 14,650 0,650">
          <text:p/>
        </draw:polygon>
        <draw:polygon draw:style-name="gr2" draw:text-style-name="P3" draw:layer="layout" svg:width="0.012cm" svg:height="0.649cm" svg:x="7.116cm" svg:y="13.899cm" svg:viewBox="0 0 13 650" draw:points="0,0 13,0 13,650 0,650">
          <text:p/>
        </draw:polygon>
        <draw:polygon draw:style-name="gr2" draw:text-style-name="P3" draw:layer="layout" svg:width="0.012cm" svg:height="0.649cm" svg:x="11.246cm" svg:y="13.899cm" svg:viewBox="0 0 13 650" draw:points="0,0 13,0 13,650 0,650">
          <text:p/>
        </draw:polygon>
        <draw:polygon draw:style-name="gr2" draw:text-style-name="P3" draw:layer="layout" svg:width="0.013cm" svg:height="0.649cm" svg:x="15.363cm" svg:y="13.899cm" svg:viewBox="0 0 14 650" draw:points="0,0 14,0 14,650 0,650">
          <text:p/>
        </draw:polygon>
        <draw:polygon draw:style-name="gr2" draw:text-style-name="P3" draw:layer="layout" svg:width="0.014cm" svg:height="0.649cm" svg:x="19.493cm" svg:y="13.899cm" svg:viewBox="0 0 15 650" draw:points="0,0 15,0 15,650 0,650">
          <text:p/>
        </draw:polygon>
        <draw:frame draw:style-name="gr1" draw:text-style-name="P2" draw:layer="layout" svg:width="2.377cm" svg:height="0.624cm" svg:x="16.304cm" svg:y="13.923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2.656cm" svg:height="0.624cm" svg:x="3.8cm" svg:y="14.596cm">
          <draw:text-box>
            <text:p text:style-name="P1"><text:span text:style-name="T2">1024x1024 </text:span></text:p>
          </draw:text-box>
        </draw:frame>
        <draw:frame draw:style-name="gr1" draw:text-style-name="P2" draw:layer="layout" svg:width="1.958cm" svg:height="0.624cm" svg:x="8.273cm" svg:y="14.596cm">
          <draw:text-box>
            <text:p text:style-name="P1"><text:span text:style-name="T2">461.941 </text:span></text:p>
          </draw:text-box>
        </draw:frame>
        <draw:frame draw:style-name="gr1" draw:text-style-name="P2" draw:layer="layout" svg:width="2.951cm" svg:height="0.624cm" svg:x="11.895cm" svg:y="14.596cm">
          <draw:text-box>
            <text:p text:style-name="P1"><text:span text:style-name="T2">1.37575e-06 </text:span></text:p>
          </draw:text-box>
        </draw:frame>
        <draw:polygon draw:style-name="gr2" draw:text-style-name="P3" draw:layer="layout" svg:width="0.013cm" svg:height="0.012cm" svg:x="2.998cm" svg:y="14.548cm" svg:viewBox="0 0 14 13" draw:points="0,0 14,0 14,13 0,13">
          <text:p/>
        </draw:polygon>
        <draw:polygon draw:style-name="gr2" draw:text-style-name="P3" draw:layer="layout" svg:width="4.105cm" svg:height="0.012cm" svg:x="3.011cm" svg:y="14.548cm" svg:viewBox="0 0 4106 13" draw:points="0,0 4106,0 4106,13 0,13">
          <text:p/>
        </draw:polygon>
        <draw:polygon draw:style-name="gr2" draw:text-style-name="P3" draw:layer="layout" svg:width="0.012cm" svg:height="0.012cm" svg:x="7.116cm" svg:y="14.548cm" svg:viewBox="0 0 13 13" draw:points="0,0 13,0 13,13 0,13">
          <text:p/>
        </draw:polygon>
        <draw:polygon draw:style-name="gr2" draw:text-style-name="P3" draw:layer="layout" svg:width="4.118cm" svg:height="0.012cm" svg:x="7.128cm" svg:y="14.548cm" svg:viewBox="0 0 4119 13" draw:points="0,0 4119,0 4119,13 0,13">
          <text:p/>
        </draw:polygon>
        <draw:polygon draw:style-name="gr2" draw:text-style-name="P3" draw:layer="layout" svg:width="0.012cm" svg:height="0.012cm" svg:x="11.246cm" svg:y="14.548cm" svg:viewBox="0 0 13 13" draw:points="0,0 13,0 13,13 0,13">
          <text:p/>
        </draw:polygon>
        <draw:polygon draw:style-name="gr2" draw:text-style-name="P3" draw:layer="layout" svg:width="4.105cm" svg:height="0.012cm" svg:x="11.258cm" svg:y="14.548cm" svg:viewBox="0 0 4106 13" draw:points="0,0 4106,0 4106,13 0,13">
          <text:p/>
        </draw:polygon>
        <draw:polygon draw:style-name="gr2" draw:text-style-name="P3" draw:layer="layout" svg:width="0.013cm" svg:height="0.012cm" svg:x="15.363cm" svg:y="14.548cm" svg:viewBox="0 0 14 13" draw:points="0,0 14,0 14,13 0,13">
          <text:p/>
        </draw:polygon>
        <draw:polygon draw:style-name="gr2" draw:text-style-name="P3" draw:layer="layout" svg:width="4.117cm" svg:height="0.012cm" svg:x="15.376cm" svg:y="14.548cm" svg:viewBox="0 0 4118 13" draw:points="0,0 4118,0 4118,13 0,13">
          <text:p/>
        </draw:polygon>
        <draw:polygon draw:style-name="gr2" draw:text-style-name="P3" draw:layer="layout" svg:width="0.014cm" svg:height="0.012cm" svg:x="19.493cm" svg:y="14.548cm" svg:viewBox="0 0 15 13" draw:points="0,0 15,0 15,13 0,13">
          <text:p/>
        </draw:polygon>
        <draw:polygon draw:style-name="gr2" draw:text-style-name="P3" draw:layer="layout" svg:width="0.013cm" svg:height="0.661cm" svg:x="2.998cm" svg:y="14.56cm" svg:viewBox="0 0 14 662" draw:points="0,0 14,0 14,662 0,662">
          <text:p/>
        </draw:polygon>
        <draw:polygon draw:style-name="gr2" draw:text-style-name="P3" draw:layer="layout" svg:width="0.013cm" svg:height="0.014cm" svg:x="2.998cm" svg:y="15.221cm" svg:viewBox="0 0 14 15" draw:points="0,0 14,0 14,15 0,15">
          <text:p/>
        </draw:polygon>
        <draw:polygon draw:style-name="gr2" draw:text-style-name="P3" draw:layer="layout" svg:width="0.013cm" svg:height="0.014cm" svg:x="2.998cm" svg:y="15.221cm" svg:viewBox="0 0 14 15" draw:points="0,0 14,0 14,15 0,15">
          <text:p/>
        </draw:polygon>
        <draw:polygon draw:style-name="gr2" draw:text-style-name="P3" draw:layer="layout" svg:width="4.105cm" svg:height="0.014cm" svg:x="3.011cm" svg:y="15.221cm" svg:viewBox="0 0 4106 15" draw:points="0,0 4106,0 4106,15 0,15">
          <text:p/>
        </draw:polygon>
        <draw:polygon draw:style-name="gr2" draw:text-style-name="P3" draw:layer="layout" svg:width="0.012cm" svg:height="0.661cm" svg:x="7.116cm" svg:y="14.56cm" svg:viewBox="0 0 13 662" draw:points="0,0 13,0 13,662 0,662">
          <text:p/>
        </draw:polygon>
        <draw:polygon draw:style-name="gr2" draw:text-style-name="P3" draw:layer="layout" svg:width="0.012cm" svg:height="0.014cm" svg:x="7.116cm" svg:y="15.221cm" svg:viewBox="0 0 13 15" draw:points="0,0 13,0 13,15 0,15">
          <text:p/>
        </draw:polygon>
        <draw:polygon draw:style-name="gr2" draw:text-style-name="P3" draw:layer="layout" svg:width="4.118cm" svg:height="0.014cm" svg:x="7.128cm" svg:y="15.221cm" svg:viewBox="0 0 4119 15" draw:points="0,0 4119,0 4119,15 0,15">
          <text:p/>
        </draw:polygon>
        <draw:polygon draw:style-name="gr2" draw:text-style-name="P3" draw:layer="layout" svg:width="0.012cm" svg:height="0.661cm" svg:x="11.246cm" svg:y="14.56cm" svg:viewBox="0 0 13 662" draw:points="0,0 13,0 13,662 0,662">
          <text:p/>
        </draw:polygon>
        <draw:polygon draw:style-name="gr2" draw:text-style-name="P3" draw:layer="layout" svg:width="0.012cm" svg:height="0.014cm" svg:x="11.246cm" svg:y="15.221cm" svg:viewBox="0 0 13 15" draw:points="0,0 13,0 13,15 0,15">
          <text:p/>
        </draw:polygon>
        <draw:polygon draw:style-name="gr2" draw:text-style-name="P3" draw:layer="layout" svg:width="4.105cm" svg:height="0.014cm" svg:x="11.258cm" svg:y="15.221cm" svg:viewBox="0 0 4106 15" draw:points="0,0 4106,0 4106,15 0,15">
          <text:p/>
        </draw:polygon>
        <draw:polygon draw:style-name="gr2" draw:text-style-name="P3" draw:layer="layout" svg:width="0.013cm" svg:height="0.661cm" svg:x="15.363cm" svg:y="14.56cm" svg:viewBox="0 0 14 662" draw:points="0,0 14,0 14,662 0,662">
          <text:p/>
        </draw:polygon>
        <draw:polygon draw:style-name="gr2" draw:text-style-name="P3" draw:layer="layout" svg:width="0.013cm" svg:height="0.014cm" svg:x="15.363cm" svg:y="15.221cm" svg:viewBox="0 0 14 15" draw:points="0,0 14,0 14,15 0,15">
          <text:p/>
        </draw:polygon>
        <draw:polygon draw:style-name="gr2" draw:text-style-name="P3" draw:layer="layout" svg:width="4.117cm" svg:height="0.014cm" svg:x="15.376cm" svg:y="15.221cm" svg:viewBox="0 0 4118 15" draw:points="0,0 4118,0 4118,15 0,15">
          <text:p/>
        </draw:polygon>
        <draw:polygon draw:style-name="gr2" draw:text-style-name="P3" draw:layer="layout" svg:width="0.014cm" svg:height="0.661cm" svg:x="19.493cm" svg:y="14.56cm" svg:viewBox="0 0 15 662" draw:points="0,0 15,0 15,662 0,662">
          <text:p/>
        </draw:polygon>
        <draw:polygon draw:style-name="gr2" draw:text-style-name="P3" draw:layer="layout" svg:width="0.014cm" svg:height="0.014cm" svg:x="19.493cm" svg:y="15.221cm" svg:viewBox="0 0 15 15" draw:points="0,0 15,0 15,15 0,15">
          <text:p/>
        </draw:polygon>
        <draw:polygon draw:style-name="gr2" draw:text-style-name="P3" draw:layer="layout" svg:width="0.014cm" svg:height="0.014cm" svg:x="19.493cm" svg:y="15.221cm" svg:viewBox="0 0 15 15" draw:points="0,0 15,0 15,15 0,15">
          <text:p/>
        </draw:polygon>
        <draw:frame draw:style-name="gr1" draw:text-style-name="P2" draw:layer="layout" svg:width="2.377cm" svg:height="0.624cm" svg:x="16.304cm" svg:y="14.596cm">
          <draw:text-box>
            <text:p text:style-name="P1"><text:span text:style-name="T2">1.000.000 </text:span></text:p>
          </draw:text-box>
        </draw:frame>
        <draw:frame draw:style-name="gr1" draw:text-style-name="P2" draw:layer="layout" svg:width="0.558cm" svg:height="0.624cm" svg:x="11.246cm" svg:y="15.2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5.355cm" svg:height="0.624cm" svg:x="3.443cm" svg:y="16.248cm">
          <draw:text-box>
            <text:p text:style-name="P1"><text:span text:style-name="T3">Д</text:span><text:span text:style-name="T3">и</text:span><text:span text:style-name="T3">а</text:span><text:span text:style-name="T3">г</text:span><text:span text:style-name="T3">р</text:span><text:span text:style-name="T3">а</text:span><text:span text:style-name="T3">м</text:span><text:span text:style-name="T3">м</text:span><text:span text:style-name="T3">а</text:span><text:span text:style-name="T3"> </text:span><text:span text:style-name="T3">с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р</text:span><text:span text:style-name="T3">е</text:span><text:span text:style-name="T3">м</text:span><text:span text:style-name="T3">е</text:span><text:span text:style-name="T3">н</text:span><text:span text:style-name="T3">и</text:span><text:span text:style-name="T3"> </text:span><text:span text:style-name="T3">р</text:span><text:span text:style-name="T3">а</text:span><text:span text:style-name="T3">б</text:span><text:span text:style-name="T3">о</text:span><text:span text:style-name="T3">т</text:span><text:span text:style-name="T3">ы</text:span><text:span text:style-name="T3"> </text:span><text:span text:style-name="T2">C</text:span><text:span text:style-name="T2">P</text:span><text:span text:style-name="T2">U</text:span><text:span text:style-name="T2">-</text:span><text:span text:style-name="T2">o</text:span><text:span text:style-name="T2">n</text:span><text:span text:style-name="T2">e</text:span><text:span text:style-name="T2"> </text:span><text:span text:style-name="T3">и</text:span><text:span text:style-name="T3"> </text:span><text:span text:style-name="T2">C</text:span><text:span text:style-name="T2">P</text:span><text:span text:style-name="T2">U</text:span><text:span text:style-name="T2">-</text:span><text:span text:style-name="T2">m</text:span><text:span text:style-name="T2">u</text:span><text:span text:style-name="T2">l</text:span><text:span text:style-name="T2">t</text:span><text:span text:style-name="T2">i</text:span><text:span text:style-name="T2"> </text:span></text:p>
          </draw:text-box>
        </draw:frame>
        <draw:frame draw:style-name="gr1" draw:text-style-name="P2" draw:layer="layout" svg:width="0.558cm" svg:height="0.624cm" svg:x="18.871cm" svg:y="25.6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15.241cm" svg:height="8.89cm" svg:x="3.631cm" svg:y="17.195cm" svg:viewBox="0 0 15242 8891" draw:points="0,0 15242,0 15242,8891 0,8891">
          <text:p/>
        </draw:polygon>
        <draw:path draw:style-name="gr4" draw:text-style-name="P5" draw:layer="layout" svg:width="13.846cm" svg:height="5.134cm" svg:x="4.637cm" svg:y="18.589cm" svg:viewBox="0 0 13847 5135" svg:d="M0 5135h13847M0 4397h13847M0 3674h13847M0 2937h13847M0 2200h13847M0 1464h13847M0 740h13847M0 0h13847">
          <text:p/>
        </draw:path>
        <draw:frame draw:style-name="gr5" draw:text-style-name="P5" draw:layer="layout" svg:width="1.377cm" svg:height="0.437cm" svg:x="4.978cm" svg:y="24.206cm">
          <draw:image xlink:href="Pictures/100000010000006D000000230EEE6813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0.831cm" svg:x="9.589cm" svg:y="23.813cm">
          <draw:image xlink:href="Pictures/100000010000006D00000042DB1E8C2F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2.825cm" svg:x="14.211cm" svg:y="21.819cm">
          <draw:image xlink:href="Pictures/100000010000006D000000DF701DE9B0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0.336cm" svg:x="6.248cm" svg:y="24.308cm">
          <draw:image xlink:href="Pictures/100000010000006D0000001B86EDDBA8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0.717cm" svg:x="10.871cm" svg:y="23.927cm">
          <draw:image xlink:href="Pictures/100000010000006D000000396B630DE9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5.86cm" svg:x="15.481cm" svg:y="18.783cm">
          <draw:image xlink:href="Pictures/100000010000006D000001CE060F9B0A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0.323cm" svg:x="7.531cm" svg:y="24.321cm">
          <draw:image xlink:href="Pictures/100000010000006D0000001AF5C6F42A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0.361cm" svg:x="12.141cm" svg:y="24.282cm">
          <draw:image xlink:href="Pictures/100000010000006D0000001D9605F9DE.png" xlink:type="simple" xlink:show="embed" xlink:actuate="onLoad" draw:mime-type="image/png">
            <text:p/>
          </draw:image>
        </draw:frame>
        <draw:frame draw:style-name="gr5" draw:text-style-name="P5" draw:layer="layout" svg:width="1.377cm" svg:height="0.488cm" svg:x="16.764cm" svg:y="24.155cm">
          <draw:image xlink:href="Pictures/100000010000006D00000027FEA0B56D.png" xlink:type="simple" xlink:show="embed" xlink:actuate="onLoad" draw:mime-type="image/png">
            <text:p/>
          </draw:image>
        </draw:frame>
        <draw:polygon draw:style-name="gr6" draw:text-style-name="P6" draw:layer="layout" svg:width="1.029cm" svg:height="0cm" svg:x="5.152cm" svg:y="24.335cm" svg:viewBox="0 0 1030 1" draw:points="0,0 1030,0 1030,1 0,1">
          <text:p/>
        </draw:polygon>
        <draw:polygon draw:style-name="gr7" draw:text-style-name="P7" draw:layer="layout" svg:width="1.029cm" svg:height="0cm" svg:x="5.152cm" svg:y="24.336cm" svg:viewBox="0 0 1030 1" draw:points="0,0 1030,0 1030,1 0,1">
          <text:p/>
        </draw:polygon>
        <draw:polygon draw:style-name="gr8" draw:text-style-name="P8" draw:layer="layout" svg:width="1.029cm" svg:height="0cm" svg:x="5.152cm" svg:y="24.337cm" svg:viewBox="0 0 1030 1" draw:points="0,0 1030,0 1030,1 0,1">
          <text:p/>
        </draw:polygon>
        <draw:polygon draw:style-name="gr9" draw:text-style-name="P9" draw:layer="layout" svg:width="1.029cm" svg:height="0cm" svg:x="5.152cm" svg:y="24.338cm" svg:viewBox="0 0 1030 1" draw:points="0,0 1030,0 1030,1 0,1">
          <text:p/>
        </draw:polygon>
        <draw:polygon draw:style-name="gr9" draw:text-style-name="P9" draw:layer="layout" svg:width="1.029cm" svg:height="0cm" svg:x="5.152cm" svg:y="24.339cm" svg:viewBox="0 0 1030 1" draw:points="0,0 1030,0 1030,1 0,1">
          <text:p/>
        </draw:polygon>
        <draw:polygon draw:style-name="gr10" draw:text-style-name="P10" draw:layer="layout" svg:width="1.029cm" svg:height="0cm" svg:x="5.152cm" svg:y="24.34cm" svg:viewBox="0 0 1030 1" draw:points="0,0 1030,0 1030,1 0,1">
          <text:p/>
        </draw:polygon>
        <draw:polygon draw:style-name="gr10" draw:text-style-name="P10" draw:layer="layout" svg:width="1.029cm" svg:height="0cm" svg:x="5.152cm" svg:y="24.341cm" svg:viewBox="0 0 1030 1" draw:points="0,0 1030,0 1030,1 0,1">
          <text:p/>
        </draw:polygon>
        <draw:polygon draw:style-name="gr11" draw:text-style-name="P11" draw:layer="layout" svg:width="1.029cm" svg:height="0cm" svg:x="5.152cm" svg:y="24.342cm" svg:viewBox="0 0 1030 1" draw:points="0,0 1030,0 1030,1 0,1">
          <text:p/>
        </draw:polygon>
        <draw:polygon draw:style-name="gr12" draw:text-style-name="P12" draw:layer="layout" svg:width="1.029cm" svg:height="0cm" svg:x="5.152cm" svg:y="24.343cm" svg:viewBox="0 0 1030 1" draw:points="0,0 1030,0 1030,1 0,1">
          <text:p/>
        </draw:polygon>
        <draw:polygon draw:style-name="gr13" draw:text-style-name="P13" draw:layer="layout" svg:width="1.029cm" svg:height="0cm" svg:x="5.152cm" svg:y="24.344cm" svg:viewBox="0 0 1030 1" draw:points="0,0 1030,0 1030,1 0,1">
          <text:p/>
        </draw:polygon>
        <draw:polygon draw:style-name="gr14" draw:text-style-name="P14" draw:layer="layout" svg:width="1.029cm" svg:height="0cm" svg:x="5.152cm" svg:y="24.345cm" svg:viewBox="0 0 1030 1" draw:points="0,0 1030,0 1030,1 0,1">
          <text:p/>
        </draw:polygon>
        <draw:polygon draw:style-name="gr14" draw:text-style-name="P14" draw:layer="layout" svg:width="1.029cm" svg:height="0cm" svg:x="5.152cm" svg:y="24.346cm" svg:viewBox="0 0 1030 1" draw:points="0,0 1030,0 1030,1 0,1">
          <text:p/>
        </draw:polygon>
        <draw:polygon draw:style-name="gr15" draw:text-style-name="P15" draw:layer="layout" svg:width="1.029cm" svg:height="0cm" svg:x="5.152cm" svg:y="24.347cm" svg:viewBox="0 0 1030 1" draw:points="0,0 1030,0 1030,1 0,1">
          <text:p/>
        </draw:polygon>
        <draw:polygon draw:style-name="gr15" draw:text-style-name="P15" draw:layer="layout" svg:width="1.029cm" svg:height="0cm" svg:x="5.152cm" svg:y="24.348cm" svg:viewBox="0 0 1030 1" draw:points="0,0 1030,0 1030,1 0,1">
          <text:p/>
        </draw:polygon>
        <draw:polygon draw:style-name="gr16" draw:text-style-name="P16" draw:layer="layout" svg:width="1.029cm" svg:height="0cm" svg:x="5.152cm" svg:y="24.349cm" svg:viewBox="0 0 1030 1" draw:points="0,0 1030,0 1030,1 0,1">
          <text:p/>
        </draw:polygon>
        <draw:polygon draw:style-name="gr17" draw:text-style-name="P17" draw:layer="layout" svg:width="1.029cm" svg:height="0cm" svg:x="5.152cm" svg:y="24.35cm" svg:viewBox="0 0 1030 1" draw:points="0,0 1030,0 1030,1 0,1">
          <text:p/>
        </draw:polygon>
        <draw:polygon draw:style-name="gr18" draw:text-style-name="P18" draw:layer="layout" svg:width="1.029cm" svg:height="0cm" svg:x="5.152cm" svg:y="24.351cm" svg:viewBox="0 0 1030 1" draw:points="0,0 1030,0 1030,1 0,1">
          <text:p/>
        </draw:polygon>
        <draw:polygon draw:style-name="gr18" draw:text-style-name="P18" draw:layer="layout" svg:width="1.029cm" svg:height="0cm" svg:x="5.152cm" svg:y="24.352cm" svg:viewBox="0 0 1030 1" draw:points="0,0 1030,0 1030,1 0,1">
          <text:p/>
        </draw:polygon>
        <draw:polygon draw:style-name="gr19" draw:text-style-name="P19" draw:layer="layout" svg:width="1.029cm" svg:height="0cm" svg:x="5.152cm" svg:y="24.353cm" svg:viewBox="0 0 1030 1" draw:points="0,0 1030,0 1030,1 0,1">
          <text:p/>
        </draw:polygon>
        <draw:polygon draw:style-name="gr20" draw:text-style-name="P20" draw:layer="layout" svg:width="1.029cm" svg:height="0cm" svg:x="5.152cm" svg:y="24.354cm" svg:viewBox="0 0 1030 1" draw:points="0,0 1030,0 1030,1 0,1">
          <text:p/>
        </draw:polygon>
        <draw:polygon draw:style-name="gr21" draw:text-style-name="P21" draw:layer="layout" svg:width="1.029cm" svg:height="0cm" svg:x="5.152cm" svg:y="24.355cm" svg:viewBox="0 0 1030 0" draw:points="0,0 1030,0">
          <text:p/>
        </draw:polygon>
        <draw:polygon draw:style-name="gr21" draw:text-style-name="P21" draw:layer="layout" svg:width="1.029cm" svg:height="0cm" svg:x="5.152cm" svg:y="24.355cm" svg:viewBox="0 0 1030 1" draw:points="0,0 1030,0 1030,1 0,1">
          <text:p/>
        </draw:polygon>
        <draw:polygon draw:style-name="gr22" draw:text-style-name="P22" draw:layer="layout" svg:width="1.029cm" svg:height="0cm" svg:x="5.152cm" svg:y="24.356cm" svg:viewBox="0 0 1030 1" draw:points="0,0 1030,0 1030,1 0,1">
          <text:p/>
        </draw:polygon>
        <draw:polygon draw:style-name="gr22" draw:text-style-name="P22" draw:layer="layout" svg:width="1.029cm" svg:height="0cm" svg:x="5.152cm" svg:y="24.357cm" svg:viewBox="0 0 1030 1" draw:points="0,0 1030,0 1030,1 0,1">
          <text:p/>
        </draw:polygon>
        <draw:polygon draw:style-name="gr23" draw:text-style-name="P23" draw:layer="layout" svg:width="1.029cm" svg:height="0cm" svg:x="5.152cm" svg:y="24.358cm" svg:viewBox="0 0 1030 1" draw:points="0,0 1030,0 1030,1 0,1">
          <text:p/>
        </draw:polygon>
        <draw:polygon draw:style-name="gr24" draw:text-style-name="P24" draw:layer="layout" svg:width="1.029cm" svg:height="0cm" svg:x="5.152cm" svg:y="24.359cm" svg:viewBox="0 0 1030 1" draw:points="0,0 1030,0 1030,1 0,1">
          <text:p/>
        </draw:polygon>
        <draw:polygon draw:style-name="gr24" draw:text-style-name="P24" draw:layer="layout" svg:width="1.029cm" svg:height="0cm" svg:x="5.152cm" svg:y="24.36cm" svg:viewBox="0 0 1030 1" draw:points="0,0 1030,0 1030,1 0,1">
          <text:p/>
        </draw:polygon>
        <draw:polygon draw:style-name="gr25" draw:text-style-name="P25" draw:layer="layout" svg:width="1.029cm" svg:height="0cm" svg:x="5.152cm" svg:y="24.361cm" svg:viewBox="0 0 1030 1" draw:points="0,0 1030,0 1030,1 0,1">
          <text:p/>
        </draw:polygon>
        <draw:polygon draw:style-name="gr25" draw:text-style-name="P25" draw:layer="layout" svg:width="1.029cm" svg:height="0cm" svg:x="5.152cm" svg:y="24.362cm" svg:viewBox="0 0 1030 1" draw:points="0,0 1030,0 1030,1 0,1">
          <text:p/>
        </draw:polygon>
        <draw:polygon draw:style-name="gr26" draw:text-style-name="P26" draw:layer="layout" svg:width="1.029cm" svg:height="0cm" svg:x="5.152cm" svg:y="24.363cm" svg:viewBox="0 0 1030 1" draw:points="0,0 1030,0 1030,1 0,1">
          <text:p/>
        </draw:polygon>
        <draw:polygon draw:style-name="gr26" draw:text-style-name="P26" draw:layer="layout" svg:width="1.029cm" svg:height="0cm" svg:x="5.152cm" svg:y="24.364cm" svg:viewBox="0 0 1030 1" draw:points="0,0 1030,0 1030,1 0,1">
          <text:p/>
        </draw:polygon>
        <draw:polygon draw:style-name="gr27" draw:text-style-name="P27" draw:layer="layout" svg:width="1.029cm" svg:height="0cm" svg:x="5.152cm" svg:y="24.365cm" svg:viewBox="0 0 1030 1" draw:points="0,0 1030,0 1030,1 0,1">
          <text:p/>
        </draw:polygon>
        <draw:polygon draw:style-name="gr28" draw:text-style-name="P28" draw:layer="layout" svg:width="1.029cm" svg:height="0cm" svg:x="5.152cm" svg:y="24.366cm" svg:viewBox="0 0 1030 1" draw:points="0,0 1030,0 1030,1 0,1">
          <text:p/>
        </draw:polygon>
        <draw:polygon draw:style-name="gr29" draw:text-style-name="P29" draw:layer="layout" svg:width="1.029cm" svg:height="0cm" svg:x="5.152cm" svg:y="24.367cm" svg:viewBox="0 0 1030 1" draw:points="0,0 1030,0 1030,1 0,1">
          <text:p/>
        </draw:polygon>
        <draw:polygon draw:style-name="gr29" draw:text-style-name="P29" draw:layer="layout" svg:width="1.029cm" svg:height="0cm" svg:x="5.152cm" svg:y="24.368cm" svg:viewBox="0 0 1030 1" draw:points="0,0 1030,0 1030,1 0,1">
          <text:p/>
        </draw:polygon>
        <draw:polygon draw:style-name="gr30" draw:text-style-name="P30" draw:layer="layout" svg:width="1.029cm" svg:height="0cm" svg:x="5.152cm" svg:y="24.369cm" svg:viewBox="0 0 1030 1" draw:points="0,0 1030,0 1030,1 0,1">
          <text:p/>
        </draw:polygon>
        <draw:polygon draw:style-name="gr30" draw:text-style-name="P30" draw:layer="layout" svg:width="1.029cm" svg:height="0cm" svg:x="5.152cm" svg:y="24.37cm" svg:viewBox="0 0 1030 1" draw:points="0,0 1030,0 1030,1 0,1">
          <text:p/>
        </draw:polygon>
        <draw:polygon draw:style-name="gr31" draw:text-style-name="P31" draw:layer="layout" svg:width="1.029cm" svg:height="0cm" svg:x="5.152cm" svg:y="24.371cm" svg:viewBox="0 0 1030 1" draw:points="0,0 1030,0 1030,1 0,1">
          <text:p/>
        </draw:polygon>
        <draw:polygon draw:style-name="gr31" draw:text-style-name="P31" draw:layer="layout" svg:width="1.029cm" svg:height="0cm" svg:x="5.152cm" svg:y="24.372cm" svg:viewBox="0 0 1030 1" draw:points="0,0 1030,0 1030,1 0,1">
          <text:p/>
        </draw:polygon>
        <draw:polygon draw:style-name="gr32" draw:text-style-name="P32" draw:layer="layout" svg:width="1.029cm" svg:height="0cm" svg:x="5.152cm" svg:y="24.373cm" svg:viewBox="0 0 1030 1" draw:points="0,0 1030,0 1030,1 0,1">
          <text:p/>
        </draw:polygon>
        <draw:polygon draw:style-name="gr32" draw:text-style-name="P32" draw:layer="layout" svg:width="1.029cm" svg:height="0cm" svg:x="5.152cm" svg:y="24.374cm" svg:viewBox="0 0 1030 1" draw:points="0,0 1030,0 1030,1 0,1">
          <text:p/>
        </draw:polygon>
        <draw:polygon draw:style-name="gr33" draw:text-style-name="P33" draw:layer="layout" svg:width="1.029cm" svg:height="0cm" svg:x="5.152cm" svg:y="24.375cm" svg:viewBox="0 0 1030 1" draw:points="0,0 1030,0 1030,1 0,1">
          <text:p/>
        </draw:polygon>
        <draw:polygon draw:style-name="gr34" draw:text-style-name="P34" draw:layer="layout" svg:width="1.029cm" svg:height="0cm" svg:x="5.152cm" svg:y="24.376cm" svg:viewBox="0 0 1030 1" draw:points="0,0 1030,0 1030,1 0,1">
          <text:p/>
        </draw:polygon>
        <draw:polygon draw:style-name="gr34" draw:text-style-name="P34" draw:layer="layout" svg:width="1.029cm" svg:height="0cm" svg:x="5.152cm" svg:y="24.377cm" svg:viewBox="0 0 1030 1" draw:points="0,0 1030,0 1030,1 0,1">
          <text:p/>
        </draw:polygon>
        <draw:polygon draw:style-name="gr35" draw:text-style-name="P35" draw:layer="layout" svg:width="1.029cm" svg:height="0cm" svg:x="5.152cm" svg:y="24.378cm" svg:viewBox="0 0 1030 1" draw:points="0,0 1030,0 1030,1 0,1">
          <text:p/>
        </draw:polygon>
        <draw:polygon draw:style-name="gr35" draw:text-style-name="P35" draw:layer="layout" svg:width="1.029cm" svg:height="0cm" svg:x="5.152cm" svg:y="24.379cm" svg:viewBox="0 0 1030 1" draw:points="0,0 1030,0 1030,1 0,1">
          <text:p/>
        </draw:polygon>
        <draw:polygon draw:style-name="gr36" draw:text-style-name="P36" draw:layer="layout" svg:width="1.029cm" svg:height="0cm" svg:x="5.152cm" svg:y="24.38cm" svg:viewBox="0 0 1030 1" draw:points="0,0 1030,0 1030,1 0,1">
          <text:p/>
        </draw:polygon>
        <draw:polygon draw:style-name="gr36" draw:text-style-name="P36" draw:layer="layout" svg:width="1.029cm" svg:height="0cm" svg:x="5.152cm" svg:y="24.381cm" svg:viewBox="0 0 1030 1" draw:points="0,0 1030,0 1030,1 0,1">
          <text:p/>
        </draw:polygon>
        <draw:polygon draw:style-name="gr37" draw:text-style-name="P37" draw:layer="layout" svg:width="1.029cm" svg:height="0cm" svg:x="5.152cm" svg:y="24.382cm" svg:viewBox="0 0 1030 1" draw:points="0,0 1030,0 1030,1 0,1">
          <text:p/>
        </draw:polygon>
        <draw:polygon draw:style-name="gr38" draw:text-style-name="P38" draw:layer="layout" svg:width="1.029cm" svg:height="0cm" svg:x="5.152cm" svg:y="24.383cm" svg:viewBox="0 0 1030 1" draw:points="0,0 1030,0 1030,1 0,1">
          <text:p/>
        </draw:polygon>
        <draw:polygon draw:style-name="gr39" draw:text-style-name="P39" draw:layer="layout" svg:width="1.029cm" svg:height="0cm" svg:x="5.152cm" svg:y="24.384cm" svg:viewBox="0 0 1030 1" draw:points="0,0 1030,0 1030,1 0,1">
          <text:p/>
        </draw:polygon>
        <draw:polygon draw:style-name="gr39" draw:text-style-name="P39" draw:layer="layout" svg:width="1.029cm" svg:height="0cm" svg:x="5.152cm" svg:y="24.385cm" svg:viewBox="0 0 1030 1" draw:points="0,0 1030,0 1030,1 0,1">
          <text:p/>
        </draw:polygon>
        <draw:polygon draw:style-name="gr40" draw:text-style-name="P40" draw:layer="layout" svg:width="1.029cm" svg:height="0cm" svg:x="5.152cm" svg:y="24.386cm" svg:viewBox="0 0 1030 1" draw:points="0,0 1030,0 1030,1 0,1">
          <text:p/>
        </draw:polygon>
        <draw:polygon draw:style-name="gr40" draw:text-style-name="P40" draw:layer="layout" svg:width="1.029cm" svg:height="0cm" svg:x="5.152cm" svg:y="24.387cm" svg:viewBox="0 0 1030 1" draw:points="0,0 1030,0 1030,1 0,1">
          <text:p/>
        </draw:polygon>
        <draw:polygon draw:style-name="gr41" draw:text-style-name="P41" draw:layer="layout" svg:width="1.029cm" svg:height="0cm" svg:x="5.152cm" svg:y="24.388cm" svg:viewBox="0 0 1030 0" draw:points="0,0 1030,0">
          <text:p/>
        </draw:polygon>
        <draw:polygon draw:style-name="gr41" draw:text-style-name="P41" draw:layer="layout" svg:width="1.029cm" svg:height="0cm" svg:x="5.152cm" svg:y="24.388cm" svg:viewBox="0 0 1030 1" draw:points="0,0 1030,0 1030,1 0,1">
          <text:p/>
        </draw:polygon>
        <draw:polygon draw:style-name="gr42" draw:text-style-name="P42" draw:layer="layout" svg:width="1.029cm" svg:height="0cm" svg:x="5.152cm" svg:y="24.389cm" svg:viewBox="0 0 1030 1" draw:points="0,0 1030,0 1030,1 0,1">
          <text:p/>
        </draw:polygon>
        <draw:polygon draw:style-name="gr43" draw:text-style-name="P43" draw:layer="layout" svg:width="1.029cm" svg:height="0cm" svg:x="5.152cm" svg:y="24.39cm" svg:viewBox="0 0 1030 1" draw:points="0,0 1030,0 1030,1 0,1">
          <text:p/>
        </draw:polygon>
        <draw:polygon draw:style-name="gr43" draw:text-style-name="P43" draw:layer="layout" svg:width="1.029cm" svg:height="0cm" svg:x="5.152cm" svg:y="24.391cm" svg:viewBox="0 0 1030 1" draw:points="0,0 1030,0 1030,1 0,1">
          <text:p/>
        </draw:polygon>
        <draw:polygon draw:style-name="gr44" draw:text-style-name="P44" draw:layer="layout" svg:width="1.029cm" svg:height="0cm" svg:x="5.152cm" svg:y="24.392cm" svg:viewBox="0 0 1030 1" draw:points="0,0 1030,0 1030,1 0,1">
          <text:p/>
        </draw:polygon>
        <draw:polygon draw:style-name="gr44" draw:text-style-name="P44" draw:layer="layout" svg:width="1.029cm" svg:height="0cm" svg:x="5.152cm" svg:y="24.393cm" svg:viewBox="0 0 1030 1" draw:points="0,0 1030,0 1030,1 0,1">
          <text:p/>
        </draw:polygon>
        <draw:polygon draw:style-name="gr45" draw:text-style-name="P45" draw:layer="layout" svg:width="1.029cm" svg:height="0cm" svg:x="5.152cm" svg:y="24.394cm" svg:viewBox="0 0 1030 1" draw:points="0,0 1030,0 1030,1 0,1">
          <text:p/>
        </draw:polygon>
        <draw:polygon draw:style-name="gr46" draw:text-style-name="P46" draw:layer="layout" svg:width="1.029cm" svg:height="0cm" svg:x="5.152cm" svg:y="24.395cm" svg:viewBox="0 0 1030 1" draw:points="0,0 1030,0 1030,1 0,1">
          <text:p/>
        </draw:polygon>
        <draw:polygon draw:style-name="gr47" draw:text-style-name="P47" draw:layer="layout" svg:width="1.029cm" svg:height="0cm" svg:x="5.152cm" svg:y="24.396cm" svg:viewBox="0 0 1030 1" draw:points="0,0 1030,0 1030,1 0,1">
          <text:p/>
        </draw:polygon>
        <draw:polygon draw:style-name="gr47" draw:text-style-name="P47" draw:layer="layout" svg:width="1.03cm" svg:height="0.003cm" svg:x="5.152cm" svg:y="24.397cm" svg:viewBox="0 0 1031 4" draw:points="0,0 1031,0 1031,4 0,4">
          <text:p/>
        </draw:polygon>
        <draw:polygon draw:style-name="gr48" draw:text-style-name="P48" draw:layer="layout" svg:width="1.03cm" svg:height="0.003cm" svg:x="5.152cm" svg:y="24.399cm" svg:viewBox="0 0 1031 4" draw:points="0,0 1031,0 1031,4 0,4">
          <text:p/>
        </draw:polygon>
        <draw:polygon draw:style-name="gr48" draw:text-style-name="P48" draw:layer="layout" svg:width="1.03cm" svg:height="0.003cm" svg:x="5.152cm" svg:y="24.401cm" svg:viewBox="0 0 1031 4" draw:points="0,0 1031,0 1031,4 0,4">
          <text:p/>
        </draw:polygon>
        <draw:polygon draw:style-name="gr49" draw:text-style-name="P49" draw:layer="layout" svg:width="1.03cm" svg:height="0.003cm" svg:x="5.152cm" svg:y="24.403cm" svg:viewBox="0 0 1031 4" draw:points="0,0 1031,0 1031,4 0,4">
          <text:p/>
        </draw:polygon>
        <draw:polygon draw:style-name="gr49" draw:text-style-name="P49" draw:layer="layout" svg:width="1.03cm" svg:height="0.003cm" svg:x="5.152cm" svg:y="24.405cm" svg:viewBox="0 0 1031 4" draw:points="0,0 1031,0 1031,4 0,4">
          <text:p/>
        </draw:polygon>
        <draw:polygon draw:style-name="gr50" draw:text-style-name="P50" draw:layer="layout" svg:width="1.03cm" svg:height="0.003cm" svg:x="5.152cm" svg:y="24.407cm" svg:viewBox="0 0 1031 4" draw:points="0,0 1031,0 1031,4 0,4">
          <text:p/>
        </draw:polygon>
        <draw:polygon draw:style-name="gr50" draw:text-style-name="P50" draw:layer="layout" svg:width="1.03cm" svg:height="0.003cm" svg:x="5.152cm" svg:y="24.409cm" svg:viewBox="0 0 1031 4" draw:points="0,0 1031,0 1031,4 0,4">
          <text:p/>
        </draw:polygon>
        <draw:polygon draw:style-name="gr51" draw:text-style-name="P51" draw:layer="layout" svg:width="1.03cm" svg:height="0.003cm" svg:x="5.152cm" svg:y="24.411cm" svg:viewBox="0 0 1031 4" draw:points="0,0 1031,0 1031,4 0,4">
          <text:p/>
        </draw:polygon>
        <draw:polygon draw:style-name="gr51" draw:text-style-name="P51" draw:layer="layout" svg:width="1.03cm" svg:height="0.003cm" svg:x="5.152cm" svg:y="24.413cm" svg:viewBox="0 0 1031 4" draw:points="0,0 1031,0 1031,4 0,4">
          <text:p/>
        </draw:polygon>
        <draw:polygon draw:style-name="gr52" draw:text-style-name="P52" draw:layer="layout" svg:width="1.03cm" svg:height="0.003cm" svg:x="5.152cm" svg:y="24.415cm" svg:viewBox="0 0 1031 4" draw:points="0,0 1031,0 1031,4 0,4">
          <text:p/>
        </draw:polygon>
        <draw:polygon draw:style-name="gr53" draw:text-style-name="P53" draw:layer="layout" svg:width="1.03cm" svg:height="0.003cm" svg:x="5.152cm" svg:y="24.417cm" svg:viewBox="0 0 1031 4" draw:points="0,0 1031,0 1031,4 0,4">
          <text:p/>
        </draw:polygon>
        <draw:polygon draw:style-name="gr54" draw:text-style-name="P54" draw:layer="layout" svg:width="1.03cm" svg:height="0.003cm" svg:x="5.152cm" svg:y="24.419cm" svg:viewBox="0 0 1031 4" draw:points="0,0 1031,0 1031,4 0,4">
          <text:p/>
        </draw:polygon>
        <draw:polygon draw:style-name="gr55" draw:text-style-name="P55" draw:layer="layout" svg:width="1.03cm" svg:height="0.001cm" svg:x="5.152cm" svg:y="24.421cm" svg:viewBox="0 0 1031 2" draw:points="0,0 1031,0 1031,2 0,2">
          <text:p/>
        </draw:polygon>
        <draw:polygon draw:style-name="gr56" draw:text-style-name="P56" draw:layer="layout" svg:width="1.03cm" svg:height="0.003cm" svg:x="5.152cm" svg:y="24.422cm" svg:viewBox="0 0 1031 4" draw:points="0,0 1031,0 1031,4 0,4">
          <text:p/>
        </draw:polygon>
        <draw:polygon draw:style-name="gr57" draw:text-style-name="P57" draw:layer="layout" svg:width="1.03cm" svg:height="0.003cm" svg:x="5.152cm" svg:y="24.424cm" svg:viewBox="0 0 1031 4" draw:points="0,0 1031,0 1031,4 0,4">
          <text:p/>
        </draw:polygon>
        <draw:polygon draw:style-name="gr58" draw:text-style-name="P58" draw:layer="layout" svg:width="1.03cm" svg:height="0.003cm" svg:x="5.152cm" svg:y="24.426cm" svg:viewBox="0 0 1031 4" draw:points="0,0 1031,0 1031,4 0,4">
          <text:p/>
        </draw:polygon>
        <draw:polygon draw:style-name="gr59" draw:text-style-name="P59" draw:layer="layout" svg:width="1.03cm" svg:height="0.003cm" svg:x="5.152cm" svg:y="24.428cm" svg:viewBox="0 0 1031 4" draw:points="0,0 1031,0 1031,4 0,4">
          <text:p/>
        </draw:polygon>
        <draw:polygon draw:style-name="gr60" draw:text-style-name="P60" draw:layer="layout" svg:width="1.03cm" svg:height="0.003cm" svg:x="5.152cm" svg:y="24.43cm" svg:viewBox="0 0 1031 4" draw:points="0,0 1031,0 1031,4 0,4">
          <text:p/>
        </draw:polygon>
        <draw:polygon draw:style-name="gr61" draw:text-style-name="P61" draw:layer="layout" svg:width="1.03cm" svg:height="0.003cm" svg:x="5.152cm" svg:y="24.432cm" svg:viewBox="0 0 1031 4" draw:points="0,0 1031,0 1031,4 0,4">
          <text:p/>
        </draw:polygon>
        <draw:polygon draw:style-name="gr62" draw:text-style-name="P62" draw:layer="layout" svg:width="1.03cm" svg:height="0.003cm" svg:x="5.152cm" svg:y="24.434cm" svg:viewBox="0 0 1031 4" draw:points="0,0 1031,0 1031,4 0,4">
          <text:p/>
        </draw:polygon>
        <draw:polygon draw:style-name="gr63" draw:text-style-name="P63" draw:layer="layout" svg:width="1.03cm" svg:height="0.003cm" svg:x="5.152cm" svg:y="24.436cm" svg:viewBox="0 0 1031 4" draw:points="0,0 1031,0 1031,4 0,4">
          <text:p/>
        </draw:polygon>
        <draw:polygon draw:style-name="gr64" draw:text-style-name="P64" draw:layer="layout" svg:width="1.03cm" svg:height="0.003cm" svg:x="5.152cm" svg:y="24.438cm" svg:viewBox="0 0 1031 4" draw:points="0,0 1031,0 1031,4 0,4">
          <text:p/>
        </draw:polygon>
        <draw:polygon draw:style-name="gr65" draw:text-style-name="P65" draw:layer="layout" svg:width="1.03cm" svg:height="0.003cm" svg:x="5.152cm" svg:y="24.44cm" svg:viewBox="0 0 1031 4" draw:points="0,0 1031,0 1031,4 0,4">
          <text:p/>
        </draw:polygon>
        <draw:polygon draw:style-name="gr66" draw:text-style-name="P66" draw:layer="layout" svg:width="1.03cm" svg:height="0.003cm" svg:x="5.152cm" svg:y="24.442cm" svg:viewBox="0 0 1031 4" draw:points="0,0 1031,0 1031,4 0,4">
          <text:p/>
        </draw:polygon>
        <draw:polygon draw:style-name="gr66" draw:text-style-name="P66" draw:layer="layout" svg:width="1.03cm" svg:height="0.003cm" svg:x="5.152cm" svg:y="24.444cm" svg:viewBox="0 0 1031 4" draw:points="0,0 1031,0 1031,4 0,4">
          <text:p/>
        </draw:polygon>
        <draw:polygon draw:style-name="gr67" draw:text-style-name="P67" draw:layer="layout" svg:width="1.03cm" svg:height="0.003cm" svg:x="5.152cm" svg:y="24.446cm" svg:viewBox="0 0 1031 4" draw:points="0,0 1031,0 1031,4 0,4">
          <text:p/>
        </draw:polygon>
        <draw:polygon draw:style-name="gr67" draw:text-style-name="P67" draw:layer="layout" svg:width="1.03cm" svg:height="0.003cm" svg:x="5.152cm" svg:y="24.448cm" svg:viewBox="0 0 1031 4" draw:points="0,0 1031,0 1031,4 0,4">
          <text:p/>
        </draw:polygon>
        <draw:polygon draw:style-name="gr68" draw:text-style-name="P68" draw:layer="layout" svg:width="1.03cm" svg:height="0.003cm" svg:x="5.152cm" svg:y="24.45cm" svg:viewBox="0 0 1031 4" draw:points="0,0 1031,0 1031,4 0,4">
          <text:p/>
        </draw:polygon>
        <draw:polygon draw:style-name="gr68" draw:text-style-name="P68" draw:layer="layout" svg:width="1.03cm" svg:height="0.003cm" svg:x="5.152cm" svg:y="24.452cm" svg:viewBox="0 0 1031 4" draw:points="0,0 1031,0 1031,4 0,4">
          <text:p/>
        </draw:polygon>
        <draw:polygon draw:style-name="gr69" draw:text-style-name="P69" draw:layer="layout" svg:width="1.03cm" svg:height="0.001cm" svg:x="5.152cm" svg:y="24.454cm" svg:viewBox="0 0 1031 2" draw:points="0,0 1031,0 1031,2 0,2">
          <text:p/>
        </draw:polygon>
        <draw:polygon draw:style-name="gr69" draw:text-style-name="P69" draw:layer="layout" svg:width="1.03cm" svg:height="0.003cm" svg:x="5.152cm" svg:y="24.455cm" svg:viewBox="0 0 1031 4" draw:points="0,0 1031,0 1031,4 0,4">
          <text:p/>
        </draw:polygon>
        <draw:polygon draw:style-name="gr70" draw:text-style-name="P70" draw:layer="layout" svg:width="1.03cm" svg:height="0.003cm" svg:x="5.152cm" svg:y="24.457cm" svg:viewBox="0 0 1031 4" draw:points="0,0 1031,0 1031,4 0,4">
          <text:p/>
        </draw:polygon>
        <draw:polygon draw:style-name="gr6" draw:text-style-name="P6" draw:layer="layout" svg:width="1.03cm" svg:height="0.004cm" svg:x="9.767cm" svg:y="23.94cm" svg:viewBox="0 0 1031 5" draw:points="0,0 1031,0 1031,5 0,5">
          <text:p/>
        </draw:polygon>
        <draw:polygon draw:style-name="gr7" draw:text-style-name="P7" draw:layer="layout" svg:width="1.03cm" svg:height="0.004cm" svg:x="9.767cm" svg:y="23.944cm" svg:viewBox="0 0 1031 5" draw:points="0,0 1031,0 1031,5 0,5">
          <text:p/>
        </draw:polygon>
        <draw:polygon draw:style-name="gr8" draw:text-style-name="P8" draw:layer="layout" svg:width="1.03cm" svg:height="0.004cm" svg:x="9.767cm" svg:y="23.948cm" svg:viewBox="0 0 1031 5" draw:points="0,0 1031,0 1031,5 0,5">
          <text:p/>
        </draw:polygon>
        <draw:polygon draw:style-name="gr9" draw:text-style-name="P9" draw:layer="layout" svg:width="1.03cm" svg:height="0.004cm" svg:x="9.767cm" svg:y="23.952cm" svg:viewBox="0 0 1031 5" draw:points="0,0 1031,0 1031,5 0,5">
          <text:p/>
        </draw:polygon>
        <draw:polygon draw:style-name="gr9" draw:text-style-name="P9" draw:layer="layout" svg:width="1.03cm" svg:height="0.004cm" svg:x="9.767cm" svg:y="23.956cm" svg:viewBox="0 0 1031 5" draw:points="0,0 1031,0 1031,5 0,5">
          <text:p/>
        </draw:polygon>
        <draw:polygon draw:style-name="gr10" draw:text-style-name="P10" draw:layer="layout" svg:width="1.03cm" svg:height="0.004cm" svg:x="9.767cm" svg:y="23.96cm" svg:viewBox="0 0 1031 5" draw:points="0,0 1031,0 1031,5 0,5">
          <text:p/>
        </draw:polygon>
        <draw:polygon draw:style-name="gr10" draw:text-style-name="P10" draw:layer="layout" svg:width="1.03cm" svg:height="0.004cm" svg:x="9.767cm" svg:y="23.964cm" svg:viewBox="0 0 1031 5" draw:points="0,0 1031,0 1031,5 0,5">
          <text:p/>
        </draw:polygon>
        <draw:polygon draw:style-name="gr11" draw:text-style-name="P11" draw:layer="layout" svg:width="1.03cm" svg:height="0.004cm" svg:x="9.767cm" svg:y="23.968cm" svg:viewBox="0 0 1031 5" draw:points="0,0 1031,0 1031,5 0,5">
          <text:p/>
        </draw:polygon>
        <draw:polygon draw:style-name="gr13" draw:text-style-name="P13" draw:layer="layout" svg:width="1.03cm" svg:height="0.005cm" svg:x="9.767cm" svg:y="23.972cm" svg:viewBox="0 0 1031 6" draw:points="0,0 1031,0 1031,6 0,6">
          <text:p/>
        </draw:polygon>
        <draw:polygon draw:style-name="gr13" draw:text-style-name="P13" draw:layer="layout" svg:width="1.03cm" svg:height="0.004cm" svg:x="9.767cm" svg:y="23.977cm" svg:viewBox="0 0 1031 5" draw:points="0,0 1031,0 1031,5 0,5">
          <text:p/>
        </draw:polygon>
        <draw:polygon draw:style-name="gr14" draw:text-style-name="P14" draw:layer="layout" svg:width="1.03cm" svg:height="0.004cm" svg:x="9.767cm" svg:y="23.981cm" svg:viewBox="0 0 1031 5" draw:points="0,0 1031,0 1031,5 0,5">
          <text:p/>
        </draw:polygon>
        <draw:polygon draw:style-name="gr14" draw:text-style-name="P14" draw:layer="layout" svg:width="1.03cm" svg:height="0.004cm" svg:x="9.767cm" svg:y="23.985cm" svg:viewBox="0 0 1031 5" draw:points="0,0 1031,0 1031,5 0,5">
          <text:p/>
        </draw:polygon>
        <draw:polygon draw:style-name="gr15" draw:text-style-name="P15" draw:layer="layout" svg:width="1.03cm" svg:height="0.004cm" svg:x="9.767cm" svg:y="23.989cm" svg:viewBox="0 0 1031 5" draw:points="0,0 1031,0 1031,5 0,5">
          <text:p/>
        </draw:polygon>
        <draw:polygon draw:style-name="gr15" draw:text-style-name="P15" draw:layer="layout" svg:width="1.03cm" svg:height="0.004cm" svg:x="9.767cm" svg:y="23.993cm" svg:viewBox="0 0 1031 5" draw:points="0,0 1031,0 1031,5 0,5">
          <text:p/>
        </draw:polygon>
        <draw:polygon draw:style-name="gr16" draw:text-style-name="P16" draw:layer="layout" svg:width="1.03cm" svg:height="0.004cm" svg:x="9.767cm" svg:y="23.997cm" svg:viewBox="0 0 1031 5" draw:points="0,0 1031,0 1031,5 0,5">
          <text:p/>
        </draw:polygon>
        <draw:polygon draw:style-name="gr17" draw:text-style-name="P17" draw:layer="layout" svg:width="1.03cm" svg:height="0.004cm" svg:x="9.767cm" svg:y="24.001cm" svg:viewBox="0 0 1031 5" draw:points="0,0 1031,0 1031,5 0,5">
          <text:p/>
        </draw:polygon>
        <draw:polygon draw:style-name="gr18" draw:text-style-name="P18" draw:layer="layout" svg:width="1.03cm" svg:height="0.004cm" svg:x="9.767cm" svg:y="24.005cm" svg:viewBox="0 0 1031 5" draw:points="0,0 1031,0 1031,5 0,5">
          <text:p/>
        </draw:polygon>
        <draw:polygon draw:style-name="gr18" draw:text-style-name="P18" draw:layer="layout" svg:width="1.03cm" svg:height="0.004cm" svg:x="9.767cm" svg:y="24.009cm" svg:viewBox="0 0 1031 5" draw:points="0,0 1031,0 1031,5 0,5">
          <text:p/>
        </draw:polygon>
        <draw:polygon draw:style-name="gr19" draw:text-style-name="P19" draw:layer="layout" svg:width="1.03cm" svg:height="0.004cm" svg:x="9.767cm" svg:y="24.013cm" svg:viewBox="0 0 1031 5" draw:points="0,0 1031,0 1031,5 0,5">
          <text:p/>
        </draw:polygon>
        <draw:polygon draw:style-name="gr20" draw:text-style-name="P20" draw:layer="layout" svg:width="1.03cm" svg:height="0.004cm" svg:x="9.767cm" svg:y="24.017cm" svg:viewBox="0 0 1031 5" draw:points="0,0 1031,0 1031,5 0,5">
          <text:p/>
        </draw:polygon>
        <draw:polygon draw:style-name="gr21" draw:text-style-name="P21" draw:layer="layout" svg:width="1.03cm" svg:height="0.004cm" svg:x="9.767cm" svg:y="24.021cm" svg:viewBox="0 0 1031 5" draw:points="0,0 1031,0 1031,5 0,5">
          <text:p/>
        </draw:polygon>
        <draw:polygon draw:style-name="gr21" draw:text-style-name="P21" draw:layer="layout" svg:width="1.03cm" svg:height="0.004cm" svg:x="9.767cm" svg:y="24.025cm" svg:viewBox="0 0 1031 5" draw:points="0,0 1031,0 1031,5 0,5">
          <text:p/>
        </draw:polygon>
        <draw:polygon draw:style-name="gr22" draw:text-style-name="P22" draw:layer="layout" svg:width="1.03cm" svg:height="0.004cm" svg:x="9.767cm" svg:y="24.029cm" svg:viewBox="0 0 1031 5" draw:points="0,0 1031,0 1031,5 0,5">
          <text:p/>
        </draw:polygon>
        <draw:polygon draw:style-name="gr22" draw:text-style-name="P22" draw:layer="layout" svg:width="1.03cm" svg:height="0.004cm" svg:x="9.767cm" svg:y="24.033cm" svg:viewBox="0 0 1031 5" draw:points="0,0 1031,0 1031,5 0,5">
          <text:p/>
        </draw:polygon>
        <draw:polygon draw:style-name="gr23" draw:text-style-name="P23" draw:layer="layout" svg:width="1.03cm" svg:height="0.004cm" svg:x="9.767cm" svg:y="24.037cm" svg:viewBox="0 0 1031 5" draw:points="0,0 1031,0 1031,5 0,5">
          <text:p/>
        </draw:polygon>
        <draw:polygon draw:style-name="gr24" draw:text-style-name="P24" draw:layer="layout" svg:width="1.03cm" svg:height="0.006cm" svg:x="9.767cm" svg:y="24.041cm" svg:viewBox="0 0 1031 7" draw:points="0,0 1031,0 1031,7 0,7">
          <text:p/>
        </draw:polygon>
        <draw:polygon draw:style-name="gr24" draw:text-style-name="P24" draw:layer="layout" svg:width="1.03cm" svg:height="0.004cm" svg:x="9.767cm" svg:y="24.046cm" svg:viewBox="0 0 1031 5" draw:points="0,0 1031,0 1031,5 0,5">
          <text:p/>
        </draw:polygon>
        <draw:polygon draw:style-name="gr25" draw:text-style-name="P25" draw:layer="layout" svg:width="1.03cm" svg:height="0.004cm" svg:x="9.767cm" svg:y="24.05cm" svg:viewBox="0 0 1031 5" draw:points="0,0 1031,0 1031,5 0,5">
          <text:p/>
        </draw:polygon>
        <draw:polygon draw:style-name="gr25" draw:text-style-name="P25" draw:layer="layout" svg:width="1.03cm" svg:height="0.004cm" svg:x="9.767cm" svg:y="24.054cm" svg:viewBox="0 0 1031 5" draw:points="0,0 1031,0 1031,5 0,5">
          <text:p/>
        </draw:polygon>
        <draw:polygon draw:style-name="gr26" draw:text-style-name="P26" draw:layer="layout" svg:width="1.03cm" svg:height="0.004cm" svg:x="9.767cm" svg:y="24.058cm" svg:viewBox="0 0 1031 5" draw:points="0,0 1031,0 1031,5 0,5">
          <text:p/>
        </draw:polygon>
        <draw:polygon draw:style-name="gr26" draw:text-style-name="P26" draw:layer="layout" svg:width="1.03cm" svg:height="0.004cm" svg:x="9.767cm" svg:y="24.062cm" svg:viewBox="0 0 1031 5" draw:points="0,0 1031,0 1031,5 0,5">
          <text:p/>
        </draw:polygon>
        <draw:polygon draw:style-name="gr27" draw:text-style-name="P27" draw:layer="layout" svg:width="1.03cm" svg:height="0.004cm" svg:x="9.767cm" svg:y="24.066cm" svg:viewBox="0 0 1031 5" draw:points="0,0 1031,0 1031,5 0,5">
          <text:p/>
        </draw:polygon>
        <draw:polygon draw:style-name="gr28" draw:text-style-name="P28" draw:layer="layout" svg:width="1.03cm" svg:height="0.004cm" svg:x="9.767cm" svg:y="24.07cm" svg:viewBox="0 0 1031 5" draw:points="0,0 1031,0 1031,5 0,5">
          <text:p/>
        </draw:polygon>
        <draw:polygon draw:style-name="gr29" draw:text-style-name="P29" draw:layer="layout" svg:width="1.03cm" svg:height="0.004cm" svg:x="9.767cm" svg:y="24.074cm" svg:viewBox="0 0 1031 5" draw:points="0,0 1031,0 1031,5 0,5">
          <text:p/>
        </draw:polygon>
        <draw:polygon draw:style-name="gr29" draw:text-style-name="P29" draw:layer="layout" svg:width="1.03cm" svg:height="0.004cm" svg:x="9.767cm" svg:y="24.078cm" svg:viewBox="0 0 1031 5" draw:points="0,0 1031,0 1031,5 0,5">
          <text:p/>
        </draw:polygon>
        <draw:polygon draw:style-name="gr30" draw:text-style-name="P30" draw:layer="layout" svg:width="1.03cm" svg:height="0.004cm" svg:x="9.767cm" svg:y="24.082cm" svg:viewBox="0 0 1031 5" draw:points="0,0 1031,0 1031,5 0,5">
          <text:p/>
        </draw:polygon>
        <draw:polygon draw:style-name="gr30" draw:text-style-name="P30" draw:layer="layout" svg:width="1.03cm" svg:height="0.004cm" svg:x="9.767cm" svg:y="24.086cm" svg:viewBox="0 0 1031 5" draw:points="0,0 1031,0 1031,5 0,5">
          <text:p/>
        </draw:polygon>
        <draw:polygon draw:style-name="gr31" draw:text-style-name="P31" draw:layer="layout" svg:width="1.03cm" svg:height="0.004cm" svg:x="9.767cm" svg:y="24.09cm" svg:viewBox="0 0 1031 5" draw:points="0,0 1031,0 1031,5 0,5">
          <text:p/>
        </draw:polygon>
        <draw:polygon draw:style-name="gr31" draw:text-style-name="P31" draw:layer="layout" svg:width="1.03cm" svg:height="0.004cm" svg:x="9.767cm" svg:y="24.094cm" svg:viewBox="0 0 1031 5" draw:points="0,0 1031,0 1031,5 0,5">
          <text:p/>
        </draw:polygon>
        <draw:polygon draw:style-name="gr32" draw:text-style-name="P32" draw:layer="layout" svg:width="1.03cm" svg:height="0.004cm" svg:x="9.767cm" svg:y="24.098cm" svg:viewBox="0 0 1031 5" draw:points="0,0 1031,0 1031,5 0,5">
          <text:p/>
        </draw:polygon>
        <draw:polygon draw:style-name="gr33" draw:text-style-name="P33" draw:layer="layout" svg:width="1.03cm" svg:height="0.004cm" svg:x="9.767cm" svg:y="24.102cm" svg:viewBox="0 0 1031 5" draw:points="0,0 1031,0 1031,5 0,5">
          <text:p/>
        </draw:polygon>
        <draw:polygon draw:style-name="gr33" draw:text-style-name="P33" draw:layer="layout" svg:width="1.03cm" svg:height="0.004cm" svg:x="9.767cm" svg:y="24.106cm" svg:viewBox="0 0 1031 5" draw:points="0,0 1031,0 1031,5 0,5">
          <text:p/>
        </draw:polygon>
        <draw:polygon draw:style-name="gr34" draw:text-style-name="P34" draw:layer="layout" svg:width="1.03cm" svg:height="0.004cm" svg:x="9.767cm" svg:y="24.11cm" svg:viewBox="0 0 1031 5" draw:points="0,0 1031,0 1031,5 0,5">
          <text:p/>
        </draw:polygon>
        <draw:polygon draw:style-name="gr34" draw:text-style-name="P34" draw:layer="layout" svg:width="1.03cm" svg:height="0.005cm" svg:x="9.767cm" svg:y="24.114cm" svg:viewBox="0 0 1031 6" draw:points="0,0 1031,0 1031,6 0,6">
          <text:p/>
        </draw:polygon>
        <draw:polygon draw:style-name="gr35" draw:text-style-name="P35" draw:layer="layout" svg:width="1.03cm" svg:height="0.004cm" svg:x="9.767cm" svg:y="24.119cm" svg:viewBox="0 0 1031 5" draw:points="0,0 1031,0 1031,5 0,5">
          <text:p/>
        </draw:polygon>
        <draw:polygon draw:style-name="gr71" draw:text-style-name="P71" draw:layer="layout" svg:width="1.03cm" svg:height="0.004cm" svg:x="9.767cm" svg:y="24.123cm" svg:viewBox="0 0 1031 5" draw:points="0,0 1031,0 1031,5 0,5">
          <text:p/>
        </draw:polygon>
        <draw:polygon draw:style-name="gr36" draw:text-style-name="P36" draw:layer="layout" svg:width="1.03cm" svg:height="0.004cm" svg:x="9.767cm" svg:y="24.127cm" svg:viewBox="0 0 1031 5" draw:points="0,0 1031,0 1031,5 0,5">
          <text:p/>
        </draw:polygon>
        <draw:polygon draw:style-name="gr36" draw:text-style-name="P36" draw:layer="layout" svg:width="1.03cm" svg:height="0.004cm" svg:x="9.767cm" svg:y="24.131cm" svg:viewBox="0 0 1031 5" draw:points="0,0 1031,0 1031,5 0,5">
          <text:p/>
        </draw:polygon>
        <draw:polygon draw:style-name="gr37" draw:text-style-name="P37" draw:layer="layout" svg:width="1.03cm" svg:height="0.004cm" svg:x="9.767cm" svg:y="24.135cm" svg:viewBox="0 0 1031 5" draw:points="0,0 1031,0 1031,5 0,5">
          <text:p/>
        </draw:polygon>
        <draw:polygon draw:style-name="gr38" draw:text-style-name="P38" draw:layer="layout" svg:width="1.03cm" svg:height="0.004cm" svg:x="9.767cm" svg:y="24.139cm" svg:viewBox="0 0 1031 5" draw:points="0,0 1031,0 1031,5 0,5">
          <text:p/>
        </draw:polygon>
        <draw:polygon draw:style-name="gr39" draw:text-style-name="P39" draw:layer="layout" svg:width="1.03cm" svg:height="0.004cm" svg:x="9.767cm" svg:y="24.143cm" svg:viewBox="0 0 1031 5" draw:points="0,0 1031,0 1031,5 0,5">
          <text:p/>
        </draw:polygon>
        <draw:polygon draw:style-name="gr39" draw:text-style-name="P39" draw:layer="layout" svg:width="1.03cm" svg:height="0.004cm" svg:x="9.767cm" svg:y="24.147cm" svg:viewBox="0 0 1031 5" draw:points="0,0 1031,0 1031,5 0,5">
          <text:p/>
        </draw:polygon>
        <draw:polygon draw:style-name="gr40" draw:text-style-name="P40" draw:layer="layout" svg:width="1.03cm" svg:height="0.004cm" svg:x="9.767cm" svg:y="24.151cm" svg:viewBox="0 0 1031 5" draw:points="0,0 1031,0 1031,5 0,5">
          <text:p/>
        </draw:polygon>
        <draw:polygon draw:style-name="gr40" draw:text-style-name="P40" draw:layer="layout" svg:width="1.03cm" svg:height="0.004cm" svg:x="9.767cm" svg:y="24.155cm" svg:viewBox="0 0 1031 5" draw:points="0,0 1031,0 1031,5 0,5">
          <text:p/>
        </draw:polygon>
        <draw:polygon draw:style-name="gr41" draw:text-style-name="P41" draw:layer="layout" svg:width="1.03cm" svg:height="0.004cm" svg:x="9.767cm" svg:y="24.159cm" svg:viewBox="0 0 1031 5" draw:points="0,0 1031,0 1031,5 0,5">
          <text:p/>
        </draw:polygon>
        <draw:polygon draw:style-name="gr41" draw:text-style-name="P41" draw:layer="layout" svg:width="1.03cm" svg:height="0.004cm" svg:x="9.767cm" svg:y="24.163cm" svg:viewBox="0 0 1031 5" draw:points="0,0 1031,0 1031,5 0,5">
          <text:p/>
        </draw:polygon>
        <draw:polygon draw:style-name="gr42" draw:text-style-name="P42" draw:layer="layout" svg:width="1.03cm" svg:height="0.004cm" svg:x="9.767cm" svg:y="24.167cm" svg:viewBox="0 0 1031 5" draw:points="0,0 1031,0 1031,5 0,5">
          <text:p/>
        </draw:polygon>
        <draw:polygon draw:style-name="gr43" draw:text-style-name="P43" draw:layer="layout" svg:width="1.03cm" svg:height="0.004cm" svg:x="9.767cm" svg:y="24.171cm" svg:viewBox="0 0 1031 5" draw:points="0,0 1031,0 1031,5 0,5">
          <text:p/>
        </draw:polygon>
        <draw:polygon draw:style-name="gr43" draw:text-style-name="P43" draw:layer="layout" svg:width="1.03cm" svg:height="0.004cm" svg:x="9.767cm" svg:y="24.175cm" svg:viewBox="0 0 1031 5" draw:points="0,0 1031,0 1031,5 0,5">
          <text:p/>
        </draw:polygon>
        <draw:polygon draw:style-name="gr44" draw:text-style-name="P44" draw:layer="layout" svg:width="1.03cm" svg:height="0.004cm" svg:x="9.767cm" svg:y="24.179cm" svg:viewBox="0 0 1031 5" draw:points="0,0 1031,0 1031,5 0,5">
          <text:p/>
        </draw:polygon>
        <draw:polygon draw:style-name="gr44" draw:text-style-name="P44" draw:layer="layout" svg:width="1.03cm" svg:height="0.005cm" svg:x="9.767cm" svg:y="24.183cm" svg:viewBox="0 0 1031 6" draw:points="0,0 1031,0 1031,6 0,6">
          <text:p/>
        </draw:polygon>
        <draw:polygon draw:style-name="gr45" draw:text-style-name="P45" draw:layer="layout" svg:width="1.03cm" svg:height="0.004cm" svg:x="9.767cm" svg:y="24.188cm" svg:viewBox="0 0 1031 5" draw:points="0,0 1031,0 1031,5 0,5">
          <text:p/>
        </draw:polygon>
        <draw:polygon draw:style-name="gr46" draw:text-style-name="P46" draw:layer="layout" svg:width="1.03cm" svg:height="0.004cm" svg:x="9.767cm" svg:y="24.192cm" svg:viewBox="0 0 1031 5" draw:points="0,0 1031,0 1031,5 0,5">
          <text:p/>
        </draw:polygon>
        <draw:polygon draw:style-name="gr47" draw:text-style-name="P47" draw:layer="layout" svg:width="1.03cm" svg:height="0.004cm" svg:x="9.767cm" svg:y="24.196cm" svg:viewBox="0 0 1031 5" draw:points="0,0 1031,0 1031,5 0,5">
          <text:p/>
        </draw:polygon>
        <draw:polygon draw:style-name="gr47" draw:text-style-name="P47" draw:layer="layout" svg:width="1.03cm" svg:height="0.008cm" svg:x="9.767cm" svg:y="24.2cm" svg:viewBox="0 0 1031 9" draw:points="0,0 1031,0 1031,9 0,9">
          <text:p/>
        </draw:polygon>
        <draw:polygon draw:style-name="gr48" draw:text-style-name="P48" draw:layer="layout" svg:width="1.03cm" svg:height="0.008cm" svg:x="9.767cm" svg:y="24.208cm" svg:viewBox="0 0 1031 9" draw:points="0,0 1031,0 1031,9 0,9">
          <text:p/>
        </draw:polygon>
        <draw:polygon draw:style-name="gr48" draw:text-style-name="P48" draw:layer="layout" svg:width="1.03cm" svg:height="0.008cm" svg:x="9.767cm" svg:y="24.216cm" svg:viewBox="0 0 1031 9" draw:points="0,0 1031,0 1031,9 0,9">
          <text:p/>
        </draw:polygon>
        <draw:polygon draw:style-name="gr49" draw:text-style-name="P49" draw:layer="layout" svg:width="1.03cm" svg:height="0.008cm" svg:x="9.767cm" svg:y="24.224cm" svg:viewBox="0 0 1031 9" draw:points="0,0 1031,0 1031,9 0,9">
          <text:p/>
        </draw:polygon>
        <draw:polygon draw:style-name="gr49" draw:text-style-name="P49" draw:layer="layout" svg:width="1.03cm" svg:height="0.008cm" svg:x="9.767cm" svg:y="24.232cm" svg:viewBox="0 0 1031 9" draw:points="0,0 1031,0 1031,9 0,9">
          <text:p/>
        </draw:polygon>
        <draw:polygon draw:style-name="gr50" draw:text-style-name="P50" draw:layer="layout" svg:width="1.03cm" svg:height="0.008cm" svg:x="9.767cm" svg:y="24.24cm" svg:viewBox="0 0 1031 9" draw:points="0,0 1031,0 1031,9 0,9">
          <text:p/>
        </draw:polygon>
        <draw:polygon draw:style-name="gr50" draw:text-style-name="P50" draw:layer="layout" svg:width="1.03cm" svg:height="0.008cm" svg:x="9.767cm" svg:y="24.248cm" svg:viewBox="0 0 1031 9" draw:points="0,0 1031,0 1031,9 0,9">
          <text:p/>
        </draw:polygon>
        <draw:polygon draw:style-name="gr51" draw:text-style-name="P51" draw:layer="layout" svg:width="1.03cm" svg:height="0.009cm" svg:x="9.767cm" svg:y="24.256cm" svg:viewBox="0 0 1031 10" draw:points="0,0 1031,0 1031,10 0,10">
          <text:p/>
        </draw:polygon>
        <draw:polygon draw:style-name="gr51" draw:text-style-name="P51" draw:layer="layout" svg:width="1.03cm" svg:height="0.008cm" svg:x="9.767cm" svg:y="24.265cm" svg:viewBox="0 0 1031 9" draw:points="0,0 1031,0 1031,9 0,9">
          <text:p/>
        </draw:polygon>
        <draw:polygon draw:style-name="gr52" draw:text-style-name="P52" draw:layer="layout" svg:width="1.03cm" svg:height="0.008cm" svg:x="9.767cm" svg:y="24.273cm" svg:viewBox="0 0 1031 9" draw:points="0,0 1031,0 1031,9 0,9">
          <text:p/>
        </draw:polygon>
        <draw:polygon draw:style-name="gr53" draw:text-style-name="P53" draw:layer="layout" svg:width="1.03cm" svg:height="0.008cm" svg:x="9.767cm" svg:y="24.281cm" svg:viewBox="0 0 1031 9" draw:points="0,0 1031,0 1031,9 0,9">
          <text:p/>
        </draw:polygon>
        <draw:polygon draw:style-name="gr54" draw:text-style-name="P54" draw:layer="layout" svg:width="1.03cm" svg:height="0.008cm" svg:x="9.767cm" svg:y="24.289cm" svg:viewBox="0 0 1031 9" draw:points="0,0 1031,0 1031,9 0,9">
          <text:p/>
        </draw:polygon>
        <draw:polygon draw:style-name="gr55" draw:text-style-name="P55" draw:layer="layout" svg:width="1.03cm" svg:height="0.008cm" svg:x="9.767cm" svg:y="24.297cm" svg:viewBox="0 0 1031 9" draw:points="0,0 1031,0 1031,9 0,9">
          <text:p/>
        </draw:polygon>
        <draw:polygon draw:style-name="gr56" draw:text-style-name="P56" draw:layer="layout" svg:width="1.03cm" svg:height="0.008cm" svg:x="9.767cm" svg:y="24.305cm" svg:viewBox="0 0 1031 9" draw:points="0,0 1031,0 1031,9 0,9">
          <text:p/>
        </draw:polygon>
        <draw:polygon draw:style-name="gr57" draw:text-style-name="P57" draw:layer="layout" svg:width="1.03cm" svg:height="0.008cm" svg:x="9.767cm" svg:y="24.313cm" svg:viewBox="0 0 1031 9" draw:points="0,0 1031,0 1031,9 0,9">
          <text:p/>
        </draw:polygon>
        <draw:polygon draw:style-name="gr58" draw:text-style-name="P58" draw:layer="layout" svg:width="1.03cm" svg:height="0.009cm" svg:x="9.767cm" svg:y="24.321cm" svg:viewBox="0 0 1031 10" draw:points="0,0 1031,0 1031,10 0,10">
          <text:p/>
        </draw:polygon>
        <draw:polygon draw:style-name="gr59" draw:text-style-name="P59" draw:layer="layout" svg:width="1.03cm" svg:height="0.008cm" svg:x="9.767cm" svg:y="24.33cm" svg:viewBox="0 0 1031 9" draw:points="0,0 1031,0 1031,9 0,9">
          <text:p/>
        </draw:polygon>
        <draw:polygon draw:style-name="gr60" draw:text-style-name="P60" draw:layer="layout" svg:width="1.03cm" svg:height="0.008cm" svg:x="9.767cm" svg:y="24.338cm" svg:viewBox="0 0 1031 9" draw:points="0,0 1031,0 1031,9 0,9">
          <text:p/>
        </draw:polygon>
        <draw:polygon draw:style-name="gr61" draw:text-style-name="P61" draw:layer="layout" svg:width="1.03cm" svg:height="0.008cm" svg:x="9.767cm" svg:y="24.346cm" svg:viewBox="0 0 1031 9" draw:points="0,0 1031,0 1031,9 0,9">
          <text:p/>
        </draw:polygon>
        <draw:polygon draw:style-name="gr62" draw:text-style-name="P62" draw:layer="layout" svg:width="1.03cm" svg:height="0.008cm" svg:x="9.767cm" svg:y="24.354cm" svg:viewBox="0 0 1031 9" draw:points="0,0 1031,0 1031,9 0,9">
          <text:p/>
        </draw:polygon>
        <draw:polygon draw:style-name="gr63" draw:text-style-name="P63" draw:layer="layout" svg:width="1.03cm" svg:height="0.008cm" svg:x="9.767cm" svg:y="24.362cm" svg:viewBox="0 0 1031 9" draw:points="0,0 1031,0 1031,9 0,9">
          <text:p/>
        </draw:polygon>
        <draw:polygon draw:style-name="gr64" draw:text-style-name="P64" draw:layer="layout" svg:width="1.03cm" svg:height="0.008cm" svg:x="9.767cm" svg:y="24.37cm" svg:viewBox="0 0 1031 9" draw:points="0,0 1031,0 1031,9 0,9">
          <text:p/>
        </draw:polygon>
        <draw:polygon draw:style-name="gr65" draw:text-style-name="P65" draw:layer="layout" svg:width="1.03cm" svg:height="0.008cm" svg:x="9.767cm" svg:y="24.378cm" svg:viewBox="0 0 1031 9" draw:points="0,0 1031,0 1031,9 0,9">
          <text:p/>
        </draw:polygon>
        <draw:polygon draw:style-name="gr66" draw:text-style-name="P66" draw:layer="layout" svg:width="1.03cm" svg:height="0.008cm" svg:x="9.767cm" svg:y="24.386cm" svg:viewBox="0 0 1031 9" draw:points="0,0 1031,0 1031,9 0,9">
          <text:p/>
        </draw:polygon>
        <draw:polygon draw:style-name="gr66" draw:text-style-name="P66" draw:layer="layout" svg:width="1.03cm" svg:height="0.009cm" svg:x="9.767cm" svg:y="24.394cm" svg:viewBox="0 0 1031 10" draw:points="0,0 1031,0 1031,10 0,10">
          <text:p/>
        </draw:polygon>
        <draw:polygon draw:style-name="gr67" draw:text-style-name="P67" draw:layer="layout" svg:width="1.03cm" svg:height="0.008cm" svg:x="9.767cm" svg:y="24.403cm" svg:viewBox="0 0 1031 9" draw:points="0,0 1031,0 1031,9 0,9">
          <text:p/>
        </draw:polygon>
        <draw:polygon draw:style-name="gr67" draw:text-style-name="P67" draw:layer="layout" svg:width="1.03cm" svg:height="0.008cm" svg:x="9.767cm" svg:y="24.411cm" svg:viewBox="0 0 1031 9" draw:points="0,0 1031,0 1031,9 0,9">
          <text:p/>
        </draw:polygon>
        <draw:polygon draw:style-name="gr68" draw:text-style-name="P68" draw:layer="layout" svg:width="1.03cm" svg:height="0.008cm" svg:x="9.767cm" svg:y="24.419cm" svg:viewBox="0 0 1031 9" draw:points="0,0 1031,0 1031,9 0,9">
          <text:p/>
        </draw:polygon>
        <draw:polygon draw:style-name="gr68" draw:text-style-name="P68" draw:layer="layout" svg:width="1.03cm" svg:height="0.008cm" svg:x="9.767cm" svg:y="24.427cm" svg:viewBox="0 0 1031 9" draw:points="0,0 1031,0 1031,9 0,9">
          <text:p/>
        </draw:polygon>
        <draw:polygon draw:style-name="gr69" draw:text-style-name="P69" draw:layer="layout" svg:width="1.03cm" svg:height="0.008cm" svg:x="9.767cm" svg:y="24.435cm" svg:viewBox="0 0 1031 9" draw:points="0,0 1031,0 1031,9 0,9">
          <text:p/>
        </draw:polygon>
        <draw:polygon draw:style-name="gr69" draw:text-style-name="P69" draw:layer="layout" svg:width="1.03cm" svg:height="0.008cm" svg:x="9.767cm" svg:y="24.443cm" svg:viewBox="0 0 1031 9" draw:points="0,0 1031,0 1031,9 0,9">
          <text:p/>
        </draw:polygon>
        <draw:polygon draw:style-name="gr70" draw:text-style-name="P70" draw:layer="layout" svg:width="1.03cm" svg:height="0.008cm" svg:x="9.767cm" svg:y="24.451cm" svg:viewBox="0 0 1031 9" draw:points="0,0 1031,0 1031,9 0,9">
          <text:p/>
        </draw:polygon>
        <draw:polygon draw:style-name="gr6" draw:text-style-name="P6" draw:layer="layout" svg:width="1.03cm" svg:height="0.02cm" svg:x="14.382cm" svg:y="21.942cm" svg:viewBox="0 0 1031 21" draw:points="0,0 1031,0 1031,21 0,21">
          <text:p/>
        </draw:polygon>
        <draw:polygon draw:style-name="gr7" draw:text-style-name="P7" draw:layer="layout" svg:width="1.03cm" svg:height="0.019cm" svg:x="14.382cm" svg:y="21.962cm" svg:viewBox="0 0 1031 20" draw:points="0,0 1031,0 1031,20 0,20">
          <text:p/>
        </draw:polygon>
        <draw:polygon draw:style-name="gr8" draw:text-style-name="P8" draw:layer="layout" svg:width="1.03cm" svg:height="0.02cm" svg:x="14.382cm" svg:y="21.981cm" svg:viewBox="0 0 1031 21" draw:points="0,0 1031,0 1031,21 0,21">
          <text:p/>
        </draw:polygon>
        <draw:polygon draw:style-name="gr9" draw:text-style-name="P9" draw:layer="layout" svg:width="1.03cm" svg:height="0.02cm" svg:x="14.382cm" svg:y="22.001cm" svg:viewBox="0 0 1031 21" draw:points="0,0 1031,0 1031,21 0,21">
          <text:p/>
        </draw:polygon>
        <draw:polygon draw:style-name="gr9" draw:text-style-name="P9" draw:layer="layout" svg:width="1.03cm" svg:height="0.019cm" svg:x="14.382cm" svg:y="22.021cm" svg:viewBox="0 0 1031 20" draw:points="0,0 1031,0 1031,20 0,20">
          <text:p/>
        </draw:polygon>
        <draw:polygon draw:style-name="gr10" draw:text-style-name="P10" draw:layer="layout" svg:width="1.03cm" svg:height="0.02cm" svg:x="14.382cm" svg:y="22.04cm" svg:viewBox="0 0 1031 21" draw:points="0,0 1031,0 1031,21 0,21">
          <text:p/>
        </draw:polygon>
        <draw:polygon draw:style-name="gr10" draw:text-style-name="P10" draw:layer="layout" svg:width="1.03cm" svg:height="0.02cm" svg:x="14.382cm" svg:y="22.06cm" svg:viewBox="0 0 1031 21" draw:points="0,0 1031,0 1031,21 0,21">
          <text:p/>
        </draw:polygon>
        <draw:polygon draw:style-name="gr11" draw:text-style-name="P11" draw:layer="layout" svg:width="1.03cm" svg:height="0.019cm" svg:x="14.382cm" svg:y="22.08cm" svg:viewBox="0 0 1031 20" draw:points="0,0 1031,0 1031,20 0,20">
          <text:p/>
        </draw:polygon>
        <draw:polygon draw:style-name="gr13" draw:text-style-name="P13" draw:layer="layout" svg:width="1.03cm" svg:height="0.02cm" svg:x="14.382cm" svg:y="22.099cm" svg:viewBox="0 0 1031 21" draw:points="0,0 1031,0 1031,21 0,21">
          <text:p/>
        </draw:polygon>
        <draw:polygon draw:style-name="gr13" draw:text-style-name="P13" draw:layer="layout" svg:width="1.03cm" svg:height="0.02cm" svg:x="14.382cm" svg:y="22.119cm" svg:viewBox="0 0 1031 21" draw:points="0,0 1031,0 1031,21 0,21">
          <text:p/>
        </draw:polygon>
        <draw:polygon draw:style-name="gr14" draw:text-style-name="P14" draw:layer="layout" svg:width="1.03cm" svg:height="0.019cm" svg:x="14.382cm" svg:y="22.139cm" svg:viewBox="0 0 1031 20" draw:points="0,0 1031,0 1031,20 0,20">
          <text:p/>
        </draw:polygon>
        <draw:polygon draw:style-name="gr14" draw:text-style-name="P14" draw:layer="layout" svg:width="1.03cm" svg:height="0.02cm" svg:x="14.382cm" svg:y="22.158cm" svg:viewBox="0 0 1031 21" draw:points="0,0 1031,0 1031,21 0,21">
          <text:p/>
        </draw:polygon>
        <draw:polygon draw:style-name="gr15" draw:text-style-name="P15" draw:layer="layout" svg:width="1.03cm" svg:height="0.02cm" svg:x="14.382cm" svg:y="22.178cm" svg:viewBox="0 0 1031 21" draw:points="0,0 1031,0 1031,21 0,21">
          <text:p/>
        </draw:polygon>
        <draw:polygon draw:style-name="gr15" draw:text-style-name="P15" draw:layer="layout" svg:width="1.03cm" svg:height="0.019cm" svg:x="14.382cm" svg:y="22.198cm" svg:viewBox="0 0 1031 20" draw:points="0,0 1031,0 1031,20 0,20">
          <text:p/>
        </draw:polygon>
        <draw:polygon draw:style-name="gr16" draw:text-style-name="P16" draw:layer="layout" svg:width="1.03cm" svg:height="0.02cm" svg:x="14.382cm" svg:y="22.217cm" svg:viewBox="0 0 1031 21" draw:points="0,0 1031,0 1031,21 0,21">
          <text:p/>
        </draw:polygon>
        <draw:polygon draw:style-name="gr17" draw:text-style-name="P17" draw:layer="layout" svg:width="1.03cm" svg:height="0.02cm" svg:x="14.382cm" svg:y="22.237cm" svg:viewBox="0 0 1031 21" draw:points="0,0 1031,0 1031,21 0,21">
          <text:p/>
        </draw:polygon>
        <draw:polygon draw:style-name="gr18" draw:text-style-name="P18" draw:layer="layout" svg:width="1.03cm" svg:height="0.019cm" svg:x="14.382cm" svg:y="22.257cm" svg:viewBox="0 0 1031 20" draw:points="0,0 1031,0 1031,20 0,20">
          <text:p/>
        </draw:polygon>
        <draw:polygon draw:style-name="gr18" draw:text-style-name="P18" draw:layer="layout" svg:width="1.03cm" svg:height="0.02cm" svg:x="14.382cm" svg:y="22.276cm" svg:viewBox="0 0 1031 21" draw:points="0,0 1031,0 1031,21 0,21">
          <text:p/>
        </draw:polygon>
        <draw:polygon draw:style-name="gr19" draw:text-style-name="P19" draw:layer="layout" svg:width="1.03cm" svg:height="0.021cm" svg:x="14.382cm" svg:y="22.296cm" svg:viewBox="0 0 1031 22" draw:points="0,0 1031,0 1031,22 0,22">
          <text:p/>
        </draw:polygon>
        <draw:polygon draw:style-name="gr20" draw:text-style-name="P20" draw:layer="layout" svg:width="1.03cm" svg:height="0.019cm" svg:x="14.382cm" svg:y="22.316cm" svg:viewBox="0 0 1031 20" draw:points="0,0 1031,0 1031,20 0,20">
          <text:p/>
        </draw:polygon>
        <draw:polygon draw:style-name="gr21" draw:text-style-name="P21" draw:layer="layout" svg:width="1.03cm" svg:height="0.02cm" svg:x="14.382cm" svg:y="22.335cm" svg:viewBox="0 0 1031 21" draw:points="0,0 1031,0 1031,21 0,21">
          <text:p/>
        </draw:polygon>
        <draw:polygon draw:style-name="gr21" draw:text-style-name="P21" draw:layer="layout" svg:width="1.03cm" svg:height="0.02cm" svg:x="14.382cm" svg:y="22.355cm" svg:viewBox="0 0 1031 21" draw:points="0,0 1031,0 1031,21 0,21">
          <text:p/>
        </draw:polygon>
        <draw:polygon draw:style-name="gr22" draw:text-style-name="P22" draw:layer="layout" svg:width="1.03cm" svg:height="0.019cm" svg:x="14.382cm" svg:y="22.375cm" svg:viewBox="0 0 1031 20" draw:points="0,0 1031,0 1031,20 0,20">
          <text:p/>
        </draw:polygon>
        <draw:polygon draw:style-name="gr22" draw:text-style-name="P22" draw:layer="layout" svg:width="1.03cm" svg:height="0.02cm" svg:x="14.382cm" svg:y="22.394cm" svg:viewBox="0 0 1031 21" draw:points="0,0 1031,0 1031,21 0,21">
          <text:p/>
        </draw:polygon>
        <draw:polygon draw:style-name="gr23" draw:text-style-name="P23" draw:layer="layout" svg:width="1.03cm" svg:height="0.02cm" svg:x="14.382cm" svg:y="22.414cm" svg:viewBox="0 0 1031 21" draw:points="0,0 1031,0 1031,21 0,21">
          <text:p/>
        </draw:polygon>
        <draw:polygon draw:style-name="gr24" draw:text-style-name="P24" draw:layer="layout" svg:width="1.03cm" svg:height="0.019cm" svg:x="14.382cm" svg:y="22.434cm" svg:viewBox="0 0 1031 20" draw:points="0,0 1031,0 1031,20 0,20">
          <text:p/>
        </draw:polygon>
        <draw:polygon draw:style-name="gr24" draw:text-style-name="P24" draw:layer="layout" svg:width="1.03cm" svg:height="0.02cm" svg:x="14.382cm" svg:y="22.453cm" svg:viewBox="0 0 1031 21" draw:points="0,0 1031,0 1031,21 0,21">
          <text:p/>
        </draw:polygon>
        <draw:polygon draw:style-name="gr25" draw:text-style-name="P25" draw:layer="layout" svg:width="1.03cm" svg:height="0.02cm" svg:x="14.382cm" svg:y="22.473cm" svg:viewBox="0 0 1031 21" draw:points="0,0 1031,0 1031,21 0,21">
          <text:p/>
        </draw:polygon>
        <draw:polygon draw:style-name="gr25" draw:text-style-name="P25" draw:layer="layout" svg:width="1.03cm" svg:height="0.019cm" svg:x="14.382cm" svg:y="22.493cm" svg:viewBox="0 0 1031 20" draw:points="0,0 1031,0 1031,20 0,20">
          <text:p/>
        </draw:polygon>
        <draw:polygon draw:style-name="gr26" draw:text-style-name="P26" draw:layer="layout" svg:width="1.03cm" svg:height="0.02cm" svg:x="14.382cm" svg:y="22.512cm" svg:viewBox="0 0 1031 21" draw:points="0,0 1031,0 1031,21 0,21">
          <text:p/>
        </draw:polygon>
        <draw:polygon draw:style-name="gr26" draw:text-style-name="P26" draw:layer="layout" svg:width="1.03cm" svg:height="0.02cm" svg:x="14.382cm" svg:y="22.532cm" svg:viewBox="0 0 1031 21" draw:points="0,0 1031,0 1031,21 0,21">
          <text:p/>
        </draw:polygon>
        <draw:polygon draw:style-name="gr27" draw:text-style-name="P27" draw:layer="layout" svg:width="1.03cm" svg:height="0.019cm" svg:x="14.382cm" svg:y="22.552cm" svg:viewBox="0 0 1031 20" draw:points="0,0 1031,0 1031,20 0,20">
          <text:p/>
        </draw:polygon>
        <draw:polygon draw:style-name="gr28" draw:text-style-name="P28" draw:layer="layout" svg:width="1.03cm" svg:height="0.02cm" svg:x="14.382cm" svg:y="22.571cm" svg:viewBox="0 0 1031 21" draw:points="0,0 1031,0 1031,21 0,21">
          <text:p/>
        </draw:polygon>
        <draw:polygon draw:style-name="gr29" draw:text-style-name="P29" draw:layer="layout" svg:width="1.03cm" svg:height="0.02cm" svg:x="14.382cm" svg:y="22.591cm" svg:viewBox="0 0 1031 21" draw:points="0,0 1031,0 1031,21 0,21">
          <text:p/>
        </draw:polygon>
        <draw:polygon draw:style-name="gr29" draw:text-style-name="P29" draw:layer="layout" svg:width="1.03cm" svg:height="0.019cm" svg:x="14.382cm" svg:y="22.611cm" svg:viewBox="0 0 1031 20" draw:points="0,0 1031,0 1031,20 0,20">
          <text:p/>
        </draw:polygon>
        <draw:polygon draw:style-name="gr30" draw:text-style-name="P30" draw:layer="layout" svg:width="1.03cm" svg:height="0.02cm" svg:x="14.382cm" svg:y="22.63cm" svg:viewBox="0 0 1031 21" draw:points="0,0 1031,0 1031,21 0,21">
          <text:p/>
        </draw:polygon>
        <draw:polygon draw:style-name="gr30" draw:text-style-name="P30" draw:layer="layout" svg:width="1.03cm" svg:height="0.02cm" svg:x="14.382cm" svg:y="22.65cm" svg:viewBox="0 0 1031 21" draw:points="0,0 1031,0 1031,21 0,21">
          <text:p/>
        </draw:polygon>
        <draw:polygon draw:style-name="gr31" draw:text-style-name="P31" draw:layer="layout" svg:width="1.03cm" svg:height="0.019cm" svg:x="14.382cm" svg:y="22.67cm" svg:viewBox="0 0 1031 20" draw:points="0,0 1031,0 1031,20 0,20">
          <text:p/>
        </draw:polygon>
        <draw:polygon draw:style-name="gr31" draw:text-style-name="P31" draw:layer="layout" svg:width="1.03cm" svg:height="0.02cm" svg:x="14.382cm" svg:y="22.689cm" svg:viewBox="0 0 1031 21" draw:points="0,0 1031,0 1031,21 0,21">
          <text:p/>
        </draw:polygon>
        <draw:polygon draw:style-name="gr32" draw:text-style-name="P32" draw:layer="layout" svg:width="1.03cm" svg:height="0.02cm" svg:x="14.382cm" svg:y="22.709cm" svg:viewBox="0 0 1031 21" draw:points="0,0 1031,0 1031,21 0,21">
          <text:p/>
        </draw:polygon>
        <draw:polygon draw:style-name="gr33" draw:text-style-name="P33" draw:layer="layout" svg:width="1.03cm" svg:height="0.019cm" svg:x="14.382cm" svg:y="22.729cm" svg:viewBox="0 0 1031 20" draw:points="0,0 1031,0 1031,20 0,20">
          <text:p/>
        </draw:polygon>
        <draw:polygon draw:style-name="gr33" draw:text-style-name="P33" draw:layer="layout" svg:width="1.03cm" svg:height="0.02cm" svg:x="14.382cm" svg:y="22.748cm" svg:viewBox="0 0 1031 21" draw:points="0,0 1031,0 1031,21 0,21">
          <text:p/>
        </draw:polygon>
        <draw:polygon draw:style-name="gr34" draw:text-style-name="P34" draw:layer="layout" svg:width="1.03cm" svg:height="0.02cm" svg:x="14.382cm" svg:y="22.768cm" svg:viewBox="0 0 1031 21" draw:points="0,0 1031,0 1031,21 0,21">
          <text:p/>
        </draw:polygon>
        <draw:polygon draw:style-name="gr34" draw:text-style-name="P34" draw:layer="layout" svg:width="1.03cm" svg:height="0.019cm" svg:x="14.382cm" svg:y="22.788cm" svg:viewBox="0 0 1031 20" draw:points="0,0 1031,0 1031,20 0,20">
          <text:p/>
        </draw:polygon>
        <draw:polygon draw:style-name="gr35" draw:text-style-name="P35" draw:layer="layout" svg:width="1.03cm" svg:height="0.02cm" svg:x="14.382cm" svg:y="22.807cm" svg:viewBox="0 0 1031 21" draw:points="0,0 1031,0 1031,21 0,21">
          <text:p/>
        </draw:polygon>
        <draw:polygon draw:style-name="gr71" draw:text-style-name="P71" draw:layer="layout" svg:width="1.03cm" svg:height="0.02cm" svg:x="14.382cm" svg:y="22.827cm" svg:viewBox="0 0 1031 21" draw:points="0,0 1031,0 1031,21 0,21">
          <text:p/>
        </draw:polygon>
        <draw:polygon draw:style-name="gr36" draw:text-style-name="P36" draw:layer="layout" svg:width="1.03cm" svg:height="0.019cm" svg:x="14.382cm" svg:y="22.847cm" svg:viewBox="0 0 1031 20" draw:points="0,0 1031,0 1031,20 0,20">
          <text:p/>
        </draw:polygon>
        <draw:polygon draw:style-name="gr36" draw:text-style-name="P36" draw:layer="layout" svg:width="1.03cm" svg:height="0.021cm" svg:x="14.382cm" svg:y="22.866cm" svg:viewBox="0 0 1031 22" draw:points="0,0 1031,0 1031,22 0,22">
          <text:p/>
        </draw:polygon>
        <draw:polygon draw:style-name="gr37" draw:text-style-name="P37" draw:layer="layout" svg:width="1.03cm" svg:height="0.02cm" svg:x="14.382cm" svg:y="22.886cm" svg:viewBox="0 0 1031 21" draw:points="0,0 1031,0 1031,21 0,21">
          <text:p/>
        </draw:polygon>
        <draw:polygon draw:style-name="gr38" draw:text-style-name="P38" draw:layer="layout" svg:width="1.03cm" svg:height="0.019cm" svg:x="14.382cm" svg:y="22.906cm" svg:viewBox="0 0 1031 20" draw:points="0,0 1031,0 1031,20 0,20">
          <text:p/>
        </draw:polygon>
        <draw:polygon draw:style-name="gr39" draw:text-style-name="P39" draw:layer="layout" svg:width="1.03cm" svg:height="0.02cm" svg:x="14.382cm" svg:y="22.925cm" svg:viewBox="0 0 1031 21" draw:points="0,0 1031,0 1031,21 0,21">
          <text:p/>
        </draw:polygon>
        <draw:polygon draw:style-name="gr39" draw:text-style-name="P39" draw:layer="layout" svg:width="1.03cm" svg:height="0.02cm" svg:x="14.382cm" svg:y="22.945cm" svg:viewBox="0 0 1031 21" draw:points="0,0 1031,0 1031,21 0,21">
          <text:p/>
        </draw:polygon>
        <draw:polygon draw:style-name="gr40" draw:text-style-name="P40" draw:layer="layout" svg:width="1.03cm" svg:height="0.019cm" svg:x="14.382cm" svg:y="22.965cm" svg:viewBox="0 0 1031 20" draw:points="0,0 1031,0 1031,20 0,20">
          <text:p/>
        </draw:polygon>
        <draw:polygon draw:style-name="gr40" draw:text-style-name="P40" draw:layer="layout" svg:width="1.03cm" svg:height="0.02cm" svg:x="14.382cm" svg:y="22.984cm" svg:viewBox="0 0 1031 21" draw:points="0,0 1031,0 1031,21 0,21">
          <text:p/>
        </draw:polygon>
        <draw:polygon draw:style-name="gr41" draw:text-style-name="P41" draw:layer="layout" svg:width="1.03cm" svg:height="0.02cm" svg:x="14.382cm" svg:y="23.004cm" svg:viewBox="0 0 1031 21" draw:points="0,0 1031,0 1031,21 0,21">
          <text:p/>
        </draw:polygon>
        <draw:polygon draw:style-name="gr41" draw:text-style-name="P41" draw:layer="layout" svg:width="1.03cm" svg:height="0.019cm" svg:x="14.382cm" svg:y="23.024cm" svg:viewBox="0 0 1031 20" draw:points="0,0 1031,0 1031,20 0,20">
          <text:p/>
        </draw:polygon>
        <draw:polygon draw:style-name="gr42" draw:text-style-name="P42" draw:layer="layout" svg:width="1.03cm" svg:height="0.02cm" svg:x="14.382cm" svg:y="23.043cm" svg:viewBox="0 0 1031 21" draw:points="0,0 1031,0 1031,21 0,21">
          <text:p/>
        </draw:polygon>
        <draw:polygon draw:style-name="gr43" draw:text-style-name="P43" draw:layer="layout" svg:width="1.03cm" svg:height="0.02cm" svg:x="14.382cm" svg:y="23.063cm" svg:viewBox="0 0 1031 21" draw:points="0,0 1031,0 1031,21 0,21">
          <text:p/>
        </draw:polygon>
        <draw:polygon draw:style-name="gr43" draw:text-style-name="P43" draw:layer="layout" svg:width="1.03cm" svg:height="0.019cm" svg:x="14.382cm" svg:y="23.083cm" svg:viewBox="0 0 1031 20" draw:points="0,0 1031,0 1031,20 0,20">
          <text:p/>
        </draw:polygon>
        <draw:polygon draw:style-name="gr44" draw:text-style-name="P44" draw:layer="layout" svg:width="1.03cm" svg:height="0.02cm" svg:x="14.382cm" svg:y="23.102cm" svg:viewBox="0 0 1031 21" draw:points="0,0 1031,0 1031,21 0,21">
          <text:p/>
        </draw:polygon>
        <draw:polygon draw:style-name="gr44" draw:text-style-name="P44" draw:layer="layout" svg:width="1.03cm" svg:height="0.02cm" svg:x="14.382cm" svg:y="23.122cm" svg:viewBox="0 0 1031 21" draw:points="0,0 1031,0 1031,21 0,21">
          <text:p/>
        </draw:polygon>
        <draw:polygon draw:style-name="gr45" draw:text-style-name="P45" draw:layer="layout" svg:width="1.03cm" svg:height="0.019cm" svg:x="14.382cm" svg:y="23.142cm" svg:viewBox="0 0 1031 20" draw:points="0,0 1031,0 1031,20 0,20">
          <text:p/>
        </draw:polygon>
        <draw:polygon draw:style-name="gr46" draw:text-style-name="P46" draw:layer="layout" svg:width="1.03cm" svg:height="0.02cm" svg:x="14.382cm" svg:y="23.161cm" svg:viewBox="0 0 1031 21" draw:points="0,0 1031,0 1031,21 0,21">
          <text:p/>
        </draw:polygon>
        <draw:polygon draw:style-name="gr47" draw:text-style-name="P47" draw:layer="layout" svg:width="1.03cm" svg:height="0.02cm" svg:x="14.382cm" svg:y="23.181cm" svg:viewBox="0 0 1031 21" draw:points="0,0 1031,0 1031,21 0,21">
          <text:p/>
        </draw:polygon>
        <draw:polygon draw:style-name="gr47" draw:text-style-name="P47" draw:layer="layout" svg:width="1.03cm" svg:height="0.039cm" svg:x="14.382cm" svg:y="23.201cm" svg:viewBox="0 0 1031 40" draw:points="0,0 1031,0 1031,40 0,40">
          <text:p/>
        </draw:polygon>
        <draw:polygon draw:style-name="gr48" draw:text-style-name="P48" draw:layer="layout" svg:width="1.03cm" svg:height="0.039cm" svg:x="14.382cm" svg:y="23.24cm" svg:viewBox="0 0 1031 40" draw:points="0,0 1031,0 1031,40 0,40">
          <text:p/>
        </draw:polygon>
        <draw:polygon draw:style-name="gr48" draw:text-style-name="P48" draw:layer="layout" svg:width="1.03cm" svg:height="0.04cm" svg:x="14.382cm" svg:y="23.279cm" svg:viewBox="0 0 1031 41" draw:points="0,0 1031,0 1031,41 0,41">
          <text:p/>
        </draw:polygon>
        <draw:polygon draw:style-name="gr49" draw:text-style-name="P49" draw:layer="layout" svg:width="1.03cm" svg:height="0.039cm" svg:x="14.382cm" svg:y="23.319cm" svg:viewBox="0 0 1031 40" draw:points="0,0 1031,0 1031,40 0,40">
          <text:p/>
        </draw:polygon>
        <draw:polygon draw:style-name="gr49" draw:text-style-name="P49" draw:layer="layout" svg:width="1.03cm" svg:height="0.039cm" svg:x="14.382cm" svg:y="23.358cm" svg:viewBox="0 0 1031 40" draw:points="0,0 1031,0 1031,40 0,40">
          <text:p/>
        </draw:polygon>
        <draw:polygon draw:style-name="gr50" draw:text-style-name="P50" draw:layer="layout" svg:width="1.03cm" svg:height="0.04cm" svg:x="14.382cm" svg:y="23.397cm" svg:viewBox="0 0 1031 41" draw:points="0,0 1031,0 1031,41 0,41">
          <text:p/>
        </draw:polygon>
        <draw:polygon draw:style-name="gr50" draw:text-style-name="P50" draw:layer="layout" svg:width="1.03cm" svg:height="0.039cm" svg:x="14.382cm" svg:y="23.437cm" svg:viewBox="0 0 1031 40" draw:points="0,0 1031,0 1031,40 0,40">
          <text:p/>
        </draw:polygon>
        <draw:polygon draw:style-name="gr51" draw:text-style-name="P51" draw:layer="layout" svg:width="1.03cm" svg:height="0.039cm" svg:x="14.382cm" svg:y="23.476cm" svg:viewBox="0 0 1031 40" draw:points="0,0 1031,0 1031,40 0,40">
          <text:p/>
        </draw:polygon>
        <draw:polygon draw:style-name="gr51" draw:text-style-name="P51" draw:layer="layout" svg:width="1.03cm" svg:height="0.04cm" svg:x="14.382cm" svg:y="23.515cm" svg:viewBox="0 0 1031 41" draw:points="0,0 1031,0 1031,41 0,41">
          <text:p/>
        </draw:polygon>
        <draw:polygon draw:style-name="gr52" draw:text-style-name="P52" draw:layer="layout" svg:width="1.03cm" svg:height="0.039cm" svg:x="14.382cm" svg:y="23.555cm" svg:viewBox="0 0 1031 40" draw:points="0,0 1031,0 1031,40 0,40">
          <text:p/>
        </draw:polygon>
        <draw:polygon draw:style-name="gr53" draw:text-style-name="P53" draw:layer="layout" svg:width="1.03cm" svg:height="0.039cm" svg:x="14.382cm" svg:y="23.594cm" svg:viewBox="0 0 1031 40" draw:points="0,0 1031,0 1031,40 0,40">
          <text:p/>
        </draw:polygon>
        <draw:polygon draw:style-name="gr54" draw:text-style-name="P54" draw:layer="layout" svg:width="1.03cm" svg:height="0.04cm" svg:x="14.382cm" svg:y="23.633cm" svg:viewBox="0 0 1031 41" draw:points="0,0 1031,0 1031,41 0,41">
          <text:p/>
        </draw:polygon>
        <draw:polygon draw:style-name="gr55" draw:text-style-name="P55" draw:layer="layout" svg:width="1.03cm" svg:height="0.039cm" svg:x="14.382cm" svg:y="23.673cm" svg:viewBox="0 0 1031 40" draw:points="0,0 1031,0 1031,40 0,40">
          <text:p/>
        </draw:polygon>
        <draw:polygon draw:style-name="gr56" draw:text-style-name="P56" draw:layer="layout" svg:width="1.03cm" svg:height="0.039cm" svg:x="14.382cm" svg:y="23.712cm" svg:viewBox="0 0 1031 40" draw:points="0,0 1031,0 1031,40 0,40">
          <text:p/>
        </draw:polygon>
        <draw:polygon draw:style-name="gr57" draw:text-style-name="P57" draw:layer="layout" svg:width="1.03cm" svg:height="0.04cm" svg:x="14.382cm" svg:y="23.751cm" svg:viewBox="0 0 1031 41" draw:points="0,0 1031,0 1031,41 0,41">
          <text:p/>
        </draw:polygon>
        <draw:polygon draw:style-name="gr58" draw:text-style-name="P58" draw:layer="layout" svg:width="1.03cm" svg:height="0.039cm" svg:x="14.382cm" svg:y="23.791cm" svg:viewBox="0 0 1031 40" draw:points="0,0 1031,0 1031,40 0,40">
          <text:p/>
        </draw:polygon>
        <draw:polygon draw:style-name="gr59" draw:text-style-name="P59" draw:layer="layout" svg:width="1.03cm" svg:height="0.039cm" svg:x="14.382cm" svg:y="23.83cm" svg:viewBox="0 0 1031 40" draw:points="0,0 1031,0 1031,40 0,40">
          <text:p/>
        </draw:polygon>
        <draw:polygon draw:style-name="gr60" draw:text-style-name="P60" draw:layer="layout" svg:width="1.03cm" svg:height="0.04cm" svg:x="14.382cm" svg:y="23.869cm" svg:viewBox="0 0 1031 41" draw:points="0,0 1031,0 1031,41 0,41">
          <text:p/>
        </draw:polygon>
        <draw:polygon draw:style-name="gr61" draw:text-style-name="P61" draw:layer="layout" svg:width="1.03cm" svg:height="0.039cm" svg:x="14.382cm" svg:y="23.909cm" svg:viewBox="0 0 1031 40" draw:points="0,0 1031,0 1031,40 0,40">
          <text:p/>
        </draw:polygon>
        <draw:polygon draw:style-name="gr62" draw:text-style-name="P62" draw:layer="layout" svg:width="1.03cm" svg:height="0.039cm" svg:x="14.382cm" svg:y="23.948cm" svg:viewBox="0 0 1031 40" draw:points="0,0 1031,0 1031,40 0,40">
          <text:p/>
        </draw:polygon>
        <draw:polygon draw:style-name="gr63" draw:text-style-name="P63" draw:layer="layout" svg:width="1.03cm" svg:height="0.04cm" svg:x="14.382cm" svg:y="23.987cm" svg:viewBox="0 0 1031 41" draw:points="0,0 1031,0 1031,41 0,41">
          <text:p/>
        </draw:polygon>
        <draw:polygon draw:style-name="gr64" draw:text-style-name="P64" draw:layer="layout" svg:width="1.03cm" svg:height="0.039cm" svg:x="14.382cm" svg:y="24.027cm" svg:viewBox="0 0 1031 40" draw:points="0,0 1031,0 1031,40 0,40">
          <text:p/>
        </draw:polygon>
        <draw:polygon draw:style-name="gr65" draw:text-style-name="P65" draw:layer="layout" svg:width="1.03cm" svg:height="0.039cm" svg:x="14.382cm" svg:y="24.066cm" svg:viewBox="0 0 1031 40" draw:points="0,0 1031,0 1031,40 0,40">
          <text:p/>
        </draw:polygon>
        <draw:polygon draw:style-name="gr66" draw:text-style-name="P66" draw:layer="layout" svg:width="1.03cm" svg:height="0.04cm" svg:x="14.382cm" svg:y="24.105cm" svg:viewBox="0 0 1031 41" draw:points="0,0 1031,0 1031,41 0,41">
          <text:p/>
        </draw:polygon>
        <draw:polygon draw:style-name="gr66" draw:text-style-name="P66" draw:layer="layout" svg:width="1.03cm" svg:height="0.039cm" svg:x="14.382cm" svg:y="24.145cm" svg:viewBox="0 0 1031 40" draw:points="0,0 1031,0 1031,40 0,40">
          <text:p/>
        </draw:polygon>
        <draw:polygon draw:style-name="gr67" draw:text-style-name="P67" draw:layer="layout" svg:width="1.03cm" svg:height="0.039cm" svg:x="14.382cm" svg:y="24.184cm" svg:viewBox="0 0 1031 40" draw:points="0,0 1031,0 1031,40 0,40">
          <text:p/>
        </draw:polygon>
        <draw:polygon draw:style-name="gr67" draw:text-style-name="P67" draw:layer="layout" svg:width="1.03cm" svg:height="0.04cm" svg:x="14.382cm" svg:y="24.223cm" svg:viewBox="0 0 1031 41" draw:points="0,0 1031,0 1031,41 0,41">
          <text:p/>
        </draw:polygon>
        <draw:polygon draw:style-name="gr68" draw:text-style-name="P68" draw:layer="layout" svg:width="1.03cm" svg:height="0.039cm" svg:x="14.382cm" svg:y="24.263cm" svg:viewBox="0 0 1031 40" draw:points="0,0 1031,0 1031,40 0,40">
          <text:p/>
        </draw:polygon>
        <draw:polygon draw:style-name="gr68" draw:text-style-name="P68" draw:layer="layout" svg:width="1.03cm" svg:height="0.039cm" svg:x="14.382cm" svg:y="24.302cm" svg:viewBox="0 0 1031 40" draw:points="0,0 1031,0 1031,40 0,40">
          <text:p/>
        </draw:polygon>
        <draw:polygon draw:style-name="gr69" draw:text-style-name="P69" draw:layer="layout" svg:width="1.03cm" svg:height="0.04cm" svg:x="14.382cm" svg:y="24.341cm" svg:viewBox="0 0 1031 41" draw:points="0,0 1031,0 1031,41 0,41">
          <text:p/>
        </draw:polygon>
        <draw:polygon draw:style-name="gr69" draw:text-style-name="P69" draw:layer="layout" svg:width="1.03cm" svg:height="0.039cm" svg:x="14.382cm" svg:y="24.381cm" svg:viewBox="0 0 1031 40" draw:points="0,0 1031,0 1031,40 0,40">
          <text:p/>
        </draw:polygon>
        <draw:polygon draw:style-name="gr70" draw:text-style-name="P70" draw:layer="layout" svg:width="1.03cm" svg:height="0.039cm" svg:x="14.382cm" svg:y="24.42cm" svg:viewBox="0 0 1031 40" draw:points="0,0 1031,0 1031,40 0,40">
          <text:p/>
        </draw:polygon>
        <draw:polygon draw:style-name="gr72" draw:text-style-name="P72" draw:layer="layout" svg:width="1.029cm" svg:height="0cm" svg:x="6.43cm" svg:y="24.429cm" svg:viewBox="0 0 1030 0" draw:points="0,0 1030,0">
          <text:p/>
        </draw:polygon>
        <draw:polygon draw:style-name="gr73" draw:text-style-name="P73" draw:layer="layout" svg:width="1.029cm" svg:height="0cm" svg:x="6.43cm" svg:y="24.429cm" svg:viewBox="0 0 1030 0" draw:points="0,0 1030,0">
          <text:p/>
        </draw:polygon>
        <draw:polygon draw:style-name="gr74" draw:text-style-name="P74" draw:layer="layout" svg:width="1.029cm" svg:height="0cm" svg:x="6.43cm" svg:y="24.429cm" svg:viewBox="0 0 1030 1" draw:points="0,0 1030,0 1030,1 0,1">
          <text:p/>
        </draw:polygon>
        <draw:polygon draw:style-name="gr74" draw:text-style-name="P74" draw:layer="layout" svg:width="1.029cm" svg:height="0cm" svg:x="6.43cm" svg:y="24.43cm" svg:viewBox="0 0 1030 0" draw:points="0,0 1030,0">
          <text:p/>
        </draw:polygon>
        <draw:polygon draw:style-name="gr75" draw:text-style-name="P75" draw:layer="layout" svg:width="1.029cm" svg:height="0cm" svg:x="6.43cm" svg:y="24.43cm" svg:viewBox="0 0 1030 0" draw:points="0,0 1030,0">
          <text:p/>
        </draw:polygon>
        <draw:polygon draw:style-name="gr76" draw:text-style-name="P76" draw:layer="layout" svg:width="1.029cm" svg:height="0cm" svg:x="6.43cm" svg:y="24.43cm" svg:viewBox="0 0 1030 0" draw:points="0,0 1030,0">
          <text:p/>
        </draw:polygon>
        <draw:polygon draw:style-name="gr77" draw:text-style-name="P77" draw:layer="layout" svg:width="1.029cm" svg:height="0cm" svg:x="6.43cm" svg:y="24.43cm" svg:viewBox="0 0 1030 1" draw:points="0,0 1030,0 1030,1 0,1">
          <text:p/>
        </draw:polygon>
        <draw:polygon draw:style-name="gr78" draw:text-style-name="P78" draw:layer="layout" svg:width="1.029cm" svg:height="0cm" svg:x="6.43cm" svg:y="24.431cm" svg:viewBox="0 0 1030 0" draw:points="0,0 1030,0">
          <text:p/>
        </draw:polygon>
        <draw:polygon draw:style-name="gr79" draw:text-style-name="P79" draw:layer="layout" svg:width="1.029cm" svg:height="0cm" svg:x="6.43cm" svg:y="24.431cm" svg:viewBox="0 0 1030 0" draw:points="0,0 1030,0">
          <text:p/>
        </draw:polygon>
        <draw:polygon draw:style-name="gr80" draw:text-style-name="P80" draw:layer="layout" svg:width="1.029cm" svg:height="0cm" svg:x="6.43cm" svg:y="24.431cm" svg:viewBox="0 0 1030 0" draw:points="0,0 1030,0">
          <text:p/>
        </draw:polygon>
        <draw:polygon draw:style-name="gr81" draw:text-style-name="P81" draw:layer="layout" svg:width="1.029cm" svg:height="0cm" svg:x="6.43cm" svg:y="24.431cm" svg:viewBox="0 0 1030 1" draw:points="0,0 1030,0 1030,1 0,1">
          <text:p/>
        </draw:polygon>
        <draw:polygon draw:style-name="gr82" draw:text-style-name="P82" draw:layer="layout" svg:width="1.029cm" svg:height="0cm" svg:x="6.43cm" svg:y="24.432cm" svg:viewBox="0 0 1030 0" draw:points="0,0 1030,0">
          <text:p/>
        </draw:polygon>
        <draw:polygon draw:style-name="gr83" draw:text-style-name="P83" draw:layer="layout" svg:width="1.029cm" svg:height="0cm" svg:x="6.43cm" svg:y="24.432cm" svg:viewBox="0 0 1030 0" draw:points="0,0 1030,0">
          <text:p/>
        </draw:polygon>
        <draw:polygon draw:style-name="gr84" draw:text-style-name="P84" draw:layer="layout" svg:width="1.029cm" svg:height="0cm" svg:x="6.43cm" svg:y="24.432cm" svg:viewBox="0 0 1030 0" draw:points="0,0 1030,0">
          <text:p/>
        </draw:polygon>
        <draw:polygon draw:style-name="gr85" draw:text-style-name="P85" draw:layer="layout" svg:width="1.029cm" svg:height="0cm" svg:x="6.43cm" svg:y="24.432cm" svg:viewBox="0 0 1030 1" draw:points="0,0 1030,0 1030,1 0,1">
          <text:p/>
        </draw:polygon>
        <draw:polygon draw:style-name="gr86" draw:text-style-name="P86" draw:layer="layout" svg:width="1.029cm" svg:height="0cm" svg:x="6.43cm" svg:y="24.433cm" svg:viewBox="0 0 1030 0" draw:points="0,0 1030,0">
          <text:p/>
        </draw:polygon>
        <draw:polygon draw:style-name="gr86" draw:text-style-name="P86" draw:layer="layout" svg:width="1.029cm" svg:height="0cm" svg:x="6.43cm" svg:y="24.433cm" svg:viewBox="0 0 1030 0" draw:points="0,0 1030,0">
          <text:p/>
        </draw:polygon>
        <draw:polygon draw:style-name="gr87" draw:text-style-name="P87" draw:layer="layout" svg:width="1.029cm" svg:height="0cm" svg:x="6.43cm" svg:y="24.433cm" svg:viewBox="0 0 1030 0" draw:points="0,0 1030,0">
          <text:p/>
        </draw:polygon>
        <draw:polygon draw:style-name="gr88" draw:text-style-name="P88" draw:layer="layout" svg:width="1.029cm" svg:height="0cm" svg:x="6.43cm" svg:y="24.433cm" svg:viewBox="0 0 1030 0" draw:points="0,0 1030,0">
          <text:p/>
        </draw:polygon>
        <draw:polygon draw:style-name="gr89" draw:text-style-name="P89" draw:layer="layout" svg:width="1.029cm" svg:height="0cm" svg:x="6.43cm" svg:y="24.433cm" svg:viewBox="0 0 1030 1" draw:points="0,0 1030,0 1030,1 0,1">
          <text:p/>
        </draw:polygon>
        <draw:polygon draw:style-name="gr89" draw:text-style-name="P89" draw:layer="layout" svg:width="1.029cm" svg:height="0cm" svg:x="6.43cm" svg:y="24.434cm" svg:viewBox="0 0 1030 0" draw:points="0,0 1030,0">
          <text:p/>
        </draw:polygon>
        <draw:polygon draw:style-name="gr90" draw:text-style-name="P90" draw:layer="layout" svg:width="1.029cm" svg:height="0cm" svg:x="6.43cm" svg:y="24.434cm" svg:viewBox="0 0 1030 0" draw:points="0,0 1030,0">
          <text:p/>
        </draw:polygon>
        <draw:polygon draw:style-name="gr91" draw:text-style-name="P91" draw:layer="layout" svg:width="1.029cm" svg:height="0cm" svg:x="6.43cm" svg:y="24.434cm" svg:viewBox="0 0 1030 0" draw:points="0,0 1030,0">
          <text:p/>
        </draw:polygon>
        <draw:polygon draw:style-name="gr91" draw:text-style-name="P91" draw:layer="layout" svg:width="1.029cm" svg:height="0cm" svg:x="6.43cm" svg:y="24.434cm" svg:viewBox="0 0 1030 1" draw:points="0,0 1030,0 1030,1 0,1">
          <text:p/>
        </draw:polygon>
        <draw:polygon draw:style-name="gr92" draw:text-style-name="P92" draw:layer="layout" svg:width="1.029cm" svg:height="0cm" svg:x="6.43cm" svg:y="24.435cm" svg:viewBox="0 0 1030 0" draw:points="0,0 1030,0">
          <text:p/>
        </draw:polygon>
        <draw:polygon draw:style-name="gr93" draw:text-style-name="P93" draw:layer="layout" svg:width="1.029cm" svg:height="0cm" svg:x="6.43cm" svg:y="24.435cm" svg:viewBox="0 0 1030 0" draw:points="0,0 1030,0">
          <text:p/>
        </draw:polygon>
        <draw:polygon draw:style-name="gr93" draw:text-style-name="P93" draw:layer="layout" svg:width="1.029cm" svg:height="0cm" svg:x="6.43cm" svg:y="24.435cm" svg:viewBox="0 0 1030 0" draw:points="0,0 1030,0">
          <text:p/>
        </draw:polygon>
        <draw:polygon draw:style-name="gr94" draw:text-style-name="P94" draw:layer="layout" svg:width="1.029cm" svg:height="0cm" svg:x="6.43cm" svg:y="24.435cm" svg:viewBox="0 0 1030 1" draw:points="0,0 1030,0 1030,1 0,1">
          <text:p/>
        </draw:polygon>
        <draw:polygon draw:style-name="gr95" draw:text-style-name="P95" draw:layer="layout" svg:width="1.029cm" svg:height="0cm" svg:x="6.43cm" svg:y="24.436cm" svg:viewBox="0 0 1030 0" draw:points="0,0 1030,0">
          <text:p/>
        </draw:polygon>
        <draw:polygon draw:style-name="gr96" draw:text-style-name="P96" draw:layer="layout" svg:width="1.029cm" svg:height="0cm" svg:x="6.43cm" svg:y="24.436cm" svg:viewBox="0 0 1030 0" draw:points="0,0 1030,0">
          <text:p/>
        </draw:polygon>
        <draw:polygon draw:style-name="gr96" draw:text-style-name="P96" draw:layer="layout" svg:width="1.029cm" svg:height="0cm" svg:x="6.43cm" svg:y="24.436cm" svg:viewBox="0 0 1030 0" draw:points="0,0 1030,0">
          <text:p/>
        </draw:polygon>
        <draw:polygon draw:style-name="gr97" draw:text-style-name="P97" draw:layer="layout" svg:width="1.029cm" svg:height="0cm" svg:x="6.43cm" svg:y="24.436cm" svg:viewBox="0 0 1030 1" draw:points="0,0 1030,0 1030,1 0,1">
          <text:p/>
        </draw:polygon>
        <draw:polygon draw:style-name="gr98" draw:text-style-name="P98" draw:layer="layout" svg:width="1.029cm" svg:height="0cm" svg:x="6.43cm" svg:y="24.437cm" svg:viewBox="0 0 1030 0" draw:points="0,0 1030,0">
          <text:p/>
        </draw:polygon>
        <draw:polygon draw:style-name="gr98" draw:text-style-name="P98" draw:layer="layout" svg:width="1.029cm" svg:height="0cm" svg:x="6.43cm" svg:y="24.437cm" svg:viewBox="0 0 1030 0" draw:points="0,0 1030,0">
          <text:p/>
        </draw:polygon>
        <draw:polygon draw:style-name="gr99" draw:text-style-name="P99" draw:layer="layout" svg:width="1.029cm" svg:height="0cm" svg:x="6.43cm" svg:y="24.437cm" svg:viewBox="0 0 1030 0" draw:points="0,0 1030,0">
          <text:p/>
        </draw:polygon>
        <draw:polygon draw:style-name="gr100" draw:text-style-name="P100" draw:layer="layout" svg:width="1.029cm" svg:height="0cm" svg:x="6.43cm" svg:y="24.437cm" svg:viewBox="0 0 1030 0" draw:points="0,0 1030,0">
          <text:p/>
        </draw:polygon>
        <draw:polygon draw:style-name="gr101" draw:text-style-name="P101" draw:layer="layout" svg:width="1.029cm" svg:height="0cm" svg:x="6.43cm" svg:y="24.437cm" svg:viewBox="0 0 1030 1" draw:points="0,0 1030,0 1030,1 0,1">
          <text:p/>
        </draw:polygon>
        <draw:polygon draw:style-name="gr101" draw:text-style-name="P101" draw:layer="layout" svg:width="1.029cm" svg:height="0cm" svg:x="6.43cm" svg:y="24.438cm" svg:viewBox="0 0 1030 0" draw:points="0,0 1030,0">
          <text:p/>
        </draw:polygon>
        <draw:polygon draw:style-name="gr102" draw:text-style-name="P102" draw:layer="layout" svg:width="1.029cm" svg:height="0cm" svg:x="6.43cm" svg:y="24.438cm" svg:viewBox="0 0 1030 0" draw:points="0,0 1030,0">
          <text:p/>
        </draw:polygon>
        <draw:polygon draw:style-name="gr103" draw:text-style-name="P103" draw:layer="layout" svg:width="1.029cm" svg:height="0cm" svg:x="6.43cm" svg:y="24.438cm" svg:viewBox="0 0 1030 0" draw:points="0,0 1030,0">
          <text:p/>
        </draw:polygon>
        <draw:polygon draw:style-name="gr104" draw:text-style-name="P104" draw:layer="layout" svg:width="1.029cm" svg:height="0cm" svg:x="6.43cm" svg:y="24.438cm" svg:viewBox="0 0 1030 1" draw:points="0,0 1030,0 1030,1 0,1">
          <text:p/>
        </draw:polygon>
        <draw:polygon draw:style-name="gr105" draw:text-style-name="P105" draw:layer="layout" svg:width="1.029cm" svg:height="0cm" svg:x="6.43cm" svg:y="24.439cm" svg:viewBox="0 0 1030 0" draw:points="0,0 1030,0">
          <text:p/>
        </draw:polygon>
        <draw:polygon draw:style-name="gr106" draw:text-style-name="P106" draw:layer="layout" svg:width="1.029cm" svg:height="0cm" svg:x="6.43cm" svg:y="24.439cm" svg:viewBox="0 0 1030 0" draw:points="0,0 1030,0">
          <text:p/>
        </draw:polygon>
        <draw:polygon draw:style-name="gr107" draw:text-style-name="P107" draw:layer="layout" svg:width="1.029cm" svg:height="0cm" svg:x="6.43cm" svg:y="24.439cm" svg:viewBox="0 0 1030 0" draw:points="0,0 1030,0">
          <text:p/>
        </draw:polygon>
        <draw:polygon draw:style-name="gr108" draw:text-style-name="P108" draw:layer="layout" svg:width="1.029cm" svg:height="0cm" svg:x="6.43cm" svg:y="24.439cm" svg:viewBox="0 0 1030 1" draw:points="0,0 1030,0 1030,1 0,1">
          <text:p/>
        </draw:polygon>
        <draw:polygon draw:style-name="gr109" draw:text-style-name="P109" draw:layer="layout" svg:width="1.029cm" svg:height="0cm" svg:x="6.43cm" svg:y="24.44cm" svg:viewBox="0 0 1030 0" draw:points="0,0 1030,0">
          <text:p/>
        </draw:polygon>
        <draw:polygon draw:style-name="gr110" draw:text-style-name="P110" draw:layer="layout" svg:width="1.029cm" svg:height="0cm" svg:x="6.43cm" svg:y="24.44cm" svg:viewBox="0 0 1030 0" draw:points="0,0 1030,0">
          <text:p/>
        </draw:polygon>
        <draw:polygon draw:style-name="gr111" draw:text-style-name="P111" draw:layer="layout" svg:width="1.029cm" svg:height="0cm" svg:x="6.43cm" svg:y="24.44cm" svg:viewBox="0 0 1030 0" draw:points="0,0 1030,0">
          <text:p/>
        </draw:polygon>
        <draw:polygon draw:style-name="gr112" draw:text-style-name="P112" draw:layer="layout" svg:width="1.029cm" svg:height="0cm" svg:x="6.43cm" svg:y="24.44cm" svg:viewBox="0 0 1030 1" draw:points="0,0 1030,0 1030,1 0,1">
          <text:p/>
        </draw:polygon>
        <draw:polygon draw:style-name="gr113" draw:text-style-name="P113" draw:layer="layout" svg:width="1.029cm" svg:height="0cm" svg:x="6.43cm" svg:y="24.441cm" svg:viewBox="0 0 1030 0" draw:points="0,0 1030,0">
          <text:p/>
        </draw:polygon>
        <draw:polygon draw:style-name="gr113" draw:text-style-name="P113" draw:layer="layout" svg:width="1.029cm" svg:height="0cm" svg:x="6.43cm" svg:y="24.441cm" svg:viewBox="0 0 1030 0" draw:points="0,0 1030,0">
          <text:p/>
        </draw:polygon>
        <draw:polygon draw:style-name="gr114" draw:text-style-name="P114" draw:layer="layout" svg:width="1.029cm" svg:height="0cm" svg:x="6.43cm" svg:y="24.441cm" svg:viewBox="0 0 1030 0" draw:points="0,0 1030,0">
          <text:p/>
        </draw:polygon>
        <draw:polygon draw:style-name="gr115" draw:text-style-name="P115" draw:layer="layout" svg:width="1.029cm" svg:height="0cm" svg:x="6.43cm" svg:y="24.441cm" svg:viewBox="0 0 1030 1" draw:points="0,0 1030,0 1030,1 0,1">
          <text:p/>
        </draw:polygon>
        <draw:polygon draw:style-name="gr116" draw:text-style-name="P116" draw:layer="layout" svg:width="1.029cm" svg:height="0cm" svg:x="6.43cm" svg:y="24.442cm" svg:viewBox="0 0 1030 0" draw:points="0,0 1030,0">
          <text:p/>
        </draw:polygon>
        <draw:polygon draw:style-name="gr116" draw:text-style-name="P116" draw:layer="layout" svg:width="1.029cm" svg:height="0cm" svg:x="6.43cm" svg:y="24.442cm" svg:viewBox="0 0 1030 0" draw:points="0,0 1030,0">
          <text:p/>
        </draw:polygon>
        <draw:polygon draw:style-name="gr117" draw:text-style-name="P117" draw:layer="layout" svg:width="1.029cm" svg:height="0cm" svg:x="6.43cm" svg:y="24.442cm" svg:viewBox="0 0 1030 0" draw:points="0,0 1030,0">
          <text:p/>
        </draw:polygon>
        <draw:polygon draw:style-name="gr118" draw:text-style-name="P118" draw:layer="layout" svg:width="1.029cm" svg:height="0cm" svg:x="6.43cm" svg:y="24.442cm" svg:viewBox="0 0 1030 0" draw:points="0,0 1030,0">
          <text:p/>
        </draw:polygon>
        <draw:polygon draw:style-name="gr118" draw:text-style-name="P118" draw:layer="layout" svg:width="1.029cm" svg:height="0cm" svg:x="6.43cm" svg:y="24.442cm" svg:viewBox="0 0 1030 1" draw:points="0,0 1030,0 1030,1 0,1">
          <text:p/>
        </draw:polygon>
        <draw:polygon draw:style-name="gr119" draw:text-style-name="P119" draw:layer="layout" svg:width="1.029cm" svg:height="0cm" svg:x="6.43cm" svg:y="24.443cm" svg:viewBox="0 0 1030 0" draw:points="0,0 1030,0">
          <text:p/>
        </draw:polygon>
        <draw:polygon draw:style-name="gr120" draw:text-style-name="P120" draw:layer="layout" svg:width="1.029cm" svg:height="0cm" svg:x="6.43cm" svg:y="24.443cm" svg:viewBox="0 0 1030 0" draw:points="0,0 1030,0">
          <text:p/>
        </draw:polygon>
        <draw:polygon draw:style-name="gr120" draw:text-style-name="P120" draw:layer="layout" svg:width="1.029cm" svg:height="0cm" svg:x="6.43cm" svg:y="24.443cm" svg:viewBox="0 0 1030 0" draw:points="0,0 1030,0">
          <text:p/>
        </draw:polygon>
        <draw:polygon draw:style-name="gr121" draw:text-style-name="P121" draw:layer="layout" svg:width="1.029cm" svg:height="0cm" svg:x="6.43cm" svg:y="24.443cm" svg:viewBox="0 0 1030 1" draw:points="0,0 1030,0 1030,1 0,1">
          <text:p/>
        </draw:polygon>
        <draw:polygon draw:style-name="gr122" draw:text-style-name="P122" draw:layer="layout" svg:width="1.029cm" svg:height="0cm" svg:x="6.43cm" svg:y="24.444cm" svg:viewBox="0 0 1030 0" draw:points="0,0 1030,0">
          <text:p/>
        </draw:polygon>
        <draw:polygon draw:style-name="gr123" draw:text-style-name="P123" draw:layer="layout" svg:width="1.029cm" svg:height="0cm" svg:x="6.43cm" svg:y="24.444cm" svg:viewBox="0 0 1030 0" draw:points="0,0 1030,0">
          <text:p/>
        </draw:polygon>
        <draw:polygon draw:style-name="gr123" draw:text-style-name="P123" draw:layer="layout" svg:width="1.029cm" svg:height="0cm" svg:x="6.43cm" svg:y="24.444cm" svg:viewBox="0 0 1030 1" draw:points="0,0 1030,0 1030,1 0,1">
          <text:p/>
        </draw:polygon>
        <draw:polygon draw:style-name="gr124" draw:text-style-name="P124" draw:layer="layout" svg:width="1.029cm" svg:height="0cm" svg:x="6.43cm" svg:y="24.445cm" svg:viewBox="0 0 1030 0" draw:points="0,0 1030,0">
          <text:p/>
        </draw:polygon>
        <draw:polygon draw:style-name="gr124" draw:text-style-name="P124" draw:layer="layout" svg:width="1.029cm" svg:height="0cm" svg:x="6.43cm" svg:y="24.445cm" svg:viewBox="0 0 1030 1" draw:points="0,0 1030,0 1030,1 0,1">
          <text:p/>
        </draw:polygon>
        <draw:polygon draw:style-name="gr125" draw:text-style-name="P125" draw:layer="layout" svg:width="1.029cm" svg:height="0cm" svg:x="6.43cm" svg:y="24.446cm" svg:viewBox="0 0 1030 0" draw:points="0,0 1030,0">
          <text:p/>
        </draw:polygon>
        <draw:polygon draw:style-name="gr125" draw:text-style-name="P125" draw:layer="layout" svg:width="1.029cm" svg:height="0cm" svg:x="6.43cm" svg:y="24.446cm" svg:viewBox="0 0 1030 1" draw:points="0,0 1030,0 1030,1 0,1">
          <text:p/>
        </draw:polygon>
        <draw:polygon draw:style-name="gr126" draw:text-style-name="P126" draw:layer="layout" svg:width="1.029cm" svg:height="0cm" svg:x="6.43cm" svg:y="24.447cm" svg:viewBox="0 0 1030 0" draw:points="0,0 1030,0">
          <text:p/>
        </draw:polygon>
        <draw:polygon draw:style-name="gr126" draw:text-style-name="P126" draw:layer="layout" svg:width="1.029cm" svg:height="0cm" svg:x="6.43cm" svg:y="24.447cm" svg:viewBox="0 0 1030 0" draw:points="0,0 1030,0">
          <text:p/>
        </draw:polygon>
        <draw:polygon draw:style-name="gr127" draw:text-style-name="P127" draw:layer="layout" svg:width="1.029cm" svg:height="0cm" svg:x="6.43cm" svg:y="24.447cm" svg:viewBox="0 0 1030 1" draw:points="0,0 1030,0 1030,1 0,1">
          <text:p/>
        </draw:polygon>
        <draw:polygon draw:style-name="gr127" draw:text-style-name="P127" draw:layer="layout" svg:width="1.029cm" svg:height="0cm" svg:x="6.43cm" svg:y="24.448cm" svg:viewBox="0 0 1030 0" draw:points="0,0 1030,0">
          <text:p/>
        </draw:polygon>
        <draw:polygon draw:style-name="gr128" draw:text-style-name="P128" draw:layer="layout" svg:width="1.029cm" svg:height="0cm" svg:x="6.43cm" svg:y="24.448cm" svg:viewBox="0 0 1030 1" draw:points="0,0 1030,0 1030,1 0,1">
          <text:p/>
        </draw:polygon>
        <draw:polygon draw:style-name="gr129" draw:text-style-name="P129" draw:layer="layout" svg:width="1.029cm" svg:height="0cm" svg:x="6.43cm" svg:y="24.449cm" svg:viewBox="0 0 1030 0" draw:points="0,0 1030,0">
          <text:p/>
        </draw:polygon>
        <draw:polygon draw:style-name="gr130" draw:text-style-name="P130" draw:layer="layout" svg:width="1.029cm" svg:height="0cm" svg:x="6.43cm" svg:y="24.449cm" svg:viewBox="0 0 1030 1" draw:points="0,0 1030,0 1030,1 0,1">
          <text:p/>
        </draw:polygon>
        <draw:polygon draw:style-name="gr131" draw:text-style-name="P131" draw:layer="layout" svg:width="1.029cm" svg:height="0cm" svg:x="6.43cm" svg:y="24.45cm" svg:viewBox="0 0 1030 0" draw:points="0,0 1030,0">
          <text:p/>
        </draw:polygon>
        <draw:polygon draw:style-name="gr132" draw:text-style-name="P132" draw:layer="layout" svg:width="1.029cm" svg:height="0cm" svg:x="6.43cm" svg:y="24.45cm" svg:viewBox="0 0 1030 1" draw:points="0,0 1030,0 1030,1 0,1">
          <text:p/>
        </draw:polygon>
        <draw:polygon draw:style-name="gr133" draw:text-style-name="P133" draw:layer="layout" svg:width="1.029cm" svg:height="0cm" svg:x="6.43cm" svg:y="24.451cm" svg:viewBox="0 0 1030 0" draw:points="0,0 1030,0">
          <text:p/>
        </draw:polygon>
        <draw:polygon draw:style-name="gr134" draw:text-style-name="P134" draw:layer="layout" svg:width="1.029cm" svg:height="0cm" svg:x="6.43cm" svg:y="24.451cm" svg:viewBox="0 0 1030 1" draw:points="0,0 1030,0 1030,1 0,1">
          <text:p/>
        </draw:polygon>
        <draw:polygon draw:style-name="gr135" draw:text-style-name="P135" draw:layer="layout" svg:width="1.029cm" svg:height="0cm" svg:x="6.43cm" svg:y="24.452cm" svg:viewBox="0 0 1030 0" draw:points="0,0 1030,0">
          <text:p/>
        </draw:polygon>
        <draw:polygon draw:style-name="gr136" draw:text-style-name="P136" draw:layer="layout" svg:width="1.029cm" svg:height="0cm" svg:x="6.43cm" svg:y="24.452cm" svg:viewBox="0 0 1030 1" draw:points="0,0 1030,0 1030,1 0,1">
          <text:p/>
        </draw:polygon>
        <draw:polygon draw:style-name="gr137" draw:text-style-name="P137" draw:layer="layout" svg:width="1.029cm" svg:height="0cm" svg:x="6.43cm" svg:y="24.453cm" svg:viewBox="0 0 1030 0" draw:points="0,0 1030,0">
          <text:p/>
        </draw:polygon>
        <draw:polygon draw:style-name="gr138" draw:text-style-name="P138" draw:layer="layout" svg:width="1.029cm" svg:height="0cm" svg:x="6.43cm" svg:y="24.453cm" svg:viewBox="0 0 1030 1" draw:points="0,0 1030,0 1030,1 0,1">
          <text:p/>
        </draw:polygon>
        <draw:polygon draw:style-name="gr139" draw:text-style-name="P139" draw:layer="layout" svg:width="1.029cm" svg:height="0cm" svg:x="6.43cm" svg:y="24.454cm" svg:viewBox="0 0 1030 0" draw:points="0,0 1030,0">
          <text:p/>
        </draw:polygon>
        <draw:polygon draw:style-name="gr140" draw:text-style-name="P140" draw:layer="layout" svg:width="1.029cm" svg:height="0cm" svg:x="6.43cm" svg:y="24.454cm" svg:viewBox="0 0 1030 1" draw:points="0,0 1030,0 1030,1 0,1">
          <text:p/>
        </draw:polygon>
        <draw:polygon draw:style-name="gr141" draw:text-style-name="P141" draw:layer="layout" svg:width="1.029cm" svg:height="0cm" svg:x="6.43cm" svg:y="24.455cm" svg:viewBox="0 0 1030 0" draw:points="0,0 1030,0">
          <text:p/>
        </draw:polygon>
        <draw:polygon draw:style-name="gr142" draw:text-style-name="P142" draw:layer="layout" svg:width="1.029cm" svg:height="0cm" svg:x="6.43cm" svg:y="24.455cm" svg:viewBox="0 0 1030 1" draw:points="0,0 1030,0 1030,1 0,1">
          <text:p/>
        </draw:polygon>
        <draw:polygon draw:style-name="gr143" draw:text-style-name="P143" draw:layer="layout" svg:width="1.029cm" svg:height="0cm" svg:x="6.43cm" svg:y="24.456cm" svg:viewBox="0 0 1030 0" draw:points="0,0 1030,0">
          <text:p/>
        </draw:polygon>
        <draw:polygon draw:style-name="gr144" draw:text-style-name="P144" draw:layer="layout" svg:width="1.029cm" svg:height="0cm" svg:x="6.43cm" svg:y="24.456cm" svg:viewBox="0 0 1030 0" draw:points="0,0 1030,0">
          <text:p/>
        </draw:polygon>
        <draw:polygon draw:style-name="gr144" draw:text-style-name="P144" draw:layer="layout" svg:width="1.029cm" svg:height="0cm" svg:x="6.43cm" svg:y="24.456cm" svg:viewBox="0 0 1030 1" draw:points="0,0 1030,0 1030,1 0,1">
          <text:p/>
        </draw:polygon>
        <draw:polygon draw:style-name="gr145" draw:text-style-name="P145" draw:layer="layout" svg:width="1.029cm" svg:height="0cm" svg:x="6.43cm" svg:y="24.457cm" svg:viewBox="0 0 1030 0" draw:points="0,0 1030,0">
          <text:p/>
        </draw:polygon>
        <draw:polygon draw:style-name="gr145" draw:text-style-name="P145" draw:layer="layout" svg:width="1.029cm" svg:height="0cm" svg:x="6.43cm" svg:y="24.457cm" svg:viewBox="0 0 1030 1" draw:points="0,0 1030,0 1030,1 0,1">
          <text:p/>
        </draw:polygon>
        <draw:polygon draw:style-name="gr146" draw:text-style-name="P146" draw:layer="layout" svg:width="1.029cm" svg:height="0cm" svg:x="6.43cm" svg:y="24.458cm" svg:viewBox="0 0 1030 0" draw:points="0,0 1030,0">
          <text:p/>
        </draw:polygon>
        <draw:polygon draw:style-name="gr146" draw:text-style-name="P146" draw:layer="layout" svg:width="1.029cm" svg:height="0cm" svg:x="6.43cm" svg:y="24.458cm" svg:viewBox="0 0 1030 1" draw:points="0,0 1030,0 1030,1 0,1">
          <text:p/>
        </draw:polygon>
        <draw:polygon draw:style-name="gr147" draw:text-style-name="P147" draw:layer="layout" svg:width="1.029cm" svg:height="0cm" svg:x="6.43cm" svg:y="24.459cm" svg:viewBox="0 0 1030 0" draw:points="0,0 1030,0">
          <text:p/>
        </draw:polygon>
        <draw:polygon draw:style-name="gr72" draw:text-style-name="P72" draw:layer="layout" svg:width="1.03cm" svg:height="0.003cm" svg:x="11.045cm" svg:y="24.053cm" svg:viewBox="0 0 1031 4" draw:points="0,0 1031,0 1031,4 0,4">
          <text:p/>
        </draw:polygon>
        <draw:polygon draw:style-name="gr73" draw:text-style-name="P73" draw:layer="layout" svg:width="1.03cm" svg:height="0.004cm" svg:x="11.045cm" svg:y="24.056cm" svg:viewBox="0 0 1031 5" draw:points="0,0 1031,0 1031,5 0,5">
          <text:p/>
        </draw:polygon>
        <draw:polygon draw:style-name="gr74" draw:text-style-name="P74" draw:layer="layout" svg:width="1.03cm" svg:height="0.003cm" svg:x="11.045cm" svg:y="24.06cm" svg:viewBox="0 0 1031 4" draw:points="0,0 1031,0 1031,4 0,4">
          <text:p/>
        </draw:polygon>
        <draw:polygon draw:style-name="gr74" draw:text-style-name="P74" draw:layer="layout" svg:width="1.03cm" svg:height="0.003cm" svg:x="11.045cm" svg:y="24.063cm" svg:viewBox="0 0 1031 4" draw:points="0,0 1031,0 1031,4 0,4">
          <text:p/>
        </draw:polygon>
        <draw:polygon draw:style-name="gr75" draw:text-style-name="P75" draw:layer="layout" svg:width="1.03cm" svg:height="0.003cm" svg:x="11.045cm" svg:y="24.066cm" svg:viewBox="0 0 1031 4" draw:points="0,0 1031,0 1031,4 0,4">
          <text:p/>
        </draw:polygon>
        <draw:polygon draw:style-name="gr76" draw:text-style-name="P76" draw:layer="layout" svg:width="1.03cm" svg:height="0.003cm" svg:x="11.045cm" svg:y="24.069cm" svg:viewBox="0 0 1031 4" draw:points="0,0 1031,0 1031,4 0,4">
          <text:p/>
        </draw:polygon>
        <draw:polygon draw:style-name="gr78" draw:text-style-name="P78" draw:layer="layout" svg:width="1.03cm" svg:height="0.003cm" svg:x="11.045cm" svg:y="24.072cm" svg:viewBox="0 0 1031 4" draw:points="0,0 1031,0 1031,4 0,4">
          <text:p/>
        </draw:polygon>
        <draw:polygon draw:style-name="gr78" draw:text-style-name="P78" draw:layer="layout" svg:width="1.03cm" svg:height="0.004cm" svg:x="11.045cm" svg:y="24.075cm" svg:viewBox="0 0 1031 5" draw:points="0,0 1031,0 1031,5 0,5">
          <text:p/>
        </draw:polygon>
        <draw:polygon draw:style-name="gr79" draw:text-style-name="P79" draw:layer="layout" svg:width="1.03cm" svg:height="0.003cm" svg:x="11.045cm" svg:y="24.079cm" svg:viewBox="0 0 1031 4" draw:points="0,0 1031,0 1031,4 0,4">
          <text:p/>
        </draw:polygon>
        <draw:polygon draw:style-name="gr81" draw:text-style-name="P81" draw:layer="layout" svg:width="1.03cm" svg:height="0.003cm" svg:x="11.045cm" svg:y="24.082cm" svg:viewBox="0 0 1031 4" draw:points="0,0 1031,0 1031,4 0,4">
          <text:p/>
        </draw:polygon>
        <draw:polygon draw:style-name="gr81" draw:text-style-name="P81" draw:layer="layout" svg:width="1.03cm" svg:height="0.003cm" svg:x="11.045cm" svg:y="24.085cm" svg:viewBox="0 0 1031 4" draw:points="0,0 1031,0 1031,4 0,4">
          <text:p/>
        </draw:polygon>
        <draw:polygon draw:style-name="gr82" draw:text-style-name="P82" draw:layer="layout" svg:width="1.03cm" svg:height="0.003cm" svg:x="11.045cm" svg:y="24.088cm" svg:viewBox="0 0 1031 4" draw:points="0,0 1031,0 1031,4 0,4">
          <text:p/>
        </draw:polygon>
        <draw:polygon draw:style-name="gr83" draw:text-style-name="P83" draw:layer="layout" svg:width="1.03cm" svg:height="0.003cm" svg:x="11.045cm" svg:y="24.091cm" svg:viewBox="0 0 1031 4" draw:points="0,0 1031,0 1031,4 0,4">
          <text:p/>
        </draw:polygon>
        <draw:polygon draw:style-name="gr85" draw:text-style-name="P85" draw:layer="layout" svg:width="1.03cm" svg:height="0.005cm" svg:x="11.045cm" svg:y="24.094cm" svg:viewBox="0 0 1031 6" draw:points="0,0 1031,0 1031,6 0,6">
          <text:p/>
        </draw:polygon>
        <draw:polygon draw:style-name="gr85" draw:text-style-name="P85" draw:layer="layout" svg:width="1.03cm" svg:height="0.003cm" svg:x="11.045cm" svg:y="24.098cm" svg:viewBox="0 0 1031 4" draw:points="0,0 1031,0 1031,4 0,4">
          <text:p/>
        </draw:polygon>
        <draw:polygon draw:style-name="gr86" draw:text-style-name="P86" draw:layer="layout" svg:width="1.03cm" svg:height="0.003cm" svg:x="11.045cm" svg:y="24.101cm" svg:viewBox="0 0 1031 4" draw:points="0,0 1031,0 1031,4 0,4">
          <text:p/>
        </draw:polygon>
        <draw:polygon draw:style-name="gr148" draw:text-style-name="P148" draw:layer="layout" svg:width="1.03cm" svg:height="0.003cm" svg:x="11.045cm" svg:y="24.104cm" svg:viewBox="0 0 1031 4" draw:points="0,0 1031,0 1031,4 0,4">
          <text:p/>
        </draw:polygon>
        <draw:polygon draw:style-name="gr87" draw:text-style-name="P87" draw:layer="layout" svg:width="1.03cm" svg:height="0.003cm" svg:x="11.045cm" svg:y="24.107cm" svg:viewBox="0 0 1031 4" draw:points="0,0 1031,0 1031,4 0,4">
          <text:p/>
        </draw:polygon>
        <draw:polygon draw:style-name="gr88" draw:text-style-name="P88" draw:layer="layout" svg:width="1.03cm" svg:height="0.003cm" svg:x="11.045cm" svg:y="24.11cm" svg:viewBox="0 0 1031 4" draw:points="0,0 1031,0 1031,4 0,4">
          <text:p/>
        </draw:polygon>
        <draw:polygon draw:style-name="gr89" draw:text-style-name="P89" draw:layer="layout" svg:width="1.03cm" svg:height="0.004cm" svg:x="11.045cm" svg:y="24.113cm" svg:viewBox="0 0 1031 5" draw:points="0,0 1031,0 1031,5 0,5">
          <text:p/>
        </draw:polygon>
        <draw:polygon draw:style-name="gr89" draw:text-style-name="P89" draw:layer="layout" svg:width="1.03cm" svg:height="0.003cm" svg:x="11.045cm" svg:y="24.117cm" svg:viewBox="0 0 1031 4" draw:points="0,0 1031,0 1031,4 0,4">
          <text:p/>
        </draw:polygon>
        <draw:polygon draw:style-name="gr90" draw:text-style-name="P90" draw:layer="layout" svg:width="1.03cm" svg:height="0.003cm" svg:x="11.045cm" svg:y="24.12cm" svg:viewBox="0 0 1031 4" draw:points="0,0 1031,0 1031,4 0,4">
          <text:p/>
        </draw:polygon>
        <draw:polygon draw:style-name="gr91" draw:text-style-name="P91" draw:layer="layout" svg:width="1.03cm" svg:height="0.003cm" svg:x="11.045cm" svg:y="24.123cm" svg:viewBox="0 0 1031 4" draw:points="0,0 1031,0 1031,4 0,4">
          <text:p/>
        </draw:polygon>
        <draw:polygon draw:style-name="gr92" draw:text-style-name="P92" draw:layer="layout" svg:width="1.03cm" svg:height="0.003cm" svg:x="11.045cm" svg:y="24.126cm" svg:viewBox="0 0 1031 4" draw:points="0,0 1031,0 1031,4 0,4">
          <text:p/>
        </draw:polygon>
        <draw:polygon draw:style-name="gr149" draw:text-style-name="P149" draw:layer="layout" svg:width="1.03cm" svg:height="0.004cm" svg:x="11.045cm" svg:y="24.129cm" svg:viewBox="0 0 1031 5" draw:points="0,0 1031,0 1031,5 0,5">
          <text:p/>
        </draw:polygon>
        <draw:polygon draw:style-name="gr93" draw:text-style-name="P93" draw:layer="layout" svg:width="1.03cm" svg:height="0.003cm" svg:x="11.045cm" svg:y="24.133cm" svg:viewBox="0 0 1031 4" draw:points="0,0 1031,0 1031,4 0,4">
          <text:p/>
        </draw:polygon>
        <draw:polygon draw:style-name="gr94" draw:text-style-name="P94" draw:layer="layout" svg:width="1.03cm" svg:height="0.003cm" svg:x="11.045cm" svg:y="24.136cm" svg:viewBox="0 0 1031 4" draw:points="0,0 1031,0 1031,4 0,4">
          <text:p/>
        </draw:polygon>
        <draw:polygon draw:style-name="gr94" draw:text-style-name="P94" draw:layer="layout" svg:width="1.03cm" svg:height="0.003cm" svg:x="11.045cm" svg:y="24.139cm" svg:viewBox="0 0 1031 4" draw:points="0,0 1031,0 1031,4 0,4">
          <text:p/>
        </draw:polygon>
        <draw:polygon draw:style-name="gr95" draw:text-style-name="P95" draw:layer="layout" svg:width="1.03cm" svg:height="0.003cm" svg:x="11.045cm" svg:y="24.142cm" svg:viewBox="0 0 1031 4" draw:points="0,0 1031,0 1031,4 0,4">
          <text:p/>
        </draw:polygon>
        <draw:polygon draw:style-name="gr96" draw:text-style-name="P96" draw:layer="layout" svg:width="1.03cm" svg:height="0.003cm" svg:x="11.045cm" svg:y="24.145cm" svg:viewBox="0 0 1031 4" draw:points="0,0 1031,0 1031,4 0,4">
          <text:p/>
        </draw:polygon>
        <draw:polygon draw:style-name="gr96" draw:text-style-name="P96" draw:layer="layout" svg:width="1.03cm" svg:height="0.005cm" svg:x="11.045cm" svg:y="24.148cm" svg:viewBox="0 0 1031 6" draw:points="0,0 1031,0 1031,6 0,6">
          <text:p/>
        </draw:polygon>
        <draw:polygon draw:style-name="gr97" draw:text-style-name="P97" draw:layer="layout" svg:width="1.03cm" svg:height="0.003cm" svg:x="11.045cm" svg:y="24.152cm" svg:viewBox="0 0 1031 4" draw:points="0,0 1031,0 1031,4 0,4">
          <text:p/>
        </draw:polygon>
        <draw:polygon draw:style-name="gr98" draw:text-style-name="P98" draw:layer="layout" svg:width="1.03cm" svg:height="0.003cm" svg:x="11.045cm" svg:y="24.155cm" svg:viewBox="0 0 1031 4" draw:points="0,0 1031,0 1031,4 0,4">
          <text:p/>
        </draw:polygon>
        <draw:polygon draw:style-name="gr99" draw:text-style-name="P99" draw:layer="layout" svg:width="1.03cm" svg:height="0.003cm" svg:x="11.045cm" svg:y="24.158cm" svg:viewBox="0 0 1031 4" draw:points="0,0 1031,0 1031,4 0,4">
          <text:p/>
        </draw:polygon>
        <draw:polygon draw:style-name="gr99" draw:text-style-name="P99" draw:layer="layout" svg:width="1.03cm" svg:height="0.003cm" svg:x="11.045cm" svg:y="24.161cm" svg:viewBox="0 0 1031 4" draw:points="0,0 1031,0 1031,4 0,4">
          <text:p/>
        </draw:polygon>
        <draw:polygon draw:style-name="gr100" draw:text-style-name="P100" draw:layer="layout" svg:width="1.03cm" svg:height="0.003cm" svg:x="11.045cm" svg:y="24.164cm" svg:viewBox="0 0 1031 4" draw:points="0,0 1031,0 1031,4 0,4">
          <text:p/>
        </draw:polygon>
        <draw:polygon draw:style-name="gr101" draw:text-style-name="P101" draw:layer="layout" svg:width="1.03cm" svg:height="0.004cm" svg:x="11.045cm" svg:y="24.167cm" svg:viewBox="0 0 1031 5" draw:points="0,0 1031,0 1031,5 0,5">
          <text:p/>
        </draw:polygon>
        <draw:polygon draw:style-name="gr101" draw:text-style-name="P101" draw:layer="layout" svg:width="1.03cm" svg:height="0.003cm" svg:x="11.045cm" svg:y="24.171cm" svg:viewBox="0 0 1031 4" draw:points="0,0 1031,0 1031,4 0,4">
          <text:p/>
        </draw:polygon>
        <draw:polygon draw:style-name="gr102" draw:text-style-name="P102" draw:layer="layout" svg:width="1.03cm" svg:height="0.003cm" svg:x="11.045cm" svg:y="24.174cm" svg:viewBox="0 0 1031 4" draw:points="0,0 1031,0 1031,4 0,4">
          <text:p/>
        </draw:polygon>
        <draw:polygon draw:style-name="gr104" draw:text-style-name="P104" draw:layer="layout" svg:width="1.03cm" svg:height="0.003cm" svg:x="11.045cm" svg:y="24.177cm" svg:viewBox="0 0 1031 4" draw:points="0,0 1031,0 1031,4 0,4">
          <text:p/>
        </draw:polygon>
        <draw:polygon draw:style-name="gr104" draw:text-style-name="P104" draw:layer="layout" svg:width="1.03cm" svg:height="0.003cm" svg:x="11.045cm" svg:y="24.18cm" svg:viewBox="0 0 1031 4" draw:points="0,0 1031,0 1031,4 0,4">
          <text:p/>
        </draw:polygon>
        <draw:polygon draw:style-name="gr105" draw:text-style-name="P105" draw:layer="layout" svg:width="1.03cm" svg:height="0.003cm" svg:x="11.045cm" svg:y="24.183cm" svg:viewBox="0 0 1031 4" draw:points="0,0 1031,0 1031,4 0,4">
          <text:p/>
        </draw:polygon>
        <draw:polygon draw:style-name="gr106" draw:text-style-name="P106" draw:layer="layout" svg:width="1.03cm" svg:height="0.004cm" svg:x="11.045cm" svg:y="24.186cm" svg:viewBox="0 0 1031 5" draw:points="0,0 1031,0 1031,5 0,5">
          <text:p/>
        </draw:polygon>
        <draw:polygon draw:style-name="gr108" draw:text-style-name="P108" draw:layer="layout" svg:width="1.03cm" svg:height="0.003cm" svg:x="11.045cm" svg:y="24.19cm" svg:viewBox="0 0 1031 4" draw:points="0,0 1031,0 1031,4 0,4">
          <text:p/>
        </draw:polygon>
        <draw:polygon draw:style-name="gr108" draw:text-style-name="P108" draw:layer="layout" svg:width="1.03cm" svg:height="0.003cm" svg:x="11.045cm" svg:y="24.193cm" svg:viewBox="0 0 1031 4" draw:points="0,0 1031,0 1031,4 0,4">
          <text:p/>
        </draw:polygon>
        <draw:polygon draw:style-name="gr109" draw:text-style-name="P109" draw:layer="layout" svg:width="1.03cm" svg:height="0.003cm" svg:x="11.045cm" svg:y="24.196cm" svg:viewBox="0 0 1031 4" draw:points="0,0 1031,0 1031,4 0,4">
          <text:p/>
        </draw:polygon>
        <draw:polygon draw:style-name="gr110" draw:text-style-name="P110" draw:layer="layout" svg:width="1.03cm" svg:height="0.003cm" svg:x="11.045cm" svg:y="24.199cm" svg:viewBox="0 0 1031 4" draw:points="0,0 1031,0 1031,4 0,4">
          <text:p/>
        </draw:polygon>
        <draw:polygon draw:style-name="gr111" draw:text-style-name="P111" draw:layer="layout" svg:width="1.03cm" svg:height="0.003cm" svg:x="11.045cm" svg:y="24.202cm" svg:viewBox="0 0 1031 4" draw:points="0,0 1031,0 1031,4 0,4">
          <text:p/>
        </draw:polygon>
        <draw:polygon draw:style-name="gr112" draw:text-style-name="P112" draw:layer="layout" svg:width="1.03cm" svg:height="0.005cm" svg:x="11.045cm" svg:y="24.205cm" svg:viewBox="0 0 1031 6" draw:points="0,0 1031,0 1031,6 0,6">
          <text:p/>
        </draw:polygon>
        <draw:polygon draw:style-name="gr113" draw:text-style-name="P113" draw:layer="layout" svg:width="1.03cm" svg:height="0.003cm" svg:x="11.045cm" svg:y="24.209cm" svg:viewBox="0 0 1031 4" draw:points="0,0 1031,0 1031,4 0,4">
          <text:p/>
        </draw:polygon>
        <draw:polygon draw:style-name="gr150" draw:text-style-name="P150" draw:layer="layout" svg:width="1.03cm" svg:height="0.003cm" svg:x="11.045cm" svg:y="24.212cm" svg:viewBox="0 0 1031 4" draw:points="0,0 1031,0 1031,4 0,4">
          <text:p/>
        </draw:polygon>
        <draw:polygon draw:style-name="gr114" draw:text-style-name="P114" draw:layer="layout" svg:width="1.03cm" svg:height="0.003cm" svg:x="11.045cm" svg:y="24.215cm" svg:viewBox="0 0 1031 4" draw:points="0,0 1031,0 1031,4 0,4">
          <text:p/>
        </draw:polygon>
        <draw:polygon draw:style-name="gr115" draw:text-style-name="P115" draw:layer="layout" svg:width="1.03cm" svg:height="0.003cm" svg:x="11.045cm" svg:y="24.218cm" svg:viewBox="0 0 1031 4" draw:points="0,0 1031,0 1031,4 0,4">
          <text:p/>
        </draw:polygon>
        <draw:polygon draw:style-name="gr116" draw:text-style-name="P116" draw:layer="layout" svg:width="1.03cm" svg:height="0.004cm" svg:x="11.045cm" svg:y="24.221cm" svg:viewBox="0 0 1031 5" draw:points="0,0 1031,0 1031,5 0,5">
          <text:p/>
        </draw:polygon>
        <draw:polygon draw:style-name="gr116" draw:text-style-name="P116" draw:layer="layout" svg:width="1.03cm" svg:height="0.003cm" svg:x="11.045cm" svg:y="24.225cm" svg:viewBox="0 0 1031 4" draw:points="0,0 1031,0 1031,4 0,4">
          <text:p/>
        </draw:polygon>
        <draw:polygon draw:style-name="gr117" draw:text-style-name="P117" draw:layer="layout" svg:width="1.03cm" svg:height="0.003cm" svg:x="11.045cm" svg:y="24.228cm" svg:viewBox="0 0 1031 4" draw:points="0,0 1031,0 1031,4 0,4">
          <text:p/>
        </draw:polygon>
        <draw:polygon draw:style-name="gr118" draw:text-style-name="P118" draw:layer="layout" svg:width="1.03cm" svg:height="0.003cm" svg:x="11.045cm" svg:y="24.231cm" svg:viewBox="0 0 1031 4" draw:points="0,0 1031,0 1031,4 0,4">
          <text:p/>
        </draw:polygon>
        <draw:polygon draw:style-name="gr118" draw:text-style-name="P118" draw:layer="layout" svg:width="1.03cm" svg:height="0.003cm" svg:x="11.045cm" svg:y="24.234cm" svg:viewBox="0 0 1031 4" draw:points="0,0 1031,0 1031,4 0,4">
          <text:p/>
        </draw:polygon>
        <draw:polygon draw:style-name="gr119" draw:text-style-name="P119" draw:layer="layout" svg:width="1.03cm" svg:height="0.003cm" svg:x="11.045cm" svg:y="24.237cm" svg:viewBox="0 0 1031 4" draw:points="0,0 1031,0 1031,4 0,4">
          <text:p/>
        </draw:polygon>
        <draw:polygon draw:style-name="gr120" draw:text-style-name="P120" draw:layer="layout" svg:width="1.03cm" svg:height="0.004cm" svg:x="11.045cm" svg:y="24.24cm" svg:viewBox="0 0 1031 5" draw:points="0,0 1031,0 1031,5 0,5">
          <text:p/>
        </draw:polygon>
        <draw:polygon draw:style-name="gr121" draw:text-style-name="P121" draw:layer="layout" svg:width="1.03cm" svg:height="0.003cm" svg:x="11.045cm" svg:y="24.244cm" svg:viewBox="0 0 1031 4" draw:points="0,0 1031,0 1031,4 0,4">
          <text:p/>
        </draw:polygon>
        <draw:polygon draw:style-name="gr121" draw:text-style-name="P121" draw:layer="layout" svg:width="1.03cm" svg:height="0.003cm" svg:x="11.045cm" svg:y="24.247cm" svg:viewBox="0 0 1031 4" draw:points="0,0 1031,0 1031,4 0,4">
          <text:p/>
        </draw:polygon>
        <draw:polygon draw:style-name="gr122" draw:text-style-name="P122" draw:layer="layout" svg:width="1.03cm" svg:height="0.003cm" svg:x="11.045cm" svg:y="24.25cm" svg:viewBox="0 0 1031 4" draw:points="0,0 1031,0 1031,4 0,4">
          <text:p/>
        </draw:polygon>
        <draw:polygon draw:style-name="gr123" draw:text-style-name="P123" draw:layer="layout" svg:width="1.03cm" svg:height="0.003cm" svg:x="11.045cm" svg:y="24.253cm" svg:viewBox="0 0 1031 4" draw:points="0,0 1031,0 1031,4 0,4">
          <text:p/>
        </draw:polygon>
        <draw:polygon draw:style-name="gr123" draw:text-style-name="P123" draw:layer="layout" svg:width="1.03cm" svg:height="0.007cm" svg:x="11.045cm" svg:y="24.256cm" svg:viewBox="0 0 1031 8" draw:points="0,0 1031,0 1031,8 0,8">
          <text:p/>
        </draw:polygon>
        <draw:polygon draw:style-name="gr124" draw:text-style-name="P124" draw:layer="layout" svg:width="1.03cm" svg:height="0.006cm" svg:x="11.045cm" svg:y="24.263cm" svg:viewBox="0 0 1031 7" draw:points="0,0 1031,0 1031,7 0,7">
          <text:p/>
        </draw:polygon>
        <draw:polygon draw:style-name="gr124" draw:text-style-name="P124" draw:layer="layout" svg:width="1.03cm" svg:height="0.006cm" svg:x="11.045cm" svg:y="24.269cm" svg:viewBox="0 0 1031 7" draw:points="0,0 1031,0 1031,7 0,7">
          <text:p/>
        </draw:polygon>
        <draw:polygon draw:style-name="gr125" draw:text-style-name="P125" draw:layer="layout" svg:width="1.03cm" svg:height="0.007cm" svg:x="11.045cm" svg:y="24.275cm" svg:viewBox="0 0 1031 8" draw:points="0,0 1031,0 1031,8 0,8">
          <text:p/>
        </draw:polygon>
        <draw:polygon draw:style-name="gr125" draw:text-style-name="P125" draw:layer="layout" svg:width="1.03cm" svg:height="0.006cm" svg:x="11.045cm" svg:y="24.282cm" svg:viewBox="0 0 1031 7" draw:points="0,0 1031,0 1031,7 0,7">
          <text:p/>
        </draw:polygon>
        <draw:polygon draw:style-name="gr126" draw:text-style-name="P126" draw:layer="layout" svg:width="1.03cm" svg:height="0.006cm" svg:x="11.045cm" svg:y="24.288cm" svg:viewBox="0 0 1031 7" draw:points="0,0 1031,0 1031,7 0,7">
          <text:p/>
        </draw:polygon>
        <draw:polygon draw:style-name="gr126" draw:text-style-name="P126" draw:layer="layout" svg:width="1.03cm" svg:height="0.007cm" svg:x="11.045cm" svg:y="24.294cm" svg:viewBox="0 0 1031 8" draw:points="0,0 1031,0 1031,8 0,8">
          <text:p/>
        </draw:polygon>
        <draw:polygon draw:style-name="gr127" draw:text-style-name="P127" draw:layer="layout" svg:width="1.03cm" svg:height="0.006cm" svg:x="11.045cm" svg:y="24.301cm" svg:viewBox="0 0 1031 7" draw:points="0,0 1031,0 1031,7 0,7">
          <text:p/>
        </draw:polygon>
        <draw:polygon draw:style-name="gr151" draw:text-style-name="P151" draw:layer="layout" svg:width="1.03cm" svg:height="0.006cm" svg:x="11.045cm" svg:y="24.307cm" svg:viewBox="0 0 1031 7" draw:points="0,0 1031,0 1031,7 0,7">
          <text:p/>
        </draw:polygon>
        <draw:polygon draw:style-name="gr128" draw:text-style-name="P128" draw:layer="layout" svg:width="1.03cm" svg:height="0.007cm" svg:x="11.045cm" svg:y="24.313cm" svg:viewBox="0 0 1031 8" draw:points="0,0 1031,0 1031,8 0,8">
          <text:p/>
        </draw:polygon>
        <draw:polygon draw:style-name="gr129" draw:text-style-name="P129" draw:layer="layout" svg:width="1.03cm" svg:height="0.006cm" svg:x="11.045cm" svg:y="24.32cm" svg:viewBox="0 0 1031 7" draw:points="0,0 1031,0 1031,7 0,7">
          <text:p/>
        </draw:polygon>
        <draw:polygon draw:style-name="gr130" draw:text-style-name="P130" draw:layer="layout" svg:width="1.03cm" svg:height="0.006cm" svg:x="11.045cm" svg:y="24.326cm" svg:viewBox="0 0 1031 7" draw:points="0,0 1031,0 1031,7 0,7">
          <text:p/>
        </draw:polygon>
        <draw:polygon draw:style-name="gr131" draw:text-style-name="P131" draw:layer="layout" svg:width="1.03cm" svg:height="0.008cm" svg:x="11.045cm" svg:y="24.332cm" svg:viewBox="0 0 1031 9" draw:points="0,0 1031,0 1031,9 0,9">
          <text:p/>
        </draw:polygon>
        <draw:polygon draw:style-name="gr132" draw:text-style-name="P132" draw:layer="layout" svg:width="1.03cm" svg:height="0.006cm" svg:x="11.045cm" svg:y="24.339cm" svg:viewBox="0 0 1031 7" draw:points="0,0 1031,0 1031,7 0,7">
          <text:p/>
        </draw:polygon>
        <draw:polygon draw:style-name="gr133" draw:text-style-name="P133" draw:layer="layout" svg:width="1.03cm" svg:height="0.006cm" svg:x="11.045cm" svg:y="24.345cm" svg:viewBox="0 0 1031 7" draw:points="0,0 1031,0 1031,7 0,7">
          <text:p/>
        </draw:polygon>
        <draw:polygon draw:style-name="gr134" draw:text-style-name="P134" draw:layer="layout" svg:width="1.03cm" svg:height="0.007cm" svg:x="11.045cm" svg:y="24.351cm" svg:viewBox="0 0 1031 8" draw:points="0,0 1031,0 1031,8 0,8">
          <text:p/>
        </draw:polygon>
        <draw:polygon draw:style-name="gr135" draw:text-style-name="P135" draw:layer="layout" svg:width="1.03cm" svg:height="0.006cm" svg:x="11.045cm" svg:y="24.358cm" svg:viewBox="0 0 1031 7" draw:points="0,0 1031,0 1031,7 0,7">
          <text:p/>
        </draw:polygon>
        <draw:polygon draw:style-name="gr136" draw:text-style-name="P136" draw:layer="layout" svg:width="1.03cm" svg:height="0.006cm" svg:x="11.045cm" svg:y="24.364cm" svg:viewBox="0 0 1031 7" draw:points="0,0 1031,0 1031,7 0,7">
          <text:p/>
        </draw:polygon>
        <draw:polygon draw:style-name="gr137" draw:text-style-name="P137" draw:layer="layout" svg:width="1.03cm" svg:height="0.007cm" svg:x="11.045cm" svg:y="24.37cm" svg:viewBox="0 0 1031 8" draw:points="0,0 1031,0 1031,8 0,8">
          <text:p/>
        </draw:polygon>
        <draw:polygon draw:style-name="gr138" draw:text-style-name="P138" draw:layer="layout" svg:width="1.03cm" svg:height="0.006cm" svg:x="11.045cm" svg:y="24.377cm" svg:viewBox="0 0 1031 7" draw:points="0,0 1031,0 1031,7 0,7">
          <text:p/>
        </draw:polygon>
        <draw:polygon draw:style-name="gr139" draw:text-style-name="P139" draw:layer="layout" svg:width="1.03cm" svg:height="0.007cm" svg:x="11.045cm" svg:y="24.383cm" svg:viewBox="0 0 1031 8" draw:points="0,0 1031,0 1031,8 0,8">
          <text:p/>
        </draw:polygon>
        <draw:polygon draw:style-name="gr140" draw:text-style-name="P140" draw:layer="layout" svg:width="1.03cm" svg:height="0.006cm" svg:x="11.045cm" svg:y="24.39cm" svg:viewBox="0 0 1031 7" draw:points="0,0 1031,0 1031,7 0,7">
          <text:p/>
        </draw:polygon>
        <draw:polygon draw:style-name="gr141" draw:text-style-name="P141" draw:layer="layout" svg:width="1.03cm" svg:height="0.006cm" svg:x="11.045cm" svg:y="24.396cm" svg:viewBox="0 0 1031 7" draw:points="0,0 1031,0 1031,7 0,7">
          <text:p/>
        </draw:polygon>
        <draw:polygon draw:style-name="gr142" draw:text-style-name="P142" draw:layer="layout" svg:width="1.03cm" svg:height="0.007cm" svg:x="11.045cm" svg:y="24.402cm" svg:viewBox="0 0 1031 8" draw:points="0,0 1031,0 1031,8 0,8">
          <text:p/>
        </draw:polygon>
        <draw:polygon draw:style-name="gr143" draw:text-style-name="P143" draw:layer="layout" svg:width="1.03cm" svg:height="0.006cm" svg:x="11.045cm" svg:y="24.409cm" svg:viewBox="0 0 1031 7" draw:points="0,0 1031,0 1031,7 0,7">
          <text:p/>
        </draw:polygon>
        <draw:polygon draw:style-name="gr144" draw:text-style-name="P144" draw:layer="layout" svg:width="1.03cm" svg:height="0.006cm" svg:x="11.045cm" svg:y="24.415cm" svg:viewBox="0 0 1031 7" draw:points="0,0 1031,0 1031,7 0,7">
          <text:p/>
        </draw:polygon>
        <draw:polygon draw:style-name="gr144" draw:text-style-name="P144" draw:layer="layout" svg:width="1.03cm" svg:height="0.007cm" svg:x="11.045cm" svg:y="24.421cm" svg:viewBox="0 0 1031 8" draw:points="0,0 1031,0 1031,8 0,8">
          <text:p/>
        </draw:polygon>
        <draw:polygon draw:style-name="gr145" draw:text-style-name="P145" draw:layer="layout" svg:width="1.03cm" svg:height="0.006cm" svg:x="11.045cm" svg:y="24.428cm" svg:viewBox="0 0 1031 7" draw:points="0,0 1031,0 1031,7 0,7">
          <text:p/>
        </draw:polygon>
        <draw:polygon draw:style-name="gr145" draw:text-style-name="P145" draw:layer="layout" svg:width="1.03cm" svg:height="0.006cm" svg:x="11.045cm" svg:y="24.434cm" svg:viewBox="0 0 1031 7" draw:points="0,0 1031,0 1031,7 0,7">
          <text:p/>
        </draw:polygon>
        <draw:polygon draw:style-name="gr146" draw:text-style-name="P146" draw:layer="layout" svg:width="1.03cm" svg:height="0.008cm" svg:x="11.045cm" svg:y="24.44cm" svg:viewBox="0 0 1031 9" draw:points="0,0 1031,0 1031,9 0,9">
          <text:p/>
        </draw:polygon>
        <draw:polygon draw:style-name="gr146" draw:text-style-name="P146" draw:layer="layout" svg:width="1.03cm" svg:height="0.006cm" svg:x="11.045cm" svg:y="24.447cm" svg:viewBox="0 0 1031 7" draw:points="0,0 1031,0 1031,7 0,7">
          <text:p/>
        </draw:polygon>
        <draw:polygon draw:style-name="gr147" draw:text-style-name="P147" draw:layer="layout" svg:width="1.03cm" svg:height="0.006cm" svg:x="11.045cm" svg:y="24.453cm" svg:viewBox="0 0 1031 7" draw:points="0,0 1031,0 1031,7 0,7">
          <text:p/>
        </draw:polygon>
        <draw:polygon draw:style-name="gr72" draw:text-style-name="P72" draw:layer="layout" svg:width="1.03cm" svg:height="0.043cm" svg:x="15.66cm" svg:y="18.906cm" svg:viewBox="0 0 1031 44" draw:points="0,0 1031,0 1031,44 0,44">
          <text:p/>
        </draw:polygon>
        <draw:polygon draw:style-name="gr73" draw:text-style-name="P73" draw:layer="layout" svg:width="1.03cm" svg:height="0.043cm" svg:x="15.66cm" svg:y="18.949cm" svg:viewBox="0 0 1031 44" draw:points="0,0 1031,0 1031,44 0,44">
          <text:p/>
        </draw:polygon>
        <draw:polygon draw:style-name="gr74" draw:text-style-name="P74" draw:layer="layout" svg:width="1.03cm" svg:height="0.044cm" svg:x="15.66cm" svg:y="18.992cm" svg:viewBox="0 0 1031 45" draw:points="0,0 1031,0 1031,45 0,45">
          <text:p/>
        </draw:polygon>
        <draw:polygon draw:style-name="gr74" draw:text-style-name="P74" draw:layer="layout" svg:width="1.03cm" svg:height="0.043cm" svg:x="15.66cm" svg:y="19.036cm" svg:viewBox="0 0 1031 44" draw:points="0,0 1031,0 1031,44 0,44">
          <text:p/>
        </draw:polygon>
        <draw:polygon draw:style-name="gr75" draw:text-style-name="P75" draw:layer="layout" svg:width="1.03cm" svg:height="0.044cm" svg:x="15.66cm" svg:y="19.079cm" svg:viewBox="0 0 1031 45" draw:points="0,0 1031,0 1031,45 0,45">
          <text:p/>
        </draw:polygon>
        <draw:polygon draw:style-name="gr76" draw:text-style-name="P76" draw:layer="layout" svg:width="1.03cm" svg:height="0.043cm" svg:x="15.66cm" svg:y="19.123cm" svg:viewBox="0 0 1031 44" draw:points="0,0 1031,0 1031,44 0,44">
          <text:p/>
        </draw:polygon>
        <draw:polygon draw:style-name="gr78" draw:text-style-name="P78" draw:layer="layout" svg:width="1.03cm" svg:height="0.043cm" svg:x="15.66cm" svg:y="19.166cm" svg:viewBox="0 0 1031 44" draw:points="0,0 1031,0 1031,44 0,44">
          <text:p/>
        </draw:polygon>
        <draw:polygon draw:style-name="gr78" draw:text-style-name="P78" draw:layer="layout" svg:width="1.03cm" svg:height="0.044cm" svg:x="15.66cm" svg:y="19.209cm" svg:viewBox="0 0 1031 45" draw:points="0,0 1031,0 1031,45 0,45">
          <text:p/>
        </draw:polygon>
        <draw:polygon draw:style-name="gr79" draw:text-style-name="P79" draw:layer="layout" svg:width="1.03cm" svg:height="0.043cm" svg:x="15.66cm" svg:y="19.253cm" svg:viewBox="0 0 1031 44" draw:points="0,0 1031,0 1031,44 0,44">
          <text:p/>
        </draw:polygon>
        <draw:polygon draw:style-name="gr81" draw:text-style-name="P81" draw:layer="layout" svg:width="1.03cm" svg:height="0.043cm" svg:x="15.66cm" svg:y="19.296cm" svg:viewBox="0 0 1031 44" draw:points="0,0 1031,0 1031,44 0,44">
          <text:p/>
        </draw:polygon>
        <draw:polygon draw:style-name="gr81" draw:text-style-name="P81" draw:layer="layout" svg:width="1.03cm" svg:height="0.044cm" svg:x="15.66cm" svg:y="19.339cm" svg:viewBox="0 0 1031 45" draw:points="0,0 1031,0 1031,45 0,45">
          <text:p/>
        </draw:polygon>
        <draw:polygon draw:style-name="gr82" draw:text-style-name="P82" draw:layer="layout" svg:width="1.03cm" svg:height="0.043cm" svg:x="15.66cm" svg:y="19.383cm" svg:viewBox="0 0 1031 44" draw:points="0,0 1031,0 1031,44 0,44">
          <text:p/>
        </draw:polygon>
        <draw:polygon draw:style-name="gr83" draw:text-style-name="P83" draw:layer="layout" svg:width="1.03cm" svg:height="0.044cm" svg:x="15.66cm" svg:y="19.426cm" svg:viewBox="0 0 1031 45" draw:points="0,0 1031,0 1031,45 0,45">
          <text:p/>
        </draw:polygon>
        <draw:polygon draw:style-name="gr84" draw:text-style-name="P84" draw:layer="layout" svg:width="1.03cm" svg:height="0.043cm" svg:x="15.66cm" svg:y="19.47cm" svg:viewBox="0 0 1031 44" draw:points="0,0 1031,0 1031,44 0,44">
          <text:p/>
        </draw:polygon>
        <draw:polygon draw:style-name="gr85" draw:text-style-name="P85" draw:layer="layout" svg:width="1.03cm" svg:height="0.043cm" svg:x="15.66cm" svg:y="19.513cm" svg:viewBox="0 0 1031 44" draw:points="0,0 1031,0 1031,44 0,44">
          <text:p/>
        </draw:polygon>
        <draw:polygon draw:style-name="gr86" draw:text-style-name="P86" draw:layer="layout" svg:width="1.03cm" svg:height="0.044cm" svg:x="15.66cm" svg:y="19.556cm" svg:viewBox="0 0 1031 45" draw:points="0,0 1031,0 1031,45 0,45">
          <text:p/>
        </draw:polygon>
        <draw:polygon draw:style-name="gr148" draw:text-style-name="P148" draw:layer="layout" svg:width="1.03cm" svg:height="0.043cm" svg:x="15.66cm" svg:y="19.6cm" svg:viewBox="0 0 1031 44" draw:points="0,0 1031,0 1031,44 0,44">
          <text:p/>
        </draw:polygon>
        <draw:polygon draw:style-name="gr87" draw:text-style-name="P87" draw:layer="layout" svg:width="1.03cm" svg:height="0.044cm" svg:x="15.66cm" svg:y="19.643cm" svg:viewBox="0 0 1031 45" draw:points="0,0 1031,0 1031,45 0,45">
          <text:p/>
        </draw:polygon>
        <draw:polygon draw:style-name="gr88" draw:text-style-name="P88" draw:layer="layout" svg:width="1.03cm" svg:height="0.043cm" svg:x="15.66cm" svg:y="19.687cm" svg:viewBox="0 0 1031 44" draw:points="0,0 1031,0 1031,44 0,44">
          <text:p/>
        </draw:polygon>
        <draw:polygon draw:style-name="gr89" draw:text-style-name="P89" draw:layer="layout" svg:width="1.03cm" svg:height="0.043cm" svg:x="15.66cm" svg:y="19.73cm" svg:viewBox="0 0 1031 44" draw:points="0,0 1031,0 1031,44 0,44">
          <text:p/>
        </draw:polygon>
        <draw:polygon draw:style-name="gr89" draw:text-style-name="P89" draw:layer="layout" svg:width="1.03cm" svg:height="0.044cm" svg:x="15.66cm" svg:y="19.773cm" svg:viewBox="0 0 1031 45" draw:points="0,0 1031,0 1031,45 0,45">
          <text:p/>
        </draw:polygon>
        <draw:polygon draw:style-name="gr90" draw:text-style-name="P90" draw:layer="layout" svg:width="1.03cm" svg:height="0.043cm" svg:x="15.66cm" svg:y="19.817cm" svg:viewBox="0 0 1031 44" draw:points="0,0 1031,0 1031,44 0,44">
          <text:p/>
        </draw:polygon>
        <draw:polygon draw:style-name="gr91" draw:text-style-name="P91" draw:layer="layout" svg:width="1.03cm" svg:height="0.044cm" svg:x="15.66cm" svg:y="19.86cm" svg:viewBox="0 0 1031 45" draw:points="0,0 1031,0 1031,45 0,45">
          <text:p/>
        </draw:polygon>
        <draw:polygon draw:style-name="gr92" draw:text-style-name="P92" draw:layer="layout" svg:width="1.03cm" svg:height="0.043cm" svg:x="15.66cm" svg:y="19.904cm" svg:viewBox="0 0 1031 44" draw:points="0,0 1031,0 1031,44 0,44">
          <text:p/>
        </draw:polygon>
        <draw:polygon draw:style-name="gr149" draw:text-style-name="P149" draw:layer="layout" svg:width="1.03cm" svg:height="0.043cm" svg:x="15.66cm" svg:y="19.947cm" svg:viewBox="0 0 1031 44" draw:points="0,0 1031,0 1031,44 0,44">
          <text:p/>
        </draw:polygon>
        <draw:polygon draw:style-name="gr93" draw:text-style-name="P93" draw:layer="layout" svg:width="1.03cm" svg:height="0.044cm" svg:x="15.66cm" svg:y="19.99cm" svg:viewBox="0 0 1031 45" draw:points="0,0 1031,0 1031,45 0,45">
          <text:p/>
        </draw:polygon>
        <draw:polygon draw:style-name="gr94" draw:text-style-name="P94" draw:layer="layout" svg:width="1.03cm" svg:height="0.043cm" svg:x="15.66cm" svg:y="20.034cm" svg:viewBox="0 0 1031 44" draw:points="0,0 1031,0 1031,44 0,44">
          <text:p/>
        </draw:polygon>
        <draw:polygon draw:style-name="gr94" draw:text-style-name="P94" draw:layer="layout" svg:width="1.03cm" svg:height="0.043cm" svg:x="15.66cm" svg:y="20.077cm" svg:viewBox="0 0 1031 44" draw:points="0,0 1031,0 1031,44 0,44">
          <text:p/>
        </draw:polygon>
        <draw:polygon draw:style-name="gr95" draw:text-style-name="P95" draw:layer="layout" svg:width="1.03cm" svg:height="0.044cm" svg:x="15.66cm" svg:y="20.12cm" svg:viewBox="0 0 1031 45" draw:points="0,0 1031,0 1031,45 0,45">
          <text:p/>
        </draw:polygon>
        <draw:polygon draw:style-name="gr96" draw:text-style-name="P96" draw:layer="layout" svg:width="1.03cm" svg:height="0.043cm" svg:x="15.66cm" svg:y="20.164cm" svg:viewBox="0 0 1031 44" draw:points="0,0 1031,0 1031,44 0,44">
          <text:p/>
        </draw:polygon>
        <draw:polygon draw:style-name="gr96" draw:text-style-name="P96" draw:layer="layout" svg:width="1.03cm" svg:height="0.044cm" svg:x="15.66cm" svg:y="20.207cm" svg:viewBox="0 0 1031 45" draw:points="0,0 1031,0 1031,45 0,45">
          <text:p/>
        </draw:polygon>
        <draw:polygon draw:style-name="gr97" draw:text-style-name="P97" draw:layer="layout" svg:width="1.03cm" svg:height="0.043cm" svg:x="15.66cm" svg:y="20.251cm" svg:viewBox="0 0 1031 44" draw:points="0,0 1031,0 1031,44 0,44">
          <text:p/>
        </draw:polygon>
        <draw:polygon draw:style-name="gr98" draw:text-style-name="P98" draw:layer="layout" svg:width="1.03cm" svg:height="0.043cm" svg:x="15.66cm" svg:y="20.294cm" svg:viewBox="0 0 1031 44" draw:points="0,0 1031,0 1031,44 0,44">
          <text:p/>
        </draw:polygon>
        <draw:polygon draw:style-name="gr99" draw:text-style-name="P99" draw:layer="layout" svg:width="1.03cm" svg:height="0.044cm" svg:x="15.66cm" svg:y="20.337cm" svg:viewBox="0 0 1031 45" draw:points="0,0 1031,0 1031,45 0,45">
          <text:p/>
        </draw:polygon>
        <draw:polygon draw:style-name="gr99" draw:text-style-name="P99" draw:layer="layout" svg:width="1.03cm" svg:height="0.043cm" svg:x="15.66cm" svg:y="20.381cm" svg:viewBox="0 0 1031 44" draw:points="0,0 1031,0 1031,44 0,44">
          <text:p/>
        </draw:polygon>
        <draw:polygon draw:style-name="gr100" draw:text-style-name="P100" draw:layer="layout" svg:width="1.03cm" svg:height="0.044cm" svg:x="15.66cm" svg:y="20.424cm" svg:viewBox="0 0 1031 45" draw:points="0,0 1031,0 1031,45 0,45">
          <text:p/>
        </draw:polygon>
        <draw:polygon draw:style-name="gr101" draw:text-style-name="P101" draw:layer="layout" svg:width="1.03cm" svg:height="0.043cm" svg:x="15.66cm" svg:y="20.468cm" svg:viewBox="0 0 1031 44" draw:points="0,0 1031,0 1031,44 0,44">
          <text:p/>
        </draw:polygon>
        <draw:polygon draw:style-name="gr101" draw:text-style-name="P101" draw:layer="layout" svg:width="1.03cm" svg:height="0.043cm" svg:x="15.66cm" svg:y="20.511cm" svg:viewBox="0 0 1031 44" draw:points="0,0 1031,0 1031,44 0,44">
          <text:p/>
        </draw:polygon>
        <draw:polygon draw:style-name="gr102" draw:text-style-name="P102" draw:layer="layout" svg:width="1.03cm" svg:height="0.044cm" svg:x="15.66cm" svg:y="20.554cm" svg:viewBox="0 0 1031 45" draw:points="0,0 1031,0 1031,45 0,45">
          <text:p/>
        </draw:polygon>
        <draw:polygon draw:style-name="gr103" draw:text-style-name="P103" draw:layer="layout" svg:width="1.03cm" svg:height="0.043cm" svg:x="15.66cm" svg:y="20.598cm" svg:viewBox="0 0 1031 44" draw:points="0,0 1031,0 1031,44 0,44">
          <text:p/>
        </draw:polygon>
        <draw:polygon draw:style-name="gr104" draw:text-style-name="P104" draw:layer="layout" svg:width="1.03cm" svg:height="0.044cm" svg:x="15.66cm" svg:y="20.641cm" svg:viewBox="0 0 1031 45" draw:points="0,0 1031,0 1031,45 0,45">
          <text:p/>
        </draw:polygon>
        <draw:polygon draw:style-name="gr105" draw:text-style-name="P105" draw:layer="layout" svg:width="1.03cm" svg:height="0.043cm" svg:x="15.66cm" svg:y="20.685cm" svg:viewBox="0 0 1031 44" draw:points="0,0 1031,0 1031,44 0,44">
          <text:p/>
        </draw:polygon>
        <draw:polygon draw:style-name="gr106" draw:text-style-name="P106" draw:layer="layout" svg:width="1.03cm" svg:height="0.043cm" svg:x="15.66cm" svg:y="20.728cm" svg:viewBox="0 0 1031 44" draw:points="0,0 1031,0 1031,44 0,44">
          <text:p/>
        </draw:polygon>
        <draw:polygon draw:style-name="gr108" draw:text-style-name="P108" draw:layer="layout" svg:width="1.03cm" svg:height="0.044cm" svg:x="15.66cm" svg:y="20.771cm" svg:viewBox="0 0 1031 45" draw:points="0,0 1031,0 1031,45 0,45">
          <text:p/>
        </draw:polygon>
        <draw:polygon draw:style-name="gr108" draw:text-style-name="P108" draw:layer="layout" svg:width="1.03cm" svg:height="0.043cm" svg:x="15.66cm" svg:y="20.815cm" svg:viewBox="0 0 1031 44" draw:points="0,0 1031,0 1031,44 0,44">
          <text:p/>
        </draw:polygon>
        <draw:polygon draw:style-name="gr109" draw:text-style-name="P109" draw:layer="layout" svg:width="1.03cm" svg:height="0.043cm" svg:x="15.66cm" svg:y="20.858cm" svg:viewBox="0 0 1031 44" draw:points="0,0 1031,0 1031,44 0,44">
          <text:p/>
        </draw:polygon>
        <draw:polygon draw:style-name="gr110" draw:text-style-name="P110" draw:layer="layout" svg:width="1.03cm" svg:height="0.044cm" svg:x="15.66cm" svg:y="20.901cm" svg:viewBox="0 0 1031 45" draw:points="0,0 1031,0 1031,45 0,45">
          <text:p/>
        </draw:polygon>
        <draw:polygon draw:style-name="gr111" draw:text-style-name="P111" draw:layer="layout" svg:width="1.03cm" svg:height="0.043cm" svg:x="15.66cm" svg:y="20.945cm" svg:viewBox="0 0 1031 44" draw:points="0,0 1031,0 1031,44 0,44">
          <text:p/>
        </draw:polygon>
        <draw:polygon draw:style-name="gr112" draw:text-style-name="P112" draw:layer="layout" svg:width="1.03cm" svg:height="0.044cm" svg:x="15.66cm" svg:y="20.988cm" svg:viewBox="0 0 1031 45" draw:points="0,0 1031,0 1031,45 0,45">
          <text:p/>
        </draw:polygon>
        <draw:polygon draw:style-name="gr113" draw:text-style-name="P113" draw:layer="layout" svg:width="1.03cm" svg:height="0.043cm" svg:x="15.66cm" svg:y="21.032cm" svg:viewBox="0 0 1031 44" draw:points="0,0 1031,0 1031,44 0,44">
          <text:p/>
        </draw:polygon>
        <draw:polygon draw:style-name="gr150" draw:text-style-name="P150" draw:layer="layout" svg:width="1.03cm" svg:height="0.043cm" svg:x="15.66cm" svg:y="21.075cm" svg:viewBox="0 0 1031 44" draw:points="0,0 1031,0 1031,44 0,44">
          <text:p/>
        </draw:polygon>
        <draw:polygon draw:style-name="gr114" draw:text-style-name="P114" draw:layer="layout" svg:width="1.03cm" svg:height="0.044cm" svg:x="15.66cm" svg:y="21.118cm" svg:viewBox="0 0 1031 45" draw:points="0,0 1031,0 1031,45 0,45">
          <text:p/>
        </draw:polygon>
        <draw:polygon draw:style-name="gr115" draw:text-style-name="P115" draw:layer="layout" svg:width="1.03cm" svg:height="0.043cm" svg:x="15.66cm" svg:y="21.162cm" svg:viewBox="0 0 1031 44" draw:points="0,0 1031,0 1031,44 0,44">
          <text:p/>
        </draw:polygon>
        <draw:polygon draw:style-name="gr116" draw:text-style-name="P116" draw:layer="layout" svg:width="1.03cm" svg:height="0.044cm" svg:x="15.66cm" svg:y="21.205cm" svg:viewBox="0 0 1031 45" draw:points="0,0 1031,0 1031,45 0,45">
          <text:p/>
        </draw:polygon>
        <draw:polygon draw:style-name="gr116" draw:text-style-name="P116" draw:layer="layout" svg:width="1.03cm" svg:height="0.043cm" svg:x="15.66cm" svg:y="21.249cm" svg:viewBox="0 0 1031 44" draw:points="0,0 1031,0 1031,44 0,44">
          <text:p/>
        </draw:polygon>
        <draw:polygon draw:style-name="gr117" draw:text-style-name="P117" draw:layer="layout" svg:width="1.03cm" svg:height="0.043cm" svg:x="15.66cm" svg:y="21.292cm" svg:viewBox="0 0 1031 44" draw:points="0,0 1031,0 1031,44 0,44">
          <text:p/>
        </draw:polygon>
        <draw:polygon draw:style-name="gr118" draw:text-style-name="P118" draw:layer="layout" svg:width="1.03cm" svg:height="0.044cm" svg:x="15.66cm" svg:y="21.335cm" svg:viewBox="0 0 1031 45" draw:points="0,0 1031,0 1031,45 0,45">
          <text:p/>
        </draw:polygon>
        <draw:polygon draw:style-name="gr118" draw:text-style-name="P118" draw:layer="layout" svg:width="1.03cm" svg:height="0.043cm" svg:x="15.66cm" svg:y="21.379cm" svg:viewBox="0 0 1031 44" draw:points="0,0 1031,0 1031,44 0,44">
          <text:p/>
        </draw:polygon>
        <draw:polygon draw:style-name="gr119" draw:text-style-name="P119" draw:layer="layout" svg:width="1.03cm" svg:height="0.044cm" svg:x="15.66cm" svg:y="21.422cm" svg:viewBox="0 0 1031 45" draw:points="0,0 1031,0 1031,45 0,45">
          <text:p/>
        </draw:polygon>
        <draw:polygon draw:style-name="gr120" draw:text-style-name="P120" draw:layer="layout" svg:width="1.03cm" svg:height="0.043cm" svg:x="15.66cm" svg:y="21.466cm" svg:viewBox="0 0 1031 44" draw:points="0,0 1031,0 1031,44 0,44">
          <text:p/>
        </draw:polygon>
        <draw:polygon draw:style-name="gr121" draw:text-style-name="P121" draw:layer="layout" svg:width="1.03cm" svg:height="0.043cm" svg:x="15.66cm" svg:y="21.509cm" svg:viewBox="0 0 1031 44" draw:points="0,0 1031,0 1031,44 0,44">
          <text:p/>
        </draw:polygon>
        <draw:polygon draw:style-name="gr121" draw:text-style-name="P121" draw:layer="layout" svg:width="1.03cm" svg:height="0.044cm" svg:x="15.66cm" svg:y="21.552cm" svg:viewBox="0 0 1031 45" draw:points="0,0 1031,0 1031,45 0,45">
          <text:p/>
        </draw:polygon>
        <draw:polygon draw:style-name="gr122" draw:text-style-name="P122" draw:layer="layout" svg:width="1.03cm" svg:height="0.043cm" svg:x="15.66cm" svg:y="21.596cm" svg:viewBox="0 0 1031 44" draw:points="0,0 1031,0 1031,44 0,44">
          <text:p/>
        </draw:polygon>
        <draw:polygon draw:style-name="gr123" draw:text-style-name="P123" draw:layer="layout" svg:width="1.03cm" svg:height="0.043cm" svg:x="15.66cm" svg:y="21.639cm" svg:viewBox="0 0 1031 44" draw:points="0,0 1031,0 1031,44 0,44">
          <text:p/>
        </draw:polygon>
        <draw:polygon draw:style-name="gr123" draw:text-style-name="P123" draw:layer="layout" svg:width="1.03cm" svg:height="0.087cm" svg:x="15.66cm" svg:y="21.682cm" svg:viewBox="0 0 1031 88" draw:points="0,0 1031,0 1031,88 0,88">
          <text:p/>
        </draw:polygon>
        <draw:polygon draw:style-name="gr124" draw:text-style-name="P124" draw:layer="layout" svg:width="1.03cm" svg:height="0.087cm" svg:x="15.66cm" svg:y="21.769cm" svg:viewBox="0 0 1031 88" draw:points="0,0 1031,0 1031,88 0,88">
          <text:p/>
        </draw:polygon>
        <draw:polygon draw:style-name="gr124" draw:text-style-name="P124" draw:layer="layout" svg:width="1.03cm" svg:height="0.087cm" svg:x="15.66cm" svg:y="21.856cm" svg:viewBox="0 0 1031 88" draw:points="0,0 1031,0 1031,88 0,88">
          <text:p/>
        </draw:polygon>
        <draw:polygon draw:style-name="gr125" draw:text-style-name="P125" draw:layer="layout" svg:width="1.03cm" svg:height="0.087cm" svg:x="15.66cm" svg:y="21.943cm" svg:viewBox="0 0 1031 88" draw:points="0,0 1031,0 1031,88 0,88">
          <text:p/>
        </draw:polygon>
        <draw:polygon draw:style-name="gr125" draw:text-style-name="P125" draw:layer="layout" svg:width="1.03cm" svg:height="0.086cm" svg:x="15.66cm" svg:y="22.03cm" svg:viewBox="0 0 1031 87" draw:points="0,0 1031,0 1031,87 0,87">
          <text:p/>
        </draw:polygon>
        <draw:polygon draw:style-name="gr126" draw:text-style-name="P126" draw:layer="layout" svg:width="1.03cm" svg:height="0.087cm" svg:x="15.66cm" svg:y="22.116cm" svg:viewBox="0 0 1031 88" draw:points="0,0 1031,0 1031,88 0,88">
          <text:p/>
        </draw:polygon>
        <draw:polygon draw:style-name="gr126" draw:text-style-name="P126" draw:layer="layout" svg:width="1.03cm" svg:height="0.087cm" svg:x="15.66cm" svg:y="22.203cm" svg:viewBox="0 0 1031 88" draw:points="0,0 1031,0 1031,88 0,88">
          <text:p/>
        </draw:polygon>
        <draw:polygon draw:style-name="gr127" draw:text-style-name="P127" draw:layer="layout" svg:width="1.03cm" svg:height="0.087cm" svg:x="15.66cm" svg:y="22.29cm" svg:viewBox="0 0 1031 88" draw:points="0,0 1031,0 1031,88 0,88">
          <text:p/>
        </draw:polygon>
        <draw:polygon draw:style-name="gr151" draw:text-style-name="P151" draw:layer="layout" svg:width="1.03cm" svg:height="0.086cm" svg:x="15.66cm" svg:y="22.377cm" svg:viewBox="0 0 1031 87" draw:points="0,0 1031,0 1031,87 0,87">
          <text:p/>
        </draw:polygon>
        <draw:polygon draw:style-name="gr128" draw:text-style-name="P128" draw:layer="layout" svg:width="1.03cm" svg:height="0.087cm" svg:x="15.66cm" svg:y="22.463cm" svg:viewBox="0 0 1031 88" draw:points="0,0 1031,0 1031,88 0,88">
          <text:p/>
        </draw:polygon>
        <draw:polygon draw:style-name="gr129" draw:text-style-name="P129" draw:layer="layout" svg:width="1.03cm" svg:height="0.087cm" svg:x="15.66cm" svg:y="22.55cm" svg:viewBox="0 0 1031 88" draw:points="0,0 1031,0 1031,88 0,88">
          <text:p/>
        </draw:polygon>
        <draw:polygon draw:style-name="gr130" draw:text-style-name="P130" draw:layer="layout" svg:width="1.03cm" svg:height="0.087cm" svg:x="15.66cm" svg:y="22.637cm" svg:viewBox="0 0 1031 88" draw:points="0,0 1031,0 1031,88 0,88">
          <text:p/>
        </draw:polygon>
        <draw:polygon draw:style-name="gr131" draw:text-style-name="P131" draw:layer="layout" svg:width="1.03cm" svg:height="0.087cm" svg:x="15.66cm" svg:y="22.724cm" svg:viewBox="0 0 1031 88" draw:points="0,0 1031,0 1031,88 0,88">
          <text:p/>
        </draw:polygon>
        <draw:polygon draw:style-name="gr132" draw:text-style-name="P132" draw:layer="layout" svg:width="1.03cm" svg:height="0.086cm" svg:x="15.66cm" svg:y="22.811cm" svg:viewBox="0 0 1031 87" draw:points="0,0 1031,0 1031,87 0,87">
          <text:p/>
        </draw:polygon>
        <draw:polygon draw:style-name="gr133" draw:text-style-name="P133" draw:layer="layout" svg:width="1.03cm" svg:height="0.087cm" svg:x="15.66cm" svg:y="22.897cm" svg:viewBox="0 0 1031 88" draw:points="0,0 1031,0 1031,88 0,88">
          <text:p/>
        </draw:polygon>
        <draw:polygon draw:style-name="gr134" draw:text-style-name="P134" draw:layer="layout" svg:width="1.03cm" svg:height="0.087cm" svg:x="15.66cm" svg:y="22.984cm" svg:viewBox="0 0 1031 88" draw:points="0,0 1031,0 1031,88 0,88">
          <text:p/>
        </draw:polygon>
        <draw:polygon draw:style-name="gr135" draw:text-style-name="P135" draw:layer="layout" svg:width="1.03cm" svg:height="0.087cm" svg:x="15.66cm" svg:y="23.071cm" svg:viewBox="0 0 1031 88" draw:points="0,0 1031,0 1031,88 0,88">
          <text:p/>
        </draw:polygon>
        <draw:polygon draw:style-name="gr136" draw:text-style-name="P136" draw:layer="layout" svg:width="1.03cm" svg:height="0.086cm" svg:x="15.66cm" svg:y="23.158cm" svg:viewBox="0 0 1031 87" draw:points="0,0 1031,0 1031,87 0,87">
          <text:p/>
        </draw:polygon>
        <draw:polygon draw:style-name="gr137" draw:text-style-name="P137" draw:layer="layout" svg:width="1.03cm" svg:height="0.087cm" svg:x="15.66cm" svg:y="23.244cm" svg:viewBox="0 0 1031 88" draw:points="0,0 1031,0 1031,88 0,88">
          <text:p/>
        </draw:polygon>
        <draw:polygon draw:style-name="gr138" draw:text-style-name="P138" draw:layer="layout" svg:width="1.03cm" svg:height="0.087cm" svg:x="15.66cm" svg:y="23.331cm" svg:viewBox="0 0 1031 88" draw:points="0,0 1031,0 1031,88 0,88">
          <text:p/>
        </draw:polygon>
        <draw:polygon draw:style-name="gr139" draw:text-style-name="P139" draw:layer="layout" svg:width="1.03cm" svg:height="0.087cm" svg:x="15.66cm" svg:y="23.418cm" svg:viewBox="0 0 1031 88" draw:points="0,0 1031,0 1031,88 0,88">
          <text:p/>
        </draw:polygon>
        <draw:polygon draw:style-name="gr140" draw:text-style-name="P140" draw:layer="layout" svg:width="1.03cm" svg:height="0.087cm" svg:x="15.66cm" svg:y="23.505cm" svg:viewBox="0 0 1031 88" draw:points="0,0 1031,0 1031,88 0,88">
          <text:p/>
        </draw:polygon>
        <draw:polygon draw:style-name="gr141" draw:text-style-name="P141" draw:layer="layout" svg:width="1.03cm" svg:height="0.086cm" svg:x="15.66cm" svg:y="23.592cm" svg:viewBox="0 0 1031 87" draw:points="0,0 1031,0 1031,87 0,87">
          <text:p/>
        </draw:polygon>
        <draw:polygon draw:style-name="gr142" draw:text-style-name="P142" draw:layer="layout" svg:width="1.03cm" svg:height="0.087cm" svg:x="15.66cm" svg:y="23.678cm" svg:viewBox="0 0 1031 88" draw:points="0,0 1031,0 1031,88 0,88">
          <text:p/>
        </draw:polygon>
        <draw:polygon draw:style-name="gr143" draw:text-style-name="P143" draw:layer="layout" svg:width="1.03cm" svg:height="0.087cm" svg:x="15.66cm" svg:y="23.765cm" svg:viewBox="0 0 1031 88" draw:points="0,0 1031,0 1031,88 0,88">
          <text:p/>
        </draw:polygon>
        <draw:polygon draw:style-name="gr144" draw:text-style-name="P144" draw:layer="layout" svg:width="1.03cm" svg:height="0.087cm" svg:x="15.66cm" svg:y="23.852cm" svg:viewBox="0 0 1031 88" draw:points="0,0 1031,0 1031,88 0,88">
          <text:p/>
        </draw:polygon>
        <draw:polygon draw:style-name="gr144" draw:text-style-name="P144" draw:layer="layout" svg:width="1.03cm" svg:height="0.086cm" svg:x="15.66cm" svg:y="23.939cm" svg:viewBox="0 0 1031 87" draw:points="0,0 1031,0 1031,87 0,87">
          <text:p/>
        </draw:polygon>
        <draw:polygon draw:style-name="gr145" draw:text-style-name="P145" draw:layer="layout" svg:width="1.03cm" svg:height="0.087cm" svg:x="15.66cm" svg:y="24.025cm" svg:viewBox="0 0 1031 88" draw:points="0,0 1031,0 1031,88 0,88">
          <text:p/>
        </draw:polygon>
        <draw:polygon draw:style-name="gr145" draw:text-style-name="P145" draw:layer="layout" svg:width="1.03cm" svg:height="0.087cm" svg:x="15.66cm" svg:y="24.112cm" svg:viewBox="0 0 1031 88" draw:points="0,0 1031,0 1031,88 0,88">
          <text:p/>
        </draw:polygon>
        <draw:polygon draw:style-name="gr146" draw:text-style-name="P146" draw:layer="layout" svg:width="1.03cm" svg:height="0.087cm" svg:x="15.66cm" svg:y="24.199cm" svg:viewBox="0 0 1031 88" draw:points="0,0 1031,0 1031,88 0,88">
          <text:p/>
        </draw:polygon>
        <draw:polygon draw:style-name="gr146" draw:text-style-name="P146" draw:layer="layout" svg:width="1.03cm" svg:height="0.087cm" svg:x="15.66cm" svg:y="24.286cm" svg:viewBox="0 0 1031 88" draw:points="0,0 1031,0 1031,88 0,88">
          <text:p/>
        </draw:polygon>
        <draw:polygon draw:style-name="gr147" draw:text-style-name="P147" draw:layer="layout" svg:width="1.03cm" svg:height="0.086cm" svg:x="15.66cm" svg:y="24.373cm" svg:viewBox="0 0 1031 87" draw:points="0,0 1031,0 1031,87 0,87">
          <text:p/>
        </draw:polygon>
        <draw:polygon draw:style-name="gr152" draw:text-style-name="P152" draw:layer="layout" svg:width="1.029cm" svg:height="0cm" svg:x="7.707cm" svg:y="24.442cm" svg:viewBox="0 0 1030 0" draw:points="0,0 1030,0">
          <text:p/>
        </draw:polygon>
        <draw:polygon draw:style-name="gr153" draw:text-style-name="P153" draw:layer="layout" svg:width="1.029cm" svg:height="0cm" svg:x="7.707cm" svg:y="24.442cm" svg:viewBox="0 0 1030 1" draw:points="0,0 1030,0 1030,1 0,1">
          <text:p/>
        </draw:polygon>
        <draw:polygon draw:style-name="gr154" draw:text-style-name="P154" draw:layer="layout" svg:width="1.029cm" svg:height="0cm" svg:x="7.707cm" svg:y="24.443cm" svg:viewBox="0 0 1030 0" draw:points="0,0 1030,0">
          <text:p/>
        </draw:polygon>
        <draw:polygon draw:style-name="gr154" draw:text-style-name="P154" draw:layer="layout" svg:width="1.029cm" svg:height="0cm" svg:x="7.707cm" svg:y="24.443cm" svg:viewBox="0 0 1030 1" draw:points="0,0 1030,0 1030,1 0,1">
          <text:p/>
        </draw:polygon>
        <draw:polygon draw:style-name="gr155" draw:text-style-name="P155" draw:layer="layout" svg:width="1.029cm" svg:height="0cm" svg:x="7.707cm" svg:y="24.444cm" svg:viewBox="0 0 1030 0" draw:points="0,0 1030,0">
          <text:p/>
        </draw:polygon>
        <draw:polygon draw:style-name="gr155" draw:text-style-name="P155" draw:layer="layout" svg:width="1.029cm" svg:height="0cm" svg:x="7.707cm" svg:y="24.444cm" svg:viewBox="0 0 1030 1" draw:points="0,0 1030,0 1030,1 0,1">
          <text:p/>
        </draw:polygon>
        <draw:polygon draw:style-name="gr156" draw:text-style-name="P156" draw:layer="layout" svg:width="1.029cm" svg:height="0cm" svg:x="7.707cm" svg:y="24.445cm" svg:viewBox="0 0 1030 1" draw:points="0,0 1030,0 1030,1 0,1">
          <text:p/>
        </draw:polygon>
        <draw:polygon draw:style-name="gr157" draw:text-style-name="P157" draw:layer="layout" svg:width="1.029cm" svg:height="0cm" svg:x="7.707cm" svg:y="24.446cm" svg:viewBox="0 0 1030 0" draw:points="0,0 1030,0">
          <text:p/>
        </draw:polygon>
        <draw:polygon draw:style-name="gr157" draw:text-style-name="P157" draw:layer="layout" svg:width="1.029cm" svg:height="0cm" svg:x="7.707cm" svg:y="24.446cm" svg:viewBox="0 0 1030 1" draw:points="0,0 1030,0 1030,1 0,1">
          <text:p/>
        </draw:polygon>
        <draw:polygon draw:style-name="gr158" draw:text-style-name="P158" draw:layer="layout" svg:width="1.029cm" svg:height="0cm" svg:x="7.707cm" svg:y="24.447cm" svg:viewBox="0 0 1030 0" draw:points="0,0 1030,0">
          <text:p/>
        </draw:polygon>
        <draw:polygon draw:style-name="gr159" draw:text-style-name="P159" draw:layer="layout" svg:width="1.029cm" svg:height="0cm" svg:x="7.707cm" svg:y="24.447cm" svg:viewBox="0 0 1030 1" draw:points="0,0 1030,0 1030,1 0,1">
          <text:p/>
        </draw:polygon>
        <draw:polygon draw:style-name="gr159" draw:text-style-name="P159" draw:layer="layout" svg:width="1.029cm" svg:height="0cm" svg:x="7.707cm" svg:y="24.448cm" svg:viewBox="0 0 1030 0" draw:points="0,0 1030,0">
          <text:p/>
        </draw:polygon>
        <draw:polygon draw:style-name="gr160" draw:text-style-name="P160" draw:layer="layout" svg:width="1.029cm" svg:height="0cm" svg:x="7.707cm" svg:y="24.448cm" svg:viewBox="0 0 1030 1" draw:points="0,0 1030,0 1030,1 0,1">
          <text:p/>
        </draw:polygon>
        <draw:polygon draw:style-name="gr160" draw:text-style-name="P160" draw:layer="layout" svg:width="1.029cm" svg:height="0cm" svg:x="7.707cm" svg:y="24.449cm" svg:viewBox="0 0 1030 0" draw:points="0,0 1030,0">
          <text:p/>
        </draw:polygon>
        <draw:polygon draw:style-name="gr161" draw:text-style-name="P161" draw:layer="layout" svg:width="1.029cm" svg:height="0cm" svg:x="7.707cm" svg:y="24.449cm" svg:viewBox="0 0 1030 1" draw:points="0,0 1030,0 1030,1 0,1">
          <text:p/>
        </draw:polygon>
        <draw:polygon draw:style-name="gr162" draw:text-style-name="P162" draw:layer="layout" svg:width="1.029cm" svg:height="0cm" svg:x="7.707cm" svg:y="24.45cm" svg:viewBox="0 0 1030 1" draw:points="0,0 1030,0 1030,1 0,1">
          <text:p/>
        </draw:polygon>
        <draw:polygon draw:style-name="gr162" draw:text-style-name="P162" draw:layer="layout" svg:width="1.029cm" svg:height="0cm" svg:x="7.707cm" svg:y="24.451cm" svg:viewBox="0 0 1030 0" draw:points="0,0 1030,0">
          <text:p/>
        </draw:polygon>
        <draw:polygon draw:style-name="gr163" draw:text-style-name="P163" draw:layer="layout" svg:width="1.029cm" svg:height="0cm" svg:x="7.707cm" svg:y="24.451cm" svg:viewBox="0 0 1030 0" draw:points="0,0 1030,0">
          <text:p/>
        </draw:polygon>
        <draw:polygon draw:style-name="gr163" draw:text-style-name="P163" draw:layer="layout" svg:width="1.029cm" svg:height="0cm" svg:x="7.707cm" svg:y="24.451cm" svg:viewBox="0 0 1030 0" draw:points="0,0 1030,0">
          <text:p/>
        </draw:polygon>
        <draw:polygon draw:style-name="gr164" draw:text-style-name="P164" draw:layer="layout" svg:width="1.029cm" svg:height="0cm" svg:x="7.707cm" svg:y="24.451cm" svg:viewBox="0 0 1030 1" draw:points="0,0 1030,0 1030,1 0,1">
          <text:p/>
        </draw:polygon>
        <draw:polygon draw:style-name="gr165" draw:text-style-name="P165" draw:layer="layout" svg:width="1.029cm" svg:height="0cm" svg:x="7.707cm" svg:y="24.452cm" svg:viewBox="0 0 1030 0" draw:points="0,0 1030,0">
          <text:p/>
        </draw:polygon>
        <draw:polygon draw:style-name="gr165" draw:text-style-name="P165" draw:layer="layout" svg:width="1.029cm" svg:height="0cm" svg:x="7.707cm" svg:y="24.452cm" svg:viewBox="0 0 1030 0" draw:points="0,0 1030,0">
          <text:p/>
        </draw:polygon>
        <draw:polygon draw:style-name="gr166" draw:text-style-name="P166" draw:layer="layout" svg:width="1.029cm" svg:height="0cm" svg:x="7.707cm" svg:y="24.452cm" svg:viewBox="0 0 1030 0" draw:points="0,0 1030,0">
          <text:p/>
        </draw:polygon>
        <draw:polygon draw:style-name="gr166" draw:text-style-name="P166" draw:layer="layout" svg:width="1.029cm" svg:height="0cm" svg:x="7.707cm" svg:y="24.452cm" svg:viewBox="0 0 1030 1" draw:points="0,0 1030,0 1030,1 0,1">
          <text:p/>
        </draw:polygon>
        <draw:polygon draw:style-name="gr167" draw:text-style-name="P167" draw:layer="layout" svg:width="1.029cm" svg:height="0cm" svg:x="7.707cm" svg:y="24.453cm" svg:viewBox="0 0 1030 0" draw:points="0,0 1030,0">
          <text:p/>
        </draw:polygon>
        <draw:polygon draw:style-name="gr168" draw:text-style-name="P168" draw:layer="layout" svg:width="1.029cm" svg:height="0cm" svg:x="7.707cm" svg:y="24.453cm" svg:viewBox="0 0 1030 0" draw:points="0,0 1030,0">
          <text:p/>
        </draw:polygon>
        <draw:polygon draw:style-name="gr168" draw:text-style-name="P168" draw:layer="layout" svg:width="1.029cm" svg:height="0cm" svg:x="7.707cm" svg:y="24.453cm" svg:viewBox="0 0 1030 1" draw:points="0,0 1030,0 1030,1 0,1">
          <text:p/>
        </draw:polygon>
        <draw:polygon draw:style-name="gr169" draw:text-style-name="P169" draw:layer="layout" svg:width="1.029cm" svg:height="0cm" svg:x="7.707cm" svg:y="24.454cm" svg:viewBox="0 0 1030 0" draw:points="0,0 1030,0">
          <text:p/>
        </draw:polygon>
        <draw:polygon draw:style-name="gr169" draw:text-style-name="P169" draw:layer="layout" svg:width="1.029cm" svg:height="0cm" svg:x="7.707cm" svg:y="24.454cm" svg:viewBox="0 0 1030 0" draw:points="0,0 1030,0">
          <text:p/>
        </draw:polygon>
        <draw:polygon draw:style-name="gr170" draw:text-style-name="P170" draw:layer="layout" svg:width="1.029cm" svg:height="0cm" svg:x="7.707cm" svg:y="24.454cm" svg:viewBox="0 0 1030 0" draw:points="0,0 1030,0">
          <text:p/>
        </draw:polygon>
        <draw:polygon draw:style-name="gr171" draw:text-style-name="P171" draw:layer="layout" svg:width="1.029cm" svg:height="0cm" svg:x="7.707cm" svg:y="24.454cm" svg:viewBox="0 0 1030 1" draw:points="0,0 1030,0 1030,1 0,1">
          <text:p/>
        </draw:polygon>
        <draw:polygon draw:style-name="gr171" draw:text-style-name="P171" draw:layer="layout" svg:width="1.029cm" svg:height="0cm" svg:x="7.707cm" svg:y="24.455cm" svg:viewBox="0 0 1030 0" draw:points="0,0 1030,0">
          <text:p/>
        </draw:polygon>
        <draw:polygon draw:style-name="gr172" draw:text-style-name="P172" draw:layer="layout" svg:width="1.029cm" svg:height="0cm" svg:x="7.707cm" svg:y="24.455cm" svg:viewBox="0 0 1030 0" draw:points="0,0 1030,0">
          <text:p/>
        </draw:polygon>
        <draw:polygon draw:style-name="gr172" draw:text-style-name="P172" draw:layer="layout" svg:width="1.029cm" svg:height="0cm" svg:x="7.707cm" svg:y="24.455cm" svg:viewBox="0 0 1030 0" draw:points="0,0 1030,0">
          <text:p/>
        </draw:polygon>
        <draw:polygon draw:style-name="gr173" draw:text-style-name="P173" draw:layer="layout" svg:width="1.029cm" svg:height="0cm" svg:x="7.707cm" svg:y="24.455cm" svg:viewBox="0 0 1030 1" draw:points="0,0 1030,0 1030,1 0,1">
          <text:p/>
        </draw:polygon>
        <draw:polygon draw:style-name="gr174" draw:text-style-name="P174" draw:layer="layout" svg:width="1.029cm" svg:height="0cm" svg:x="7.707cm" svg:y="24.456cm" svg:viewBox="0 0 1030 0" draw:points="0,0 1030,0">
          <text:p/>
        </draw:polygon>
        <draw:polygon draw:style-name="gr174" draw:text-style-name="P174" draw:layer="layout" svg:width="1.029cm" svg:height="0cm" svg:x="7.707cm" svg:y="24.456cm" svg:viewBox="0 0 1030 0" draw:points="0,0 1030,0">
          <text:p/>
        </draw:polygon>
        <draw:polygon draw:style-name="gr175" draw:text-style-name="P175" draw:layer="layout" svg:width="1.029cm" svg:height="0cm" svg:x="7.707cm" svg:y="24.456cm" svg:viewBox="0 0 1030 1" draw:points="0,0 1030,0 1030,1 0,1">
          <text:p/>
        </draw:polygon>
        <draw:polygon draw:style-name="gr175" draw:text-style-name="P175" draw:layer="layout" svg:width="1.029cm" svg:height="0cm" svg:x="7.707cm" svg:y="24.457cm" svg:viewBox="0 0 1030 0" draw:points="0,0 1030,0">
          <text:p/>
        </draw:polygon>
        <draw:polygon draw:style-name="gr176" draw:text-style-name="P176" draw:layer="layout" svg:width="1.029cm" svg:height="0cm" svg:x="7.707cm" svg:y="24.457cm" svg:viewBox="0 0 1030 0" draw:points="0,0 1030,0">
          <text:p/>
        </draw:polygon>
        <draw:polygon draw:style-name="gr177" draw:text-style-name="P177" draw:layer="layout" svg:width="1.029cm" svg:height="0cm" svg:x="7.707cm" svg:y="24.457cm" svg:viewBox="0 0 1030 0" draw:points="0,0 1030,0">
          <text:p/>
        </draw:polygon>
        <draw:polygon draw:style-name="gr177" draw:text-style-name="P177" draw:layer="layout" svg:width="1.029cm" svg:height="0cm" svg:x="7.707cm" svg:y="24.457cm" svg:viewBox="0 0 1030 1" draw:points="0,0 1030,0 1030,1 0,1">
          <text:p/>
        </draw:polygon>
        <draw:polygon draw:style-name="gr178" draw:text-style-name="P178" draw:layer="layout" svg:width="1.029cm" svg:height="0cm" svg:x="7.707cm" svg:y="24.458cm" svg:viewBox="0 0 1030 0" draw:points="0,0 1030,0">
          <text:p/>
        </draw:polygon>
        <draw:polygon draw:style-name="gr178" draw:text-style-name="P178" draw:layer="layout" svg:width="1.029cm" svg:height="0cm" svg:x="7.707cm" svg:y="24.458cm" svg:viewBox="0 0 1030 0" draw:points="0,0 1030,0">
          <text:p/>
        </draw:polygon>
        <draw:polygon draw:style-name="gr179" draw:text-style-name="P179" draw:layer="layout" svg:width="1.029cm" svg:height="0cm" svg:x="7.707cm" svg:y="24.458cm" svg:viewBox="0 0 1030 1" draw:points="0,0 1030,0 1030,1 0,1">
          <text:p/>
        </draw:polygon>
        <draw:polygon draw:style-name="gr180" draw:text-style-name="P180" draw:layer="layout" svg:width="1.029cm" svg:height="0cm" svg:x="7.707cm" svg:y="24.459cm" svg:viewBox="0 0 1030 0" draw:points="0,0 1030,0">
          <text:p/>
        </draw:polygon>
        <draw:polygon draw:style-name="gr180" draw:text-style-name="P180" draw:layer="layout" svg:width="1.029cm" svg:height="0cm" svg:x="7.707cm" svg:y="24.459cm" svg:viewBox="0 0 1030 0" draw:points="0,0 1030,0">
          <text:p/>
        </draw:polygon>
        <draw:polygon draw:style-name="gr181" draw:text-style-name="P181" draw:layer="layout" svg:width="1.029cm" svg:height="0cm" svg:x="7.707cm" svg:y="24.459cm" svg:viewBox="0 0 1030 0" draw:points="0,0 1030,0">
          <text:p/>
        </draw:polygon>
        <draw:polygon draw:style-name="gr152" draw:text-style-name="P152" draw:layer="layout" svg:width="1.03cm" svg:height="0.001cm" svg:x="12.322cm" svg:y="24.41cm" svg:viewBox="0 0 1031 2" draw:points="0,0 1031,0 1031,2 0,2">
          <text:p/>
        </draw:polygon>
        <draw:polygon draw:style-name="gr153" draw:text-style-name="P153" draw:layer="layout" svg:width="1.03cm" svg:height="0.003cm" svg:x="12.322cm" svg:y="24.411cm" svg:viewBox="0 0 1031 4" draw:points="0,0 1031,0 1031,4 0,4">
          <text:p/>
        </draw:polygon>
        <draw:polygon draw:style-name="gr154" draw:text-style-name="P154" draw:layer="layout" svg:width="1.03cm" svg:height="0.001cm" svg:x="12.322cm" svg:y="24.413cm" svg:viewBox="0 0 1031 2" draw:points="0,0 1031,0 1031,2 0,2">
          <text:p/>
        </draw:polygon>
        <draw:polygon draw:style-name="gr154" draw:text-style-name="P154" draw:layer="layout" svg:width="1.03cm" svg:height="0.003cm" svg:x="12.322cm" svg:y="24.414cm" svg:viewBox="0 0 1031 4" draw:points="0,0 1031,0 1031,4 0,4">
          <text:p/>
        </draw:polygon>
        <draw:polygon draw:style-name="gr155" draw:text-style-name="P155" draw:layer="layout" svg:width="1.03cm" svg:height="0.003cm" svg:x="12.322cm" svg:y="24.416cm" svg:viewBox="0 0 1031 4" draw:points="0,0 1031,0 1031,4 0,4">
          <text:p/>
        </draw:polygon>
        <draw:polygon draw:style-name="gr155" draw:text-style-name="P155" draw:layer="layout" svg:width="1.03cm" svg:height="0.001cm" svg:x="12.322cm" svg:y="24.418cm" svg:viewBox="0 0 1031 2" draw:points="0,0 1031,0 1031,2 0,2">
          <text:p/>
        </draw:polygon>
        <draw:polygon draw:style-name="gr156" draw:text-style-name="P156" draw:layer="layout" svg:width="1.03cm" svg:height="0.003cm" svg:x="12.322cm" svg:y="24.419cm" svg:viewBox="0 0 1031 4" draw:points="0,0 1031,0 1031,4 0,4">
          <text:p/>
        </draw:polygon>
        <draw:polygon draw:style-name="gr157" draw:text-style-name="P157" draw:layer="layout" svg:width="1.03cm" svg:height="0.001cm" svg:x="12.322cm" svg:y="24.421cm" svg:viewBox="0 0 1031 2" draw:points="0,0 1031,0 1031,2 0,2">
          <text:p/>
        </draw:polygon>
        <draw:polygon draw:style-name="gr157" draw:text-style-name="P157" draw:layer="layout" svg:width="1.03cm" svg:height="0.003cm" svg:x="12.322cm" svg:y="24.422cm" svg:viewBox="0 0 1031 4" draw:points="0,0 1031,0 1031,4 0,4">
          <text:p/>
        </draw:polygon>
        <draw:polygon draw:style-name="gr158" draw:text-style-name="P158" draw:layer="layout" svg:width="1.03cm" svg:height="0.001cm" svg:x="12.322cm" svg:y="24.424cm" svg:viewBox="0 0 1031 2" draw:points="0,0 1031,0 1031,2 0,2">
          <text:p/>
        </draw:polygon>
        <draw:polygon draw:style-name="gr159" draw:text-style-name="P159" draw:layer="layout" svg:width="1.03cm" svg:height="0.003cm" svg:x="12.322cm" svg:y="24.425cm" svg:viewBox="0 0 1031 4" draw:points="0,0 1031,0 1031,4 0,4">
          <text:p/>
        </draw:polygon>
        <draw:polygon draw:style-name="gr159" draw:text-style-name="P159" draw:layer="layout" svg:width="1.03cm" svg:height="0.001cm" svg:x="12.322cm" svg:y="24.427cm" svg:viewBox="0 0 1031 2" draw:points="0,0 1031,0 1031,2 0,2">
          <text:p/>
        </draw:polygon>
        <draw:polygon draw:style-name="gr160" draw:text-style-name="P160" draw:layer="layout" svg:width="1.03cm" svg:height="0.003cm" svg:x="12.322cm" svg:y="24.428cm" svg:viewBox="0 0 1031 4" draw:points="0,0 1031,0 1031,4 0,4">
          <text:p/>
        </draw:polygon>
        <draw:polygon draw:style-name="gr160" draw:text-style-name="P160" draw:layer="layout" svg:width="1.03cm" svg:height="0.001cm" svg:x="12.322cm" svg:y="24.43cm" svg:viewBox="0 0 1031 2" draw:points="0,0 1031,0 1031,2 0,2">
          <text:p/>
        </draw:polygon>
        <draw:polygon draw:style-name="gr161" draw:text-style-name="P161" draw:layer="layout" svg:width="1.03cm" svg:height="0.003cm" svg:x="12.322cm" svg:y="24.431cm" svg:viewBox="0 0 1031 4" draw:points="0,0 1031,0 1031,4 0,4">
          <text:p/>
        </draw:polygon>
        <draw:polygon draw:style-name="gr162" draw:text-style-name="P162" draw:layer="layout" svg:width="1.03cm" svg:height="0.003cm" svg:x="12.322cm" svg:y="24.433cm" svg:viewBox="0 0 1031 4" draw:points="0,0 1031,0 1031,4 0,4">
          <text:p/>
        </draw:polygon>
        <draw:polygon draw:style-name="gr162" draw:text-style-name="P162" draw:layer="layout" svg:width="1.029cm" svg:height="0cm" svg:x="12.322cm" svg:y="24.435cm" svg:viewBox="0 0 1030 0" draw:points="0,0 1030,0">
          <text:p/>
        </draw:polygon>
        <draw:polygon draw:style-name="gr163" draw:text-style-name="P163" draw:layer="layout" svg:width="1.029cm" svg:height="0cm" svg:x="12.322cm" svg:y="24.435cm" svg:viewBox="0 0 1030 1" draw:points="0,0 1030,0 1030,1 0,1">
          <text:p/>
        </draw:polygon>
        <draw:polygon draw:style-name="gr164" draw:text-style-name="P164" draw:layer="layout" svg:width="1.029cm" svg:height="0cm" svg:x="12.322cm" svg:y="24.436cm" svg:viewBox="0 0 1030 1" draw:points="0,0 1030,0 1030,1 0,1">
          <text:p/>
        </draw:polygon>
        <draw:polygon draw:style-name="gr164" draw:text-style-name="P164" draw:layer="layout" svg:width="1.029cm" svg:height="0cm" svg:x="12.322cm" svg:y="24.437cm" svg:viewBox="0 0 1030 1" draw:points="0,0 1030,0 1030,1 0,1">
          <text:p/>
        </draw:polygon>
        <draw:polygon draw:style-name="gr165" draw:text-style-name="P165" draw:layer="layout" svg:width="1.029cm" svg:height="0cm" svg:x="12.322cm" svg:y="24.438cm" svg:viewBox="0 0 1030 0" draw:points="0,0 1030,0">
          <text:p/>
        </draw:polygon>
        <draw:polygon draw:style-name="gr165" draw:text-style-name="P165" draw:layer="layout" svg:width="1.029cm" svg:height="0cm" svg:x="12.322cm" svg:y="24.438cm" svg:viewBox="0 0 1030 1" draw:points="0,0 1030,0 1030,1 0,1">
          <text:p/>
        </draw:polygon>
        <draw:polygon draw:style-name="gr166" draw:text-style-name="P166" draw:layer="layout" svg:width="1.029cm" svg:height="0cm" svg:x="12.322cm" svg:y="24.439cm" svg:viewBox="0 0 1030 1" draw:points="0,0 1030,0 1030,1 0,1">
          <text:p/>
        </draw:polygon>
        <draw:polygon draw:style-name="gr166" draw:text-style-name="P166" draw:layer="layout" svg:width="1.029cm" svg:height="0cm" svg:x="12.322cm" svg:y="24.44cm" svg:viewBox="0 0 1030 1" draw:points="0,0 1030,0 1030,1 0,1">
          <text:p/>
        </draw:polygon>
        <draw:polygon draw:style-name="gr167" draw:text-style-name="P167" draw:layer="layout" svg:width="1.029cm" svg:height="0cm" svg:x="12.322cm" svg:y="24.441cm" svg:viewBox="0 0 1030 1" draw:points="0,0 1030,0 1030,1 0,1">
          <text:p/>
        </draw:polygon>
        <draw:polygon draw:style-name="gr168" draw:text-style-name="P168" draw:layer="layout" svg:width="1.029cm" svg:height="0cm" svg:x="12.322cm" svg:y="24.442cm" svg:viewBox="0 0 1030 0" draw:points="0,0 1030,0">
          <text:p/>
        </draw:polygon>
        <draw:polygon draw:style-name="gr168" draw:text-style-name="P168" draw:layer="layout" svg:width="1.029cm" svg:height="0cm" svg:x="12.322cm" svg:y="24.442cm" svg:viewBox="0 0 1030 1" draw:points="0,0 1030,0 1030,1 0,1">
          <text:p/>
        </draw:polygon>
        <draw:polygon draw:style-name="gr169" draw:text-style-name="P169" draw:layer="layout" svg:width="1.029cm" svg:height="0cm" svg:x="12.322cm" svg:y="24.443cm" svg:viewBox="0 0 1030 1" draw:points="0,0 1030,0 1030,1 0,1">
          <text:p/>
        </draw:polygon>
        <draw:polygon draw:style-name="gr169" draw:text-style-name="P169" draw:layer="layout" svg:width="1.029cm" svg:height="0cm" svg:x="12.322cm" svg:y="24.444cm" svg:viewBox="0 0 1030 1" draw:points="0,0 1030,0 1030,1 0,1">
          <text:p/>
        </draw:polygon>
        <draw:polygon draw:style-name="gr170" draw:text-style-name="P170" draw:layer="layout" svg:width="1.029cm" svg:height="0cm" svg:x="12.322cm" svg:y="24.445cm" svg:viewBox="0 0 1030 0" draw:points="0,0 1030,0">
          <text:p/>
        </draw:polygon>
        <draw:polygon draw:style-name="gr171" draw:text-style-name="P171" draw:layer="layout" svg:width="1.029cm" svg:height="0cm" svg:x="12.322cm" svg:y="24.445cm" svg:viewBox="0 0 1030 1" draw:points="0,0 1030,0 1030,1 0,1">
          <text:p/>
        </draw:polygon>
        <draw:polygon draw:style-name="gr171" draw:text-style-name="P171" draw:layer="layout" svg:width="1.029cm" svg:height="0cm" svg:x="12.322cm" svg:y="24.446cm" svg:viewBox="0 0 1030 1" draw:points="0,0 1030,0 1030,1 0,1">
          <text:p/>
        </draw:polygon>
        <draw:polygon draw:style-name="gr172" draw:text-style-name="P172" draw:layer="layout" svg:width="1.029cm" svg:height="0cm" svg:x="12.322cm" svg:y="24.447cm" svg:viewBox="0 0 1030 1" draw:points="0,0 1030,0 1030,1 0,1">
          <text:p/>
        </draw:polygon>
        <draw:polygon draw:style-name="gr172" draw:text-style-name="P172" draw:layer="layout" svg:width="1.029cm" svg:height="0cm" svg:x="12.322cm" svg:y="24.448cm" svg:viewBox="0 0 1030 1" draw:points="0,0 1030,0 1030,1 0,1">
          <text:p/>
        </draw:polygon>
        <draw:polygon draw:style-name="gr173" draw:text-style-name="P173" draw:layer="layout" svg:width="1.029cm" svg:height="0cm" svg:x="12.322cm" svg:y="24.449cm" svg:viewBox="0 0 1030 0" draw:points="0,0 1030,0">
          <text:p/>
        </draw:polygon>
        <draw:polygon draw:style-name="gr174" draw:text-style-name="P174" draw:layer="layout" svg:width="1.029cm" svg:height="0cm" svg:x="12.322cm" svg:y="24.449cm" svg:viewBox="0 0 1030 1" draw:points="0,0 1030,0 1030,1 0,1">
          <text:p/>
        </draw:polygon>
        <draw:polygon draw:style-name="gr174" draw:text-style-name="P174" draw:layer="layout" svg:width="1.029cm" svg:height="0cm" svg:x="12.322cm" svg:y="24.45cm" svg:viewBox="0 0 1030 1" draw:points="0,0 1030,0 1030,1 0,1">
          <text:p/>
        </draw:polygon>
        <draw:polygon draw:style-name="gr175" draw:text-style-name="P175" draw:layer="layout" svg:width="1.029cm" svg:height="0cm" svg:x="12.322cm" svg:y="24.451cm" svg:viewBox="0 0 1030 1" draw:points="0,0 1030,0 1030,1 0,1">
          <text:p/>
        </draw:polygon>
        <draw:polygon draw:style-name="gr175" draw:text-style-name="P175" draw:layer="layout" svg:width="1.029cm" svg:height="0cm" svg:x="12.322cm" svg:y="24.452cm" svg:viewBox="0 0 1030 0" draw:points="0,0 1030,0">
          <text:p/>
        </draw:polygon>
        <draw:polygon draw:style-name="gr176" draw:text-style-name="P176" draw:layer="layout" svg:width="1.029cm" svg:height="0cm" svg:x="12.322cm" svg:y="24.452cm" svg:viewBox="0 0 1030 1" draw:points="0,0 1030,0 1030,1 0,1">
          <text:p/>
        </draw:polygon>
        <draw:polygon draw:style-name="gr177" draw:text-style-name="P177" draw:layer="layout" svg:width="1.029cm" svg:height="0cm" svg:x="12.322cm" svg:y="24.453cm" svg:viewBox="0 0 1030 1" draw:points="0,0 1030,0 1030,1 0,1">
          <text:p/>
        </draw:polygon>
        <draw:polygon draw:style-name="gr177" draw:text-style-name="P177" draw:layer="layout" svg:width="1.029cm" svg:height="0cm" svg:x="12.322cm" svg:y="24.454cm" svg:viewBox="0 0 1030 1" draw:points="0,0 1030,0 1030,1 0,1">
          <text:p/>
        </draw:polygon>
        <draw:polygon draw:style-name="gr178" draw:text-style-name="P178" draw:layer="layout" svg:width="1.029cm" svg:height="0cm" svg:x="12.322cm" svg:y="24.455cm" svg:viewBox="0 0 1030 0" draw:points="0,0 1030,0">
          <text:p/>
        </draw:polygon>
        <draw:polygon draw:style-name="gr178" draw:text-style-name="P178" draw:layer="layout" svg:width="1.029cm" svg:height="0cm" svg:x="12.322cm" svg:y="24.455cm" svg:viewBox="0 0 1030 1" draw:points="0,0 1030,0 1030,1 0,1">
          <text:p/>
        </draw:polygon>
        <draw:polygon draw:style-name="gr179" draw:text-style-name="P179" draw:layer="layout" svg:width="1.029cm" svg:height="0cm" svg:x="12.322cm" svg:y="24.456cm" svg:viewBox="0 0 1030 1" draw:points="0,0 1030,0 1030,1 0,1">
          <text:p/>
        </draw:polygon>
        <draw:polygon draw:style-name="gr180" draw:text-style-name="P180" draw:layer="layout" svg:width="1.029cm" svg:height="0cm" svg:x="12.322cm" svg:y="24.457cm" svg:viewBox="0 0 1030 1" draw:points="0,0 1030,0 1030,1 0,1">
          <text:p/>
        </draw:polygon>
        <draw:polygon draw:style-name="gr180" draw:text-style-name="P180" draw:layer="layout" svg:width="1.029cm" svg:height="0cm" svg:x="12.322cm" svg:y="24.458cm" svg:viewBox="0 0 1030 1" draw:points="0,0 1030,0 1030,1 0,1">
          <text:p/>
        </draw:polygon>
        <draw:polygon draw:style-name="gr181" draw:text-style-name="P181" draw:layer="layout" svg:width="1.029cm" svg:height="0cm" svg:x="12.322cm" svg:y="24.459cm" svg:viewBox="0 0 1030 0" draw:points="0,0 1030,0">
          <text:p/>
        </draw:polygon>
        <draw:polygon draw:style-name="gr152" draw:text-style-name="P152" draw:layer="layout" svg:width="1.03cm" svg:height="0.006cm" svg:x="16.937cm" svg:y="24.28cm" svg:viewBox="0 0 1031 7" draw:points="0,0 1031,0 1031,7 0,7">
          <text:p/>
        </draw:polygon>
        <draw:polygon draw:style-name="gr153" draw:text-style-name="P153" draw:layer="layout" svg:width="1.03cm" svg:height="0.005cm" svg:x="16.937cm" svg:y="24.286cm" svg:viewBox="0 0 1031 6" draw:points="0,0 1031,0 1031,6 0,6">
          <text:p/>
        </draw:polygon>
        <draw:polygon draw:style-name="gr154" draw:text-style-name="P154" draw:layer="layout" svg:width="1.03cm" svg:height="0.006cm" svg:x="16.937cm" svg:y="24.291cm" svg:viewBox="0 0 1031 7" draw:points="0,0 1031,0 1031,7 0,7">
          <text:p/>
        </draw:polygon>
        <draw:polygon draw:style-name="gr154" draw:text-style-name="P154" draw:layer="layout" svg:width="1.03cm" svg:height="0.005cm" svg:x="16.937cm" svg:y="24.297cm" svg:viewBox="0 0 1031 6" draw:points="0,0 1031,0 1031,6 0,6">
          <text:p/>
        </draw:polygon>
        <draw:polygon draw:style-name="gr155" draw:text-style-name="P155" draw:layer="layout" svg:width="1.03cm" svg:height="0.007cm" svg:x="16.937cm" svg:y="24.302cm" svg:viewBox="0 0 1031 8" draw:points="0,0 1031,0 1031,8 0,8">
          <text:p/>
        </draw:polygon>
        <draw:polygon draw:style-name="gr155" draw:text-style-name="P155" draw:layer="layout" svg:width="1.03cm" svg:height="0.006cm" svg:x="16.937cm" svg:y="24.308cm" svg:viewBox="0 0 1031 7" draw:points="0,0 1031,0 1031,7 0,7">
          <text:p/>
        </draw:polygon>
        <draw:polygon draw:style-name="gr156" draw:text-style-name="P156" draw:layer="layout" svg:width="1.03cm" svg:height="0.005cm" svg:x="16.937cm" svg:y="24.314cm" svg:viewBox="0 0 1031 6" draw:points="0,0 1031,0 1031,6 0,6">
          <text:p/>
        </draw:polygon>
        <draw:polygon draw:style-name="gr157" draw:text-style-name="P157" draw:layer="layout" svg:width="1.03cm" svg:height="0.006cm" svg:x="16.937cm" svg:y="24.319cm" svg:viewBox="0 0 1031 7" draw:points="0,0 1031,0 1031,7 0,7">
          <text:p/>
        </draw:polygon>
        <draw:polygon draw:style-name="gr157" draw:text-style-name="P157" draw:layer="layout" svg:width="1.03cm" svg:height="0.005cm" svg:x="16.937cm" svg:y="24.325cm" svg:viewBox="0 0 1031 6" draw:points="0,0 1031,0 1031,6 0,6">
          <text:p/>
        </draw:polygon>
        <draw:polygon draw:style-name="gr158" draw:text-style-name="P158" draw:layer="layout" svg:width="1.03cm" svg:height="0.006cm" svg:x="16.937cm" svg:y="24.33cm" svg:viewBox="0 0 1031 7" draw:points="0,0 1031,0 1031,7 0,7">
          <text:p/>
        </draw:polygon>
        <draw:polygon draw:style-name="gr159" draw:text-style-name="P159" draw:layer="layout" svg:width="1.03cm" svg:height="0.006cm" svg:x="16.937cm" svg:y="24.336cm" svg:viewBox="0 0 1031 7" draw:points="0,0 1031,0 1031,7 0,7">
          <text:p/>
        </draw:polygon>
        <draw:polygon draw:style-name="gr159" draw:text-style-name="P159" draw:layer="layout" svg:width="1.03cm" svg:height="0.005cm" svg:x="16.937cm" svg:y="24.342cm" svg:viewBox="0 0 1031 6" draw:points="0,0 1031,0 1031,6 0,6">
          <text:p/>
        </draw:polygon>
        <draw:polygon draw:style-name="gr160" draw:text-style-name="P160" draw:layer="layout" svg:width="1.03cm" svg:height="0.007cm" svg:x="16.937cm" svg:y="24.347cm" svg:viewBox="0 0 1031 8" draw:points="0,0 1031,0 1031,8 0,8">
          <text:p/>
        </draw:polygon>
        <draw:polygon draw:style-name="gr160" draw:text-style-name="P160" draw:layer="layout" svg:width="1.03cm" svg:height="0.005cm" svg:x="16.937cm" svg:y="24.353cm" svg:viewBox="0 0 1031 6" draw:points="0,0 1031,0 1031,6 0,6">
          <text:p/>
        </draw:polygon>
        <draw:polygon draw:style-name="gr161" draw:text-style-name="P161" draw:layer="layout" svg:width="1.03cm" svg:height="0.006cm" svg:x="16.937cm" svg:y="24.358cm" svg:viewBox="0 0 1031 7" draw:points="0,0 1031,0 1031,7 0,7">
          <text:p/>
        </draw:polygon>
        <draw:polygon draw:style-name="gr162" draw:text-style-name="P162" draw:layer="layout" svg:width="1.03cm" svg:height="0.006cm" svg:x="16.937cm" svg:y="24.364cm" svg:viewBox="0 0 1031 7" draw:points="0,0 1031,0 1031,7 0,7">
          <text:p/>
        </draw:polygon>
        <draw:polygon draw:style-name="gr162" draw:text-style-name="P162" draw:layer="layout" svg:width="1.03cm" svg:height="0.002cm" svg:x="16.937cm" svg:y="24.37cm" svg:viewBox="0 0 1031 3" draw:points="0,0 1031,0 1031,3 0,3">
          <text:p/>
        </draw:polygon>
        <draw:polygon draw:style-name="gr163" draw:text-style-name="P163" draw:layer="layout" svg:width="1.03cm" svg:height="0.004cm" svg:x="16.937cm" svg:y="24.372cm" svg:viewBox="0 0 1031 5" draw:points="0,0 1031,0 1031,5 0,5">
          <text:p/>
        </draw:polygon>
        <draw:polygon draw:style-name="gr163" draw:text-style-name="P163" draw:layer="layout" svg:width="1.03cm" svg:height="0.003cm" svg:x="16.937cm" svg:y="24.375cm" svg:viewBox="0 0 1031 4" draw:points="0,0 1031,0 1031,4 0,4">
          <text:p/>
        </draw:polygon>
        <draw:polygon draw:style-name="gr164" draw:text-style-name="P164" draw:layer="layout" svg:width="1.03cm" svg:height="0.004cm" svg:x="16.937cm" svg:y="24.378cm" svg:viewBox="0 0 1031 5" draw:points="0,0 1031,0 1031,5 0,5">
          <text:p/>
        </draw:polygon>
        <draw:polygon draw:style-name="gr165" draw:text-style-name="P165" draw:layer="layout" svg:width="1.03cm" svg:height="0.003cm" svg:x="16.937cm" svg:y="24.381cm" svg:viewBox="0 0 1031 4" draw:points="0,0 1031,0 1031,4 0,4">
          <text:p/>
        </draw:polygon>
        <draw:polygon draw:style-name="gr165" draw:text-style-name="P165" draw:layer="layout" svg:width="1.03cm" svg:height="0.002cm" svg:x="16.937cm" svg:y="24.384cm" svg:viewBox="0 0 1031 3" draw:points="0,0 1031,0 1031,3 0,3">
          <text:p/>
        </draw:polygon>
        <draw:polygon draw:style-name="gr166" draw:text-style-name="P166" draw:layer="layout" svg:width="1.03cm" svg:height="0.004cm" svg:x="16.937cm" svg:y="24.386cm" svg:viewBox="0 0 1031 5" draw:points="0,0 1031,0 1031,5 0,5">
          <text:p/>
        </draw:polygon>
        <draw:polygon draw:style-name="gr166" draw:text-style-name="P166" draw:layer="layout" svg:width="1.03cm" svg:height="0.003cm" svg:x="16.937cm" svg:y="24.389cm" svg:viewBox="0 0 1031 4" draw:points="0,0 1031,0 1031,4 0,4">
          <text:p/>
        </draw:polygon>
        <draw:polygon draw:style-name="gr167" draw:text-style-name="P167" draw:layer="layout" svg:width="1.03cm" svg:height="0.004cm" svg:x="16.937cm" svg:y="24.392cm" svg:viewBox="0 0 1031 5" draw:points="0,0 1031,0 1031,5 0,5">
          <text:p/>
        </draw:polygon>
        <draw:polygon draw:style-name="gr168" draw:text-style-name="P168" draw:layer="layout" svg:width="1.03cm" svg:height="0.003cm" svg:x="16.937cm" svg:y="24.395cm" svg:viewBox="0 0 1031 4" draw:points="0,0 1031,0 1031,4 0,4">
          <text:p/>
        </draw:polygon>
        <draw:polygon draw:style-name="gr168" draw:text-style-name="P168" draw:layer="layout" svg:width="1.03cm" svg:height="0.002cm" svg:x="16.937cm" svg:y="24.398cm" svg:viewBox="0 0 1031 3" draw:points="0,0 1031,0 1031,3 0,3">
          <text:p/>
        </draw:polygon>
        <draw:polygon draw:style-name="gr169" draw:text-style-name="P169" draw:layer="layout" svg:width="1.03cm" svg:height="0.004cm" svg:x="16.937cm" svg:y="24.4cm" svg:viewBox="0 0 1031 5" draw:points="0,0 1031,0 1031,5 0,5">
          <text:p/>
        </draw:polygon>
        <draw:polygon draw:style-name="gr169" draw:text-style-name="P169" draw:layer="layout" svg:width="1.03cm" svg:height="0.003cm" svg:x="16.937cm" svg:y="24.403cm" svg:viewBox="0 0 1031 4" draw:points="0,0 1031,0 1031,4 0,4">
          <text:p/>
        </draw:polygon>
        <draw:polygon draw:style-name="gr170" draw:text-style-name="P170" draw:layer="layout" svg:width="1.03cm" svg:height="0.004cm" svg:x="16.937cm" svg:y="24.406cm" svg:viewBox="0 0 1031 5" draw:points="0,0 1031,0 1031,5 0,5">
          <text:p/>
        </draw:polygon>
        <draw:polygon draw:style-name="gr171" draw:text-style-name="P171" draw:layer="layout" svg:width="1.03cm" svg:height="0.003cm" svg:x="16.937cm" svg:y="24.409cm" svg:viewBox="0 0 1031 4" draw:points="0,0 1031,0 1031,4 0,4">
          <text:p/>
        </draw:polygon>
        <draw:polygon draw:style-name="gr171" draw:text-style-name="P171" draw:layer="layout" svg:width="1.03cm" svg:height="0.004cm" svg:x="16.937cm" svg:y="24.412cm" svg:viewBox="0 0 1031 5" draw:points="0,0 1031,0 1031,5 0,5">
          <text:p/>
        </draw:polygon>
        <draw:polygon draw:style-name="gr172" draw:text-style-name="P172" draw:layer="layout" svg:width="1.03cm" svg:height="0.002cm" svg:x="16.937cm" svg:y="24.415cm" svg:viewBox="0 0 1031 3" draw:points="0,0 1031,0 1031,3 0,3">
          <text:p/>
        </draw:polygon>
        <draw:polygon draw:style-name="gr172" draw:text-style-name="P172" draw:layer="layout" svg:width="1.03cm" svg:height="0.003cm" svg:x="16.937cm" svg:y="24.417cm" svg:viewBox="0 0 1031 4" draw:points="0,0 1031,0 1031,4 0,4">
          <text:p/>
        </draw:polygon>
        <draw:polygon draw:style-name="gr173" draw:text-style-name="P173" draw:layer="layout" svg:width="1.03cm" svg:height="0.004cm" svg:x="16.937cm" svg:y="24.42cm" svg:viewBox="0 0 1031 5" draw:points="0,0 1031,0 1031,5 0,5">
          <text:p/>
        </draw:polygon>
        <draw:polygon draw:style-name="gr174" draw:text-style-name="P174" draw:layer="layout" svg:width="1.03cm" svg:height="0.003cm" svg:x="16.937cm" svg:y="24.423cm" svg:viewBox="0 0 1031 4" draw:points="0,0 1031,0 1031,4 0,4">
          <text:p/>
        </draw:polygon>
        <draw:polygon draw:style-name="gr174" draw:text-style-name="P174" draw:layer="layout" svg:width="1.03cm" svg:height="0.004cm" svg:x="16.937cm" svg:y="24.426cm" svg:viewBox="0 0 1031 5" draw:points="0,0 1031,0 1031,5 0,5">
          <text:p/>
        </draw:polygon>
        <draw:polygon draw:style-name="gr175" draw:text-style-name="P175" draw:layer="layout" svg:width="1.03cm" svg:height="0.002cm" svg:x="16.937cm" svg:y="24.429cm" svg:viewBox="0 0 1031 3" draw:points="0,0 1031,0 1031,3 0,3">
          <text:p/>
        </draw:polygon>
        <draw:polygon draw:style-name="gr175" draw:text-style-name="P175" draw:layer="layout" svg:width="1.03cm" svg:height="0.003cm" svg:x="16.937cm" svg:y="24.431cm" svg:viewBox="0 0 1031 4" draw:points="0,0 1031,0 1031,4 0,4">
          <text:p/>
        </draw:polygon>
        <draw:polygon draw:style-name="gr176" draw:text-style-name="P176" draw:layer="layout" svg:width="1.03cm" svg:height="0.004cm" svg:x="16.937cm" svg:y="24.434cm" svg:viewBox="0 0 1031 5" draw:points="0,0 1031,0 1031,5 0,5">
          <text:p/>
        </draw:polygon>
        <draw:polygon draw:style-name="gr177" draw:text-style-name="P177" draw:layer="layout" svg:width="1.03cm" svg:height="0.003cm" svg:x="16.937cm" svg:y="24.437cm" svg:viewBox="0 0 1031 4" draw:points="0,0 1031,0 1031,4 0,4">
          <text:p/>
        </draw:polygon>
        <draw:polygon draw:style-name="gr177" draw:text-style-name="P177" draw:layer="layout" svg:width="1.03cm" svg:height="0.004cm" svg:x="16.937cm" svg:y="24.44cm" svg:viewBox="0 0 1031 5" draw:points="0,0 1031,0 1031,5 0,5">
          <text:p/>
        </draw:polygon>
        <draw:polygon draw:style-name="gr178" draw:text-style-name="P178" draw:layer="layout" svg:width="1.03cm" svg:height="0.002cm" svg:x="16.937cm" svg:y="24.443cm" svg:viewBox="0 0 1031 3" draw:points="0,0 1031,0 1031,3 0,3">
          <text:p/>
        </draw:polygon>
        <draw:polygon draw:style-name="gr178" draw:text-style-name="P178" draw:layer="layout" svg:width="1.03cm" svg:height="0.003cm" svg:x="16.937cm" svg:y="24.445cm" svg:viewBox="0 0 1031 4" draw:points="0,0 1031,0 1031,4 0,4">
          <text:p/>
        </draw:polygon>
        <draw:polygon draw:style-name="gr179" draw:text-style-name="P179" draw:layer="layout" svg:width="1.03cm" svg:height="0.004cm" svg:x="16.937cm" svg:y="24.448cm" svg:viewBox="0 0 1031 5" draw:points="0,0 1031,0 1031,5 0,5">
          <text:p/>
        </draw:polygon>
        <draw:polygon draw:style-name="gr180" draw:text-style-name="P180" draw:layer="layout" svg:width="1.03cm" svg:height="0.003cm" svg:x="16.937cm" svg:y="24.451cm" svg:viewBox="0 0 1031 4" draw:points="0,0 1031,0 1031,4 0,4">
          <text:p/>
        </draw:polygon>
        <draw:polygon draw:style-name="gr180" draw:text-style-name="P180" draw:layer="layout" svg:width="1.03cm" svg:height="0.004cm" svg:x="16.937cm" svg:y="24.454cm" svg:viewBox="0 0 1031 5" draw:points="0,0 1031,0 1031,5 0,5">
          <text:p/>
        </draw:polygon>
        <draw:polygon draw:style-name="gr181" draw:text-style-name="P181" draw:layer="layout" svg:width="1.03cm" svg:height="0.002cm" svg:x="16.937cm" svg:y="24.457cm" svg:viewBox="0 0 1031 3" draw:points="0,0 1031,0 1031,3 0,3">
          <text:p/>
        </draw:polygon>
        <draw:line draw:style-name="gr182" draw:text-style-name="P5" draw:layer="layout" svg:x1="4.637cm" svg:y1="24.459cm" svg:x2="18.483cm" svg:y2="24.459cm">
          <text:p/>
        </draw:line>
        <draw:frame draw:style-name="gr1" draw:text-style-name="P2" draw:layer="layout" svg:width="0.558cm" svg:height="0.624cm" svg:x="11.246cm" svg:y="26.451cm">
          <draw:text-box>
            <text:p text:style-name="P1"><text:span text:style-name="T2"><text:s/></text:span></text:p>
          </draw:text-box>
        </draw:frame>
        <draw:frame draw:style-name="gr183" draw:text-style-name="P182" draw:layer="layout" svg:width="0.317cm" svg:height="0.433cm" svg:x="4.184cm" svg:y="24.225cm">
          <draw:text-box>
            <text:p text:style-name="P1"><text:span text:style-name="T4">0</text:span></text:p>
          </draw:text-box>
        </draw:frame>
        <draw:frame draw:style-name="gr183" draw:text-style-name="P182" draw:layer="layout" svg:width="0.365cm" svg:height="0.433cm" svg:x="4.023cm" svg:y="23.491cm">
          <draw:text-box>
            <text:p text:style-name="P1"><text:span text:style-name="T4">20</text:span></text:p>
          </draw:text-box>
        </draw:frame>
        <draw:frame draw:style-name="gr183" draw:text-style-name="P182" draw:layer="layout" svg:width="0.365cm" svg:height="0.433cm" svg:x="4.023cm" svg:y="22.757cm">
          <draw:text-box>
            <text:p text:style-name="P1"><text:span text:style-name="T4">40</text:span></text:p>
          </draw:text-box>
        </draw:frame>
        <draw:frame draw:style-name="gr183" draw:text-style-name="P182" draw:layer="layout" svg:width="0.365cm" svg:height="0.433cm" svg:x="4.023cm" svg:y="22.023cm">
          <draw:text-box>
            <text:p text:style-name="P1"><text:span text:style-name="T4">60</text:span></text:p>
          </draw:text-box>
        </draw:frame>
        <draw:frame draw:style-name="gr183" draw:text-style-name="P182" draw:layer="layout" svg:width="0.365cm" svg:height="0.433cm" svg:x="4.023cm" svg:y="21.289cm">
          <draw:text-box>
            <text:p text:style-name="P1"><text:span text:style-name="T4">80</text:span></text:p>
          </draw:text-box>
        </draw:frame>
        <draw:frame draw:style-name="gr183" draw:text-style-name="P182" draw:layer="layout" svg:width="0.547cm" svg:height="0.433cm" svg:x="3.863cm" svg:y="20.555cm">
          <draw:text-box>
            <text:p text:style-name="P1"><text:span text:style-name="T4">100</text:span></text:p>
          </draw:text-box>
        </draw:frame>
        <draw:frame draw:style-name="gr183" draw:text-style-name="P182" draw:layer="layout" svg:width="0.547cm" svg:height="0.433cm" svg:x="3.863cm" svg:y="19.82cm">
          <draw:text-box>
            <text:p text:style-name="P1"><text:span text:style-name="T4">120</text:span></text:p>
          </draw:text-box>
        </draw:frame>
        <draw:frame draw:style-name="gr183" draw:text-style-name="P182" draw:layer="layout" svg:width="0.547cm" svg:height="0.433cm" svg:x="3.863cm" svg:y="19.087cm">
          <draw:text-box>
            <text:p text:style-name="P1"><text:span text:style-name="T4">140</text:span></text:p>
          </draw:text-box>
        </draw:frame>
        <draw:frame draw:style-name="gr183" draw:text-style-name="P182" draw:layer="layout" svg:width="0.547cm" svg:height="0.433cm" svg:x="3.863cm" svg:y="18.353cm">
          <draw:text-box>
            <text:p text:style-name="P1"><text:span text:style-name="T4">160</text:span></text:p>
          </draw:text-box>
        </draw:frame>
        <draw:frame draw:style-name="gr183" draw:text-style-name="P182" draw:layer="layout" svg:width="1.26cm" svg:height="0.433cm" svg:x="6.397cm" svg:y="24.638cm">
          <draw:text-box>
            <text:p text:style-name="P1"><text:span text:style-name="T4">128x128</text:span></text:p>
          </draw:text-box>
        </draw:frame>
        <draw:frame draw:style-name="gr183" draw:text-style-name="P182" draw:layer="layout" svg:width="1.26cm" svg:height="0.433cm" svg:x="11.015cm" svg:y="24.638cm">
          <draw:text-box>
            <text:p text:style-name="P1"><text:span text:style-name="T4">256x256</text:span></text:p>
          </draw:text-box>
        </draw:frame>
        <draw:frame draw:style-name="gr183" draw:text-style-name="P182" draw:layer="layout" svg:width="1.26cm" svg:height="0.433cm" svg:x="15.634cm" svg:y="24.638cm">
          <draw:text-box>
            <text:p text:style-name="P1"><text:span text:style-name="T4">512x512</text:span></text:p>
          </draw:text-box>
        </draw:frame>
        <draw:polygon draw:style-name="gr6" draw:text-style-name="P6" draw:layer="layout" svg:width="0.174cm" svg:height="0.003cm" svg:x="8.824cm" svg:y="25.488cm" svg:viewBox="0 0 175 4" draw:points="0,0 175,0 175,4 0,4">
          <text:p/>
        </draw:polygon>
        <draw:polygon draw:style-name="gr7" draw:text-style-name="P7" draw:layer="layout" svg:width="0.174cm" svg:height="0.001cm" svg:x="8.824cm" svg:y="25.49cm" svg:viewBox="0 0 175 2" draw:points="0,0 175,0 175,2 0,2">
          <text:p/>
        </draw:polygon>
        <draw:polygon draw:style-name="gr8" draw:text-style-name="P8" draw:layer="layout" svg:width="0.174cm" svg:height="0.001cm" svg:x="8.824cm" svg:y="25.491cm" svg:viewBox="0 0 175 2" draw:points="0,0 175,0 175,2 0,2">
          <text:p/>
        </draw:polygon>
        <draw:polygon draw:style-name="gr9" draw:text-style-name="P9" draw:layer="layout" svg:width="0.174cm" svg:height="0.003cm" svg:x="8.824cm" svg:y="25.492cm" svg:viewBox="0 0 175 4" draw:points="0,0 175,0 175,4 0,4">
          <text:p/>
        </draw:polygon>
        <draw:polygon draw:style-name="gr9" draw:text-style-name="P9" draw:layer="layout" svg:width="0.174cm" svg:height="0.001cm" svg:x="8.824cm" svg:y="25.494cm" svg:viewBox="0 0 175 2" draw:points="0,0 175,0 175,2 0,2">
          <text:p/>
        </draw:polygon>
        <draw:polygon draw:style-name="gr10" draw:text-style-name="P10" draw:layer="layout" svg:width="0.174cm" svg:height="0.001cm" svg:x="8.824cm" svg:y="25.495cm" svg:viewBox="0 0 175 2" draw:points="0,0 175,0 175,2 0,2">
          <text:p/>
        </draw:polygon>
        <draw:polygon draw:style-name="gr10" draw:text-style-name="P10" draw:layer="layout" svg:width="0.174cm" svg:height="0.003cm" svg:x="8.824cm" svg:y="25.496cm" svg:viewBox="0 0 175 4" draw:points="0,0 175,0 175,4 0,4">
          <text:p/>
        </draw:polygon>
        <draw:polygon draw:style-name="gr11" draw:text-style-name="P11" draw:layer="layout" svg:width="0.174cm" svg:height="0.001cm" svg:x="8.824cm" svg:y="25.498cm" svg:viewBox="0 0 175 2" draw:points="0,0 175,0 175,2 0,2">
          <text:p/>
        </draw:polygon>
        <draw:polygon draw:style-name="gr13" draw:text-style-name="P13" draw:layer="layout" svg:width="0.174cm" svg:height="0.003cm" svg:x="8.824cm" svg:y="25.499cm" svg:viewBox="0 0 175 4" draw:points="0,0 175,0 175,4 0,4">
          <text:p/>
        </draw:polygon>
        <draw:polygon draw:style-name="gr13" draw:text-style-name="P13" draw:layer="layout" svg:width="0.174cm" svg:height="0.001cm" svg:x="8.824cm" svg:y="25.501cm" svg:viewBox="0 0 175 2" draw:points="0,0 175,0 175,2 0,2">
          <text:p/>
        </draw:polygon>
        <draw:polygon draw:style-name="gr14" draw:text-style-name="P14" draw:layer="layout" svg:width="0.174cm" svg:height="0.001cm" svg:x="8.824cm" svg:y="25.502cm" svg:viewBox="0 0 175 2" draw:points="0,0 175,0 175,2 0,2">
          <text:p/>
        </draw:polygon>
        <draw:polygon draw:style-name="gr14" draw:text-style-name="P14" draw:layer="layout" svg:width="0.174cm" svg:height="0.003cm" svg:x="8.824cm" svg:y="25.503cm" svg:viewBox="0 0 175 4" draw:points="0,0 175,0 175,4 0,4">
          <text:p/>
        </draw:polygon>
        <draw:polygon draw:style-name="gr15" draw:text-style-name="P15" draw:layer="layout" svg:width="0.174cm" svg:height="0.001cm" svg:x="8.824cm" svg:y="25.505cm" svg:viewBox="0 0 175 2" draw:points="0,0 175,0 175,2 0,2">
          <text:p/>
        </draw:polygon>
        <draw:polygon draw:style-name="gr15" draw:text-style-name="P15" draw:layer="layout" svg:width="0.174cm" svg:height="0.001cm" svg:x="8.824cm" svg:y="25.506cm" svg:viewBox="0 0 175 2" draw:points="0,0 175,0 175,2 0,2">
          <text:p/>
        </draw:polygon>
        <draw:polygon draw:style-name="gr16" draw:text-style-name="P16" draw:layer="layout" svg:width="0.174cm" svg:height="0.003cm" svg:x="8.824cm" svg:y="25.507cm" svg:viewBox="0 0 175 4" draw:points="0,0 175,0 175,4 0,4">
          <text:p/>
        </draw:polygon>
        <draw:polygon draw:style-name="gr17" draw:text-style-name="P17" draw:layer="layout" svg:width="0.174cm" svg:height="0.001cm" svg:x="8.824cm" svg:y="25.509cm" svg:viewBox="0 0 175 2" draw:points="0,0 175,0 175,2 0,2">
          <text:p/>
        </draw:polygon>
        <draw:polygon draw:style-name="gr18" draw:text-style-name="P18" draw:layer="layout" svg:width="0.174cm" svg:height="0.001cm" svg:x="8.824cm" svg:y="25.51cm" svg:viewBox="0 0 175 2" draw:points="0,0 175,0 175,2 0,2">
          <text:p/>
        </draw:polygon>
        <draw:polygon draw:style-name="gr18" draw:text-style-name="P18" draw:layer="layout" svg:width="0.174cm" svg:height="0.003cm" svg:x="8.824cm" svg:y="25.511cm" svg:viewBox="0 0 175 4" draw:points="0,0 175,0 175,4 0,4">
          <text:p/>
        </draw:polygon>
        <draw:polygon draw:style-name="gr20" draw:text-style-name="P20" draw:layer="layout" svg:width="0.174cm" svg:height="0.001cm" svg:x="8.824cm" svg:y="25.513cm" svg:viewBox="0 0 175 2" draw:points="0,0 175,0 175,2 0,2">
          <text:p/>
        </draw:polygon>
        <draw:polygon draw:style-name="gr20" draw:text-style-name="P20" draw:layer="layout" svg:width="0.174cm" svg:height="0.003cm" svg:x="8.824cm" svg:y="25.514cm" svg:viewBox="0 0 175 4" draw:points="0,0 175,0 175,4 0,4">
          <text:p/>
        </draw:polygon>
        <draw:polygon draw:style-name="gr21" draw:text-style-name="P21" draw:layer="layout" svg:width="0.174cm" svg:height="0.001cm" svg:x="8.824cm" svg:y="25.516cm" svg:viewBox="0 0 175 2" draw:points="0,0 175,0 175,2 0,2">
          <text:p/>
        </draw:polygon>
        <draw:polygon draw:style-name="gr21" draw:text-style-name="P21" draw:layer="layout" svg:width="0.174cm" svg:height="0.001cm" svg:x="8.824cm" svg:y="25.517cm" svg:viewBox="0 0 175 2" draw:points="0,0 175,0 175,2 0,2">
          <text:p/>
        </draw:polygon>
        <draw:polygon draw:style-name="gr22" draw:text-style-name="P22" draw:layer="layout" svg:width="0.174cm" svg:height="0.003cm" svg:x="8.824cm" svg:y="25.518cm" svg:viewBox="0 0 175 4" draw:points="0,0 175,0 175,4 0,4">
          <text:p/>
        </draw:polygon>
        <draw:polygon draw:style-name="gr23" draw:text-style-name="P23" draw:layer="layout" svg:width="0.174cm" svg:height="0.001cm" svg:x="8.824cm" svg:y="25.52cm" svg:viewBox="0 0 175 2" draw:points="0,0 175,0 175,2 0,2">
          <text:p/>
        </draw:polygon>
        <draw:polygon draw:style-name="gr23" draw:text-style-name="P23" draw:layer="layout" svg:width="0.174cm" svg:height="0.001cm" svg:x="8.824cm" svg:y="25.521cm" svg:viewBox="0 0 175 2" draw:points="0,0 175,0 175,2 0,2">
          <text:p/>
        </draw:polygon>
        <draw:polygon draw:style-name="gr24" draw:text-style-name="P24" draw:layer="layout" svg:width="0.174cm" svg:height="0.003cm" svg:x="8.824cm" svg:y="25.522cm" svg:viewBox="0 0 175 4" draw:points="0,0 175,0 175,4 0,4">
          <text:p/>
        </draw:polygon>
        <draw:polygon draw:style-name="gr24" draw:text-style-name="P24" draw:layer="layout" svg:width="0.174cm" svg:height="0.001cm" svg:x="8.824cm" svg:y="25.524cm" svg:viewBox="0 0 175 2" draw:points="0,0 175,0 175,2 0,2">
          <text:p/>
        </draw:polygon>
        <draw:polygon draw:style-name="gr25" draw:text-style-name="P25" draw:layer="layout" svg:width="0.174cm" svg:height="0.001cm" svg:x="8.824cm" svg:y="25.525cm" svg:viewBox="0 0 175 2" draw:points="0,0 175,0 175,2 0,2">
          <text:p/>
        </draw:polygon>
        <draw:polygon draw:style-name="gr25" draw:text-style-name="P25" draw:layer="layout" svg:width="0.174cm" svg:height="0.003cm" svg:x="8.824cm" svg:y="25.526cm" svg:viewBox="0 0 175 4" draw:points="0,0 175,0 175,4 0,4">
          <text:p/>
        </draw:polygon>
        <draw:polygon draw:style-name="gr26" draw:text-style-name="P26" draw:layer="layout" svg:width="0.174cm" svg:height="0.001cm" svg:x="8.824cm" svg:y="25.528cm" svg:viewBox="0 0 175 2" draw:points="0,0 175,0 175,2 0,2">
          <text:p/>
        </draw:polygon>
        <draw:polygon draw:style-name="gr26" draw:text-style-name="P26" draw:layer="layout" svg:width="0.174cm" svg:height="0.003cm" svg:x="8.824cm" svg:y="25.529cm" svg:viewBox="0 0 175 4" draw:points="0,0 175,0 175,4 0,4">
          <text:p/>
        </draw:polygon>
        <draw:polygon draw:style-name="gr27" draw:text-style-name="P27" draw:layer="layout" svg:width="0.174cm" svg:height="0.001cm" svg:x="8.824cm" svg:y="25.531cm" svg:viewBox="0 0 175 2" draw:points="0,0 175,0 175,2 0,2">
          <text:p/>
        </draw:polygon>
        <draw:polygon draw:style-name="gr28" draw:text-style-name="P28" draw:layer="layout" svg:width="0.174cm" svg:height="0.001cm" svg:x="8.824cm" svg:y="25.532cm" svg:viewBox="0 0 175 2" draw:points="0,0 175,0 175,2 0,2">
          <text:p/>
        </draw:polygon>
        <draw:polygon draw:style-name="gr29" draw:text-style-name="P29" draw:layer="layout" svg:width="0.174cm" svg:height="0.003cm" svg:x="8.824cm" svg:y="25.533cm" svg:viewBox="0 0 175 4" draw:points="0,0 175,0 175,4 0,4">
          <text:p/>
        </draw:polygon>
        <draw:polygon draw:style-name="gr29" draw:text-style-name="P29" draw:layer="layout" svg:width="0.174cm" svg:height="0.001cm" svg:x="8.824cm" svg:y="25.535cm" svg:viewBox="0 0 175 2" draw:points="0,0 175,0 175,2 0,2">
          <text:p/>
        </draw:polygon>
        <draw:polygon draw:style-name="gr30" draw:text-style-name="P30" draw:layer="layout" svg:width="0.174cm" svg:height="0.001cm" svg:x="8.824cm" svg:y="25.536cm" svg:viewBox="0 0 175 2" draw:points="0,0 175,0 175,2 0,2">
          <text:p/>
        </draw:polygon>
        <draw:polygon draw:style-name="gr30" draw:text-style-name="P30" draw:layer="layout" svg:width="0.174cm" svg:height="0.003cm" svg:x="8.824cm" svg:y="25.537cm" svg:viewBox="0 0 175 4" draw:points="0,0 175,0 175,4 0,4">
          <text:p/>
        </draw:polygon>
        <draw:polygon draw:style-name="gr31" draw:text-style-name="P31" draw:layer="layout" svg:width="0.174cm" svg:height="0.001cm" svg:x="8.824cm" svg:y="25.539cm" svg:viewBox="0 0 175 2" draw:points="0,0 175,0 175,2 0,2">
          <text:p/>
        </draw:polygon>
        <draw:polygon draw:style-name="gr31" draw:text-style-name="P31" draw:layer="layout" svg:width="0.174cm" svg:height="0.001cm" svg:x="8.824cm" svg:y="25.54cm" svg:viewBox="0 0 175 2" draw:points="0,0 175,0 175,2 0,2">
          <text:p/>
        </draw:polygon>
        <draw:polygon draw:style-name="gr32" draw:text-style-name="P32" draw:layer="layout" svg:width="0.174cm" svg:height="0.003cm" svg:x="8.824cm" svg:y="25.541cm" svg:viewBox="0 0 175 4" draw:points="0,0 175,0 175,4 0,4">
          <text:p/>
        </draw:polygon>
        <draw:polygon draw:style-name="gr33" draw:text-style-name="P33" draw:layer="layout" svg:width="0.174cm" svg:height="0.001cm" svg:x="8.824cm" svg:y="25.543cm" svg:viewBox="0 0 175 2" draw:points="0,0 175,0 175,2 0,2">
          <text:p/>
        </draw:polygon>
        <draw:polygon draw:style-name="gr33" draw:text-style-name="P33" draw:layer="layout" svg:width="0.174cm" svg:height="0.003cm" svg:x="8.824cm" svg:y="25.544cm" svg:viewBox="0 0 175 4" draw:points="0,0 175,0 175,4 0,4">
          <text:p/>
        </draw:polygon>
        <draw:polygon draw:style-name="gr34" draw:text-style-name="P34" draw:layer="layout" svg:width="0.174cm" svg:height="0.001cm" svg:x="8.824cm" svg:y="25.546cm" svg:viewBox="0 0 175 2" draw:points="0,0 175,0 175,2 0,2">
          <text:p/>
        </draw:polygon>
        <draw:polygon draw:style-name="gr34" draw:text-style-name="P34" draw:layer="layout" svg:width="0.174cm" svg:height="0.001cm" svg:x="8.824cm" svg:y="25.547cm" svg:viewBox="0 0 175 2" draw:points="0,0 175,0 175,2 0,2">
          <text:p/>
        </draw:polygon>
        <draw:polygon draw:style-name="gr35" draw:text-style-name="P35" draw:layer="layout" svg:width="0.174cm" svg:height="0.003cm" svg:x="8.824cm" svg:y="25.548cm" svg:viewBox="0 0 175 4" draw:points="0,0 175,0 175,4 0,4">
          <text:p/>
        </draw:polygon>
        <draw:polygon draw:style-name="gr71" draw:text-style-name="P71" draw:layer="layout" svg:width="0.174cm" svg:height="0.001cm" svg:x="8.824cm" svg:y="25.55cm" svg:viewBox="0 0 175 2" draw:points="0,0 175,0 175,2 0,2">
          <text:p/>
        </draw:polygon>
        <draw:polygon draw:style-name="gr36" draw:text-style-name="P36" draw:layer="layout" svg:width="0.174cm" svg:height="0.001cm" svg:x="8.824cm" svg:y="25.551cm" svg:viewBox="0 0 175 2" draw:points="0,0 175,0 175,2 0,2">
          <text:p/>
        </draw:polygon>
        <draw:polygon draw:style-name="gr36" draw:text-style-name="P36" draw:layer="layout" svg:width="0.174cm" svg:height="0.003cm" svg:x="8.824cm" svg:y="25.552cm" svg:viewBox="0 0 175 4" draw:points="0,0 175,0 175,4 0,4">
          <text:p/>
        </draw:polygon>
        <draw:polygon draw:style-name="gr37" draw:text-style-name="P37" draw:layer="layout" svg:width="0.174cm" svg:height="0.001cm" svg:x="8.824cm" svg:y="25.554cm" svg:viewBox="0 0 175 2" draw:points="0,0 175,0 175,2 0,2">
          <text:p/>
        </draw:polygon>
        <draw:polygon draw:style-name="gr38" draw:text-style-name="P38" draw:layer="layout" svg:width="0.174cm" svg:height="0.001cm" svg:x="8.824cm" svg:y="25.555cm" svg:viewBox="0 0 175 2" draw:points="0,0 175,0 175,2 0,2">
          <text:p/>
        </draw:polygon>
        <draw:polygon draw:style-name="gr39" draw:text-style-name="P39" draw:layer="layout" svg:width="0.174cm" svg:height="0.003cm" svg:x="8.824cm" svg:y="25.556cm" svg:viewBox="0 0 175 4" draw:points="0,0 175,0 175,4 0,4">
          <text:p/>
        </draw:polygon>
        <draw:polygon draw:style-name="gr39" draw:text-style-name="P39" draw:layer="layout" svg:width="0.174cm" svg:height="0.001cm" svg:x="8.824cm" svg:y="25.558cm" svg:viewBox="0 0 175 2" draw:points="0,0 175,0 175,2 0,2">
          <text:p/>
        </draw:polygon>
        <draw:polygon draw:style-name="gr40" draw:text-style-name="P40" draw:layer="layout" svg:width="0.174cm" svg:height="0.001cm" svg:x="8.824cm" svg:y="25.559cm" svg:viewBox="0 0 175 2" draw:points="0,0 175,0 175,2 0,2">
          <text:p/>
        </draw:polygon>
        <draw:polygon draw:style-name="gr40" draw:text-style-name="P40" draw:layer="layout" svg:width="0.174cm" svg:height="0.003cm" svg:x="8.824cm" svg:y="25.56cm" svg:viewBox="0 0 175 4" draw:points="0,0 175,0 175,4 0,4">
          <text:p/>
        </draw:polygon>
        <draw:polygon draw:style-name="gr41" draw:text-style-name="P41" draw:layer="layout" svg:width="0.174cm" svg:height="0.001cm" svg:x="8.824cm" svg:y="25.562cm" svg:viewBox="0 0 175 2" draw:points="0,0 175,0 175,2 0,2">
          <text:p/>
        </draw:polygon>
        <draw:polygon draw:style-name="gr41" draw:text-style-name="P41" draw:layer="layout" svg:width="0.174cm" svg:height="0.003cm" svg:x="8.824cm" svg:y="25.563cm" svg:viewBox="0 0 175 4" draw:points="0,0 175,0 175,4 0,4">
          <text:p/>
        </draw:polygon>
        <draw:polygon draw:style-name="gr42" draw:text-style-name="P42" draw:layer="layout" svg:width="0.174cm" svg:height="0.001cm" svg:x="8.824cm" svg:y="25.565cm" svg:viewBox="0 0 175 2" draw:points="0,0 175,0 175,2 0,2">
          <text:p/>
        </draw:polygon>
        <draw:polygon draw:style-name="gr43" draw:text-style-name="P43" draw:layer="layout" svg:width="0.174cm" svg:height="0.001cm" svg:x="8.824cm" svg:y="25.566cm" svg:viewBox="0 0 175 2" draw:points="0,0 175,0 175,2 0,2">
          <text:p/>
        </draw:polygon>
        <draw:polygon draw:style-name="gr43" draw:text-style-name="P43" draw:layer="layout" svg:width="0.174cm" svg:height="0.003cm" svg:x="8.824cm" svg:y="25.567cm" svg:viewBox="0 0 175 4" draw:points="0,0 175,0 175,4 0,4">
          <text:p/>
        </draw:polygon>
        <draw:polygon draw:style-name="gr44" draw:text-style-name="P44" draw:layer="layout" svg:width="0.174cm" svg:height="0.001cm" svg:x="8.824cm" svg:y="25.569cm" svg:viewBox="0 0 175 2" draw:points="0,0 175,0 175,2 0,2">
          <text:p/>
        </draw:polygon>
        <draw:polygon draw:style-name="gr44" draw:text-style-name="P44" draw:layer="layout" svg:width="0.174cm" svg:height="0.001cm" svg:x="8.824cm" svg:y="25.57cm" svg:viewBox="0 0 175 2" draw:points="0,0 175,0 175,2 0,2">
          <text:p/>
        </draw:polygon>
        <draw:polygon draw:style-name="gr45" draw:text-style-name="P45" draw:layer="layout" svg:width="0.174cm" svg:height="0.003cm" svg:x="8.824cm" svg:y="25.571cm" svg:viewBox="0 0 175 4" draw:points="0,0 175,0 175,4 0,4">
          <text:p/>
        </draw:polygon>
        <draw:polygon draw:style-name="gr46" draw:text-style-name="P46" draw:layer="layout" svg:width="0.174cm" svg:height="0.001cm" svg:x="8.824cm" svg:y="25.573cm" svg:viewBox="0 0 175 2" draw:points="0,0 175,0 175,2 0,2">
          <text:p/>
        </draw:polygon>
        <draw:polygon draw:style-name="gr47" draw:text-style-name="P47" draw:layer="layout" svg:width="0.174cm" svg:height="0.001cm" svg:x="8.824cm" svg:y="25.574cm" svg:viewBox="0 0 175 2" draw:points="0,0 175,0 175,2 0,2">
          <text:p/>
        </draw:polygon>
        <draw:polygon draw:style-name="gr47" draw:text-style-name="P47" draw:layer="layout" svg:width="0.174cm" svg:height="0.003cm" svg:x="8.824cm" svg:y="25.575cm" svg:viewBox="0 0 175 4" draw:points="0,0 175,0 175,4 0,4">
          <text:p/>
        </draw:polygon>
        <draw:polygon draw:style-name="gr48" draw:text-style-name="P48" draw:layer="layout" svg:width="0.174cm" svg:height="0.004cm" svg:x="8.824cm" svg:y="25.578cm" svg:viewBox="0 0 175 5" draw:points="0,0 175,0 175,5 0,5">
          <text:p/>
        </draw:polygon>
        <draw:polygon draw:style-name="gr48" draw:text-style-name="P48" draw:layer="layout" svg:width="0.174cm" svg:height="0.003cm" svg:x="8.824cm" svg:y="25.581cm" svg:viewBox="0 0 175 4" draw:points="0,0 175,0 175,4 0,4">
          <text:p/>
        </draw:polygon>
        <draw:polygon draw:style-name="gr49" draw:text-style-name="P49" draw:layer="layout" svg:width="0.174cm" svg:height="0.002cm" svg:x="8.824cm" svg:y="25.584cm" svg:viewBox="0 0 175 3" draw:points="0,0 175,0 175,3 0,3">
          <text:p/>
        </draw:polygon>
        <draw:polygon draw:style-name="gr49" draw:text-style-name="P49" draw:layer="layout" svg:width="0.174cm" svg:height="0.004cm" svg:x="8.824cm" svg:y="25.586cm" svg:viewBox="0 0 175 5" draw:points="0,0 175,0 175,5 0,5">
          <text:p/>
        </draw:polygon>
        <draw:polygon draw:style-name="gr50" draw:text-style-name="P50" draw:layer="layout" svg:width="0.174cm" svg:height="0.003cm" svg:x="8.824cm" svg:y="25.589cm" svg:viewBox="0 0 175 4" draw:points="0,0 175,0 175,4 0,4">
          <text:p/>
        </draw:polygon>
        <draw:polygon draw:style-name="gr50" draw:text-style-name="P50" draw:layer="layout" svg:width="0.174cm" svg:height="0.004cm" svg:x="8.824cm" svg:y="25.592cm" svg:viewBox="0 0 175 5" draw:points="0,0 175,0 175,5 0,5">
          <text:p/>
        </draw:polygon>
        <draw:polygon draw:style-name="gr51" draw:text-style-name="P51" draw:layer="layout" svg:width="0.174cm" svg:height="0.002cm" svg:x="8.824cm" svg:y="25.595cm" svg:viewBox="0 0 175 3" draw:points="0,0 175,0 175,3 0,3">
          <text:p/>
        </draw:polygon>
        <draw:polygon draw:style-name="gr51" draw:text-style-name="P51" draw:layer="layout" svg:width="0.174cm" svg:height="0.003cm" svg:x="8.824cm" svg:y="25.597cm" svg:viewBox="0 0 175 4" draw:points="0,0 175,0 175,4 0,4">
          <text:p/>
        </draw:polygon>
        <draw:polygon draw:style-name="gr52" draw:text-style-name="P52" draw:layer="layout" svg:width="0.174cm" svg:height="0.004cm" svg:x="8.824cm" svg:y="25.6cm" svg:viewBox="0 0 175 5" draw:points="0,0 175,0 175,5 0,5">
          <text:p/>
        </draw:polygon>
        <draw:polygon draw:style-name="gr53" draw:text-style-name="P53" draw:layer="layout" svg:width="0.174cm" svg:height="0.002cm" svg:x="8.824cm" svg:y="25.603cm" svg:viewBox="0 0 175 3" draw:points="0,0 175,0 175,3 0,3">
          <text:p/>
        </draw:polygon>
        <draw:polygon draw:style-name="gr54" draw:text-style-name="P54" draw:layer="layout" svg:width="0.174cm" svg:height="0.003cm" svg:x="8.824cm" svg:y="25.605cm" svg:viewBox="0 0 175 4" draw:points="0,0 175,0 175,4 0,4">
          <text:p/>
        </draw:polygon>
        <draw:polygon draw:style-name="gr55" draw:text-style-name="P55" draw:layer="layout" svg:width="0.174cm" svg:height="0.004cm" svg:x="8.824cm" svg:y="25.608cm" svg:viewBox="0 0 175 5" draw:points="0,0 175,0 175,5 0,5">
          <text:p/>
        </draw:polygon>
        <draw:polygon draw:style-name="gr56" draw:text-style-name="P56" draw:layer="layout" svg:width="0.174cm" svg:height="0.003cm" svg:x="8.824cm" svg:y="25.611cm" svg:viewBox="0 0 175 4" draw:points="0,0 175,0 175,4 0,4">
          <text:p/>
        </draw:polygon>
        <draw:polygon draw:style-name="gr57" draw:text-style-name="P57" draw:layer="layout" svg:width="0.174cm" svg:height="0.002cm" svg:x="8.824cm" svg:y="25.614cm" svg:viewBox="0 0 175 3" draw:points="0,0 175,0 175,3 0,3">
          <text:p/>
        </draw:polygon>
        <draw:polygon draw:style-name="gr58" draw:text-style-name="P58" draw:layer="layout" svg:width="0.174cm" svg:height="0.004cm" svg:x="8.824cm" svg:y="25.616cm" svg:viewBox="0 0 175 5" draw:points="0,0 175,0 175,5 0,5">
          <text:p/>
        </draw:polygon>
        <draw:polygon draw:style-name="gr59" draw:text-style-name="P59" draw:layer="layout" svg:width="0.174cm" svg:height="0.003cm" svg:x="8.824cm" svg:y="25.619cm" svg:viewBox="0 0 175 4" draw:points="0,0 175,0 175,4 0,4">
          <text:p/>
        </draw:polygon>
        <draw:polygon draw:style-name="gr60" draw:text-style-name="P60" draw:layer="layout" svg:width="0.174cm" svg:height="0.004cm" svg:x="8.824cm" svg:y="25.622cm" svg:viewBox="0 0 175 5" draw:points="0,0 175,0 175,5 0,5">
          <text:p/>
        </draw:polygon>
        <draw:polygon draw:style-name="gr61" draw:text-style-name="P61" draw:layer="layout" svg:width="0.174cm" svg:height="0.002cm" svg:x="8.824cm" svg:y="25.625cm" svg:viewBox="0 0 175 3" draw:points="0,0 175,0 175,3 0,3">
          <text:p/>
        </draw:polygon>
        <draw:polygon draw:style-name="gr62" draw:text-style-name="P62" draw:layer="layout" svg:width="0.174cm" svg:height="0.003cm" svg:x="8.824cm" svg:y="25.627cm" svg:viewBox="0 0 175 4" draw:points="0,0 175,0 175,4 0,4">
          <text:p/>
        </draw:polygon>
        <draw:polygon draw:style-name="gr63" draw:text-style-name="P63" draw:layer="layout" svg:width="0.174cm" svg:height="0.004cm" svg:x="8.824cm" svg:y="25.63cm" svg:viewBox="0 0 175 5" draw:points="0,0 175,0 175,5 0,5">
          <text:p/>
        </draw:polygon>
        <draw:polygon draw:style-name="gr64" draw:text-style-name="P64" draw:layer="layout" svg:width="0.174cm" svg:height="0.002cm" svg:x="8.824cm" svg:y="25.633cm" svg:viewBox="0 0 175 3" draw:points="0,0 175,0 175,3 0,3">
          <text:p/>
        </draw:polygon>
        <draw:polygon draw:style-name="gr65" draw:text-style-name="P65" draw:layer="layout" svg:width="0.174cm" svg:height="0.003cm" svg:x="8.824cm" svg:y="25.635cm" svg:viewBox="0 0 175 4" draw:points="0,0 175,0 175,4 0,4">
          <text:p/>
        </draw:polygon>
        <draw:polygon draw:style-name="gr66" draw:text-style-name="P66" draw:layer="layout" svg:width="0.174cm" svg:height="0.004cm" svg:x="8.824cm" svg:y="25.638cm" svg:viewBox="0 0 175 5" draw:points="0,0 175,0 175,5 0,5">
          <text:p/>
        </draw:polygon>
        <draw:polygon draw:style-name="gr66" draw:text-style-name="P66" draw:layer="layout" svg:width="0.174cm" svg:height="0.003cm" svg:x="8.824cm" svg:y="25.641cm" svg:viewBox="0 0 175 4" draw:points="0,0 175,0 175,4 0,4">
          <text:p/>
        </draw:polygon>
        <draw:polygon draw:style-name="gr67" draw:text-style-name="P67" draw:layer="layout" svg:width="0.174cm" svg:height="0.002cm" svg:x="8.824cm" svg:y="25.644cm" svg:viewBox="0 0 175 3" draw:points="0,0 175,0 175,3 0,3">
          <text:p/>
        </draw:polygon>
        <draw:polygon draw:style-name="gr67" draw:text-style-name="P67" draw:layer="layout" svg:width="0.174cm" svg:height="0.004cm" svg:x="8.824cm" svg:y="25.646cm" svg:viewBox="0 0 175 5" draw:points="0,0 175,0 175,5 0,5">
          <text:p/>
        </draw:polygon>
        <draw:polygon draw:style-name="gr68" draw:text-style-name="P68" draw:layer="layout" svg:width="0.174cm" svg:height="0.003cm" svg:x="8.824cm" svg:y="25.649cm" svg:viewBox="0 0 175 4" draw:points="0,0 175,0 175,4 0,4">
          <text:p/>
        </draw:polygon>
        <draw:polygon draw:style-name="gr68" draw:text-style-name="P68" draw:layer="layout" svg:width="0.174cm" svg:height="0.002cm" svg:x="8.824cm" svg:y="25.652cm" svg:viewBox="0 0 175 3" draw:points="0,0 175,0 175,3 0,3">
          <text:p/>
        </draw:polygon>
        <draw:polygon draw:style-name="gr69" draw:text-style-name="P69" draw:layer="layout" svg:width="0.174cm" svg:height="0.004cm" svg:x="8.824cm" svg:y="25.654cm" svg:viewBox="0 0 175 5" draw:points="0,0 175,0 175,5 0,5">
          <text:p/>
        </draw:polygon>
        <draw:polygon draw:style-name="gr69" draw:text-style-name="P69" draw:layer="layout" svg:width="0.174cm" svg:height="0.003cm" svg:x="8.824cm" svg:y="25.657cm" svg:viewBox="0 0 175 4" draw:points="0,0 175,0 175,4 0,4">
          <text:p/>
        </draw:polygon>
        <draw:polygon draw:style-name="gr70" draw:text-style-name="P70" draw:layer="layout" svg:width="0.174cm" svg:height="0.004cm" svg:x="8.824cm" svg:y="25.66cm" svg:viewBox="0 0 175 5" draw:points="0,0 175,0 175,5 0,5">
          <text:p/>
        </draw:polygon>
        <draw:frame draw:style-name="gr1" draw:text-style-name="P2" draw:layer="layout" svg:width="12.611cm" svg:height="0.763cm" svg:x="5.76cm" svg:y="17.403cm">
          <draw:text-box>
            <text:p text:style-name="P1"><text:span text:style-name="T5">Сравнение работы </text:span><text:span text:style-name="T6">CPU-one, CPU-multi</text:span><text:span text:style-name="T5"> и</text:span><text:span text:style-name="T6"> GPU</text:span></text:p>
          </draw:text-box>
        </draw:frame>
        <draw:polygon draw:style-name="gr72" draw:text-style-name="P72" draw:layer="layout" svg:width="0.174cm" svg:height="0.003cm" svg:x="10.711cm" svg:y="25.488cm" svg:viewBox="0 0 175 4" draw:points="0,0 175,0 175,4 0,4">
          <text:p/>
        </draw:polygon>
        <draw:polygon draw:style-name="gr73" draw:text-style-name="P73" draw:layer="layout" svg:width="0.174cm" svg:height="0.001cm" svg:x="10.711cm" svg:y="25.49cm" svg:viewBox="0 0 175 2" draw:points="0,0 175,0 175,2 0,2">
          <text:p/>
        </draw:polygon>
        <draw:polygon draw:style-name="gr74" draw:text-style-name="P74" draw:layer="layout" svg:width="0.174cm" svg:height="0.001cm" svg:x="10.711cm" svg:y="25.491cm" svg:viewBox="0 0 175 2" draw:points="0,0 175,0 175,2 0,2">
          <text:p/>
        </draw:polygon>
        <draw:polygon draw:style-name="gr74" draw:text-style-name="P74" draw:layer="layout" svg:width="0.174cm" svg:height="0.003cm" svg:x="10.711cm" svg:y="25.492cm" svg:viewBox="0 0 175 4" draw:points="0,0 175,0 175,4 0,4">
          <text:p/>
        </draw:polygon>
        <draw:polygon draw:style-name="gr75" draw:text-style-name="P75" draw:layer="layout" svg:width="0.174cm" svg:height="0.001cm" svg:x="10.711cm" svg:y="25.494cm" svg:viewBox="0 0 175 2" draw:points="0,0 175,0 175,2 0,2">
          <text:p/>
        </draw:polygon>
        <draw:polygon draw:style-name="gr76" draw:text-style-name="P76" draw:layer="layout" svg:width="0.174cm" svg:height="0.001cm" svg:x="10.711cm" svg:y="25.495cm" svg:viewBox="0 0 175 2" draw:points="0,0 175,0 175,2 0,2">
          <text:p/>
        </draw:polygon>
        <draw:polygon draw:style-name="gr78" draw:text-style-name="P78" draw:layer="layout" svg:width="0.174cm" svg:height="0.003cm" svg:x="10.711cm" svg:y="25.496cm" svg:viewBox="0 0 175 4" draw:points="0,0 175,0 175,4 0,4">
          <text:p/>
        </draw:polygon>
        <draw:polygon draw:style-name="gr78" draw:text-style-name="P78" draw:layer="layout" svg:width="0.174cm" svg:height="0.001cm" svg:x="10.711cm" svg:y="25.498cm" svg:viewBox="0 0 175 2" draw:points="0,0 175,0 175,2 0,2">
          <text:p/>
        </draw:polygon>
        <draw:polygon draw:style-name="gr79" draw:text-style-name="P79" draw:layer="layout" svg:width="0.174cm" svg:height="0.003cm" svg:x="10.711cm" svg:y="25.499cm" svg:viewBox="0 0 175 4" draw:points="0,0 175,0 175,4 0,4">
          <text:p/>
        </draw:polygon>
        <draw:polygon draw:style-name="gr81" draw:text-style-name="P81" draw:layer="layout" svg:width="0.174cm" svg:height="0.001cm" svg:x="10.711cm" svg:y="25.501cm" svg:viewBox="0 0 175 2" draw:points="0,0 175,0 175,2 0,2">
          <text:p/>
        </draw:polygon>
        <draw:polygon draw:style-name="gr81" draw:text-style-name="P81" draw:layer="layout" svg:width="0.174cm" svg:height="0.001cm" svg:x="10.711cm" svg:y="25.502cm" svg:viewBox="0 0 175 2" draw:points="0,0 175,0 175,2 0,2">
          <text:p/>
        </draw:polygon>
        <draw:polygon draw:style-name="gr82" draw:text-style-name="P82" draw:layer="layout" svg:width="0.174cm" svg:height="0.003cm" svg:x="10.711cm" svg:y="25.503cm" svg:viewBox="0 0 175 4" draw:points="0,0 175,0 175,4 0,4">
          <text:p/>
        </draw:polygon>
        <draw:polygon draw:style-name="gr83" draw:text-style-name="P83" draw:layer="layout" svg:width="0.174cm" svg:height="0.001cm" svg:x="10.711cm" svg:y="25.505cm" svg:viewBox="0 0 175 2" draw:points="0,0 175,0 175,2 0,2">
          <text:p/>
        </draw:polygon>
        <draw:polygon draw:style-name="gr85" draw:text-style-name="P85" draw:layer="layout" svg:width="0.174cm" svg:height="0.001cm" svg:x="10.711cm" svg:y="25.506cm" svg:viewBox="0 0 175 2" draw:points="0,0 175,0 175,2 0,2">
          <text:p/>
        </draw:polygon>
        <draw:polygon draw:style-name="gr85" draw:text-style-name="P85" draw:layer="layout" svg:width="0.174cm" svg:height="0.003cm" svg:x="10.711cm" svg:y="25.507cm" svg:viewBox="0 0 175 4" draw:points="0,0 175,0 175,4 0,4">
          <text:p/>
        </draw:polygon>
        <draw:polygon draw:style-name="gr86" draw:text-style-name="P86" draw:layer="layout" svg:width="0.174cm" svg:height="0.001cm" svg:x="10.711cm" svg:y="25.509cm" svg:viewBox="0 0 175 2" draw:points="0,0 175,0 175,2 0,2">
          <text:p/>
        </draw:polygon>
        <draw:polygon draw:style-name="gr148" draw:text-style-name="P148" draw:layer="layout" svg:width="0.174cm" svg:height="0.001cm" svg:x="10.711cm" svg:y="25.51cm" svg:viewBox="0 0 175 2" draw:points="0,0 175,0 175,2 0,2">
          <text:p/>
        </draw:polygon>
        <draw:polygon draw:style-name="gr87" draw:text-style-name="P87" draw:layer="layout" svg:width="0.174cm" svg:height="0.003cm" svg:x="10.711cm" svg:y="25.511cm" svg:viewBox="0 0 175 4" draw:points="0,0 175,0 175,4 0,4">
          <text:p/>
        </draw:polygon>
        <draw:polygon draw:style-name="gr88" draw:text-style-name="P88" draw:layer="layout" svg:width="0.174cm" svg:height="0.001cm" svg:x="10.711cm" svg:y="25.513cm" svg:viewBox="0 0 175 2" draw:points="0,0 175,0 175,2 0,2">
          <text:p/>
        </draw:polygon>
        <draw:polygon draw:style-name="gr89" draw:text-style-name="P89" draw:layer="layout" svg:width="0.174cm" svg:height="0.003cm" svg:x="10.711cm" svg:y="25.514cm" svg:viewBox="0 0 175 4" draw:points="0,0 175,0 175,4 0,4">
          <text:p/>
        </draw:polygon>
        <draw:polygon draw:style-name="gr89" draw:text-style-name="P89" draw:layer="layout" svg:width="0.174cm" svg:height="0.001cm" svg:x="10.711cm" svg:y="25.516cm" svg:viewBox="0 0 175 2" draw:points="0,0 175,0 175,2 0,2">
          <text:p/>
        </draw:polygon>
        <draw:polygon draw:style-name="gr90" draw:text-style-name="P90" draw:layer="layout" svg:width="0.174cm" svg:height="0.001cm" svg:x="10.711cm" svg:y="25.517cm" svg:viewBox="0 0 175 2" draw:points="0,0 175,0 175,2 0,2">
          <text:p/>
        </draw:polygon>
        <draw:polygon draw:style-name="gr91" draw:text-style-name="P91" draw:layer="layout" svg:width="0.174cm" svg:height="0.003cm" svg:x="10.711cm" svg:y="25.518cm" svg:viewBox="0 0 175 4" draw:points="0,0 175,0 175,4 0,4">
          <text:p/>
        </draw:polygon>
        <draw:polygon draw:style-name="gr92" draw:text-style-name="P92" draw:layer="layout" svg:width="0.174cm" svg:height="0.001cm" svg:x="10.711cm" svg:y="25.52cm" svg:viewBox="0 0 175 2" draw:points="0,0 175,0 175,2 0,2">
          <text:p/>
        </draw:polygon>
        <draw:polygon draw:style-name="gr149" draw:text-style-name="P149" draw:layer="layout" svg:width="0.174cm" svg:height="0.001cm" svg:x="10.711cm" svg:y="25.521cm" svg:viewBox="0 0 175 2" draw:points="0,0 175,0 175,2 0,2">
          <text:p/>
        </draw:polygon>
        <draw:polygon draw:style-name="gr93" draw:text-style-name="P93" draw:layer="layout" svg:width="0.174cm" svg:height="0.003cm" svg:x="10.711cm" svg:y="25.522cm" svg:viewBox="0 0 175 4" draw:points="0,0 175,0 175,4 0,4">
          <text:p/>
        </draw:polygon>
        <draw:polygon draw:style-name="gr94" draw:text-style-name="P94" draw:layer="layout" svg:width="0.174cm" svg:height="0.001cm" svg:x="10.711cm" svg:y="25.524cm" svg:viewBox="0 0 175 2" draw:points="0,0 175,0 175,2 0,2">
          <text:p/>
        </draw:polygon>
        <draw:polygon draw:style-name="gr94" draw:text-style-name="P94" draw:layer="layout" svg:width="0.174cm" svg:height="0.001cm" svg:x="10.711cm" svg:y="25.525cm" svg:viewBox="0 0 175 2" draw:points="0,0 175,0 175,2 0,2">
          <text:p/>
        </draw:polygon>
        <draw:polygon draw:style-name="gr95" draw:text-style-name="P95" draw:layer="layout" svg:width="0.174cm" svg:height="0.003cm" svg:x="10.711cm" svg:y="25.526cm" svg:viewBox="0 0 175 4" draw:points="0,0 175,0 175,4 0,4">
          <text:p/>
        </draw:polygon>
        <draw:polygon draw:style-name="gr96" draw:text-style-name="P96" draw:layer="layout" svg:width="0.174cm" svg:height="0.001cm" svg:x="10.711cm" svg:y="25.528cm" svg:viewBox="0 0 175 2" draw:points="0,0 175,0 175,2 0,2">
          <text:p/>
        </draw:polygon>
        <draw:polygon draw:style-name="gr96" draw:text-style-name="P96" draw:layer="layout" svg:width="0.174cm" svg:height="0.003cm" svg:x="10.711cm" svg:y="25.529cm" svg:viewBox="0 0 175 4" draw:points="0,0 175,0 175,4 0,4">
          <text:p/>
        </draw:polygon>
        <draw:polygon draw:style-name="gr97" draw:text-style-name="P97" draw:layer="layout" svg:width="0.174cm" svg:height="0.001cm" svg:x="10.711cm" svg:y="25.531cm" svg:viewBox="0 0 175 2" draw:points="0,0 175,0 175,2 0,2">
          <text:p/>
        </draw:polygon>
        <draw:polygon draw:style-name="gr98" draw:text-style-name="P98" draw:layer="layout" svg:width="0.174cm" svg:height="0.001cm" svg:x="10.711cm" svg:y="25.532cm" svg:viewBox="0 0 175 2" draw:points="0,0 175,0 175,2 0,2">
          <text:p/>
        </draw:polygon>
        <draw:polygon draw:style-name="gr99" draw:text-style-name="P99" draw:layer="layout" svg:width="0.174cm" svg:height="0.003cm" svg:x="10.711cm" svg:y="25.533cm" svg:viewBox="0 0 175 4" draw:points="0,0 175,0 175,4 0,4">
          <text:p/>
        </draw:polygon>
        <draw:polygon draw:style-name="gr99" draw:text-style-name="P99" draw:layer="layout" svg:width="0.174cm" svg:height="0.001cm" svg:x="10.711cm" svg:y="25.535cm" svg:viewBox="0 0 175 2" draw:points="0,0 175,0 175,2 0,2">
          <text:p/>
        </draw:polygon>
        <draw:polygon draw:style-name="gr100" draw:text-style-name="P100" draw:layer="layout" svg:width="0.174cm" svg:height="0.001cm" svg:x="10.711cm" svg:y="25.536cm" svg:viewBox="0 0 175 2" draw:points="0,0 175,0 175,2 0,2">
          <text:p/>
        </draw:polygon>
        <draw:polygon draw:style-name="gr101" draw:text-style-name="P101" draw:layer="layout" svg:width="0.174cm" svg:height="0.003cm" svg:x="10.711cm" svg:y="25.537cm" svg:viewBox="0 0 175 4" draw:points="0,0 175,0 175,4 0,4">
          <text:p/>
        </draw:polygon>
        <draw:polygon draw:style-name="gr101" draw:text-style-name="P101" draw:layer="layout" svg:width="0.174cm" svg:height="0.001cm" svg:x="10.711cm" svg:y="25.539cm" svg:viewBox="0 0 175 2" draw:points="0,0 175,0 175,2 0,2">
          <text:p/>
        </draw:polygon>
        <draw:polygon draw:style-name="gr102" draw:text-style-name="P102" draw:layer="layout" svg:width="0.174cm" svg:height="0.001cm" svg:x="10.711cm" svg:y="25.54cm" svg:viewBox="0 0 175 2" draw:points="0,0 175,0 175,2 0,2">
          <text:p/>
        </draw:polygon>
        <draw:polygon draw:style-name="gr104" draw:text-style-name="P104" draw:layer="layout" svg:width="0.174cm" svg:height="0.003cm" svg:x="10.711cm" svg:y="25.541cm" svg:viewBox="0 0 175 4" draw:points="0,0 175,0 175,4 0,4">
          <text:p/>
        </draw:polygon>
        <draw:polygon draw:style-name="gr105" draw:text-style-name="P105" draw:layer="layout" svg:width="0.174cm" svg:height="0.001cm" svg:x="10.711cm" svg:y="25.543cm" svg:viewBox="0 0 175 2" draw:points="0,0 175,0 175,2 0,2">
          <text:p/>
        </draw:polygon>
        <draw:polygon draw:style-name="gr105" draw:text-style-name="P105" draw:layer="layout" svg:width="0.174cm" svg:height="0.003cm" svg:x="10.711cm" svg:y="25.544cm" svg:viewBox="0 0 175 4" draw:points="0,0 175,0 175,4 0,4">
          <text:p/>
        </draw:polygon>
        <draw:polygon draw:style-name="gr106" draw:text-style-name="P106" draw:layer="layout" svg:width="0.174cm" svg:height="0.001cm" svg:x="10.711cm" svg:y="25.546cm" svg:viewBox="0 0 175 2" draw:points="0,0 175,0 175,2 0,2">
          <text:p/>
        </draw:polygon>
        <draw:polygon draw:style-name="gr108" draw:text-style-name="P108" draw:layer="layout" svg:width="0.174cm" svg:height="0.001cm" svg:x="10.711cm" svg:y="25.547cm" svg:viewBox="0 0 175 2" draw:points="0,0 175,0 175,2 0,2">
          <text:p/>
        </draw:polygon>
        <draw:polygon draw:style-name="gr108" draw:text-style-name="P108" draw:layer="layout" svg:width="0.174cm" svg:height="0.003cm" svg:x="10.711cm" svg:y="25.548cm" svg:viewBox="0 0 175 4" draw:points="0,0 175,0 175,4 0,4">
          <text:p/>
        </draw:polygon>
        <draw:polygon draw:style-name="gr109" draw:text-style-name="P109" draw:layer="layout" svg:width="0.174cm" svg:height="0.001cm" svg:x="10.711cm" svg:y="25.55cm" svg:viewBox="0 0 175 2" draw:points="0,0 175,0 175,2 0,2">
          <text:p/>
        </draw:polygon>
        <draw:polygon draw:style-name="gr110" draw:text-style-name="P110" draw:layer="layout" svg:width="0.174cm" svg:height="0.001cm" svg:x="10.711cm" svg:y="25.551cm" svg:viewBox="0 0 175 2" draw:points="0,0 175,0 175,2 0,2">
          <text:p/>
        </draw:polygon>
        <draw:polygon draw:style-name="gr111" draw:text-style-name="P111" draw:layer="layout" svg:width="0.174cm" svg:height="0.003cm" svg:x="10.711cm" svg:y="25.552cm" svg:viewBox="0 0 175 4" draw:points="0,0 175,0 175,4 0,4">
          <text:p/>
        </draw:polygon>
        <draw:polygon draw:style-name="gr112" draw:text-style-name="P112" draw:layer="layout" svg:width="0.174cm" svg:height="0.001cm" svg:x="10.711cm" svg:y="25.554cm" svg:viewBox="0 0 175 2" draw:points="0,0 175,0 175,2 0,2">
          <text:p/>
        </draw:polygon>
        <draw:polygon draw:style-name="gr113" draw:text-style-name="P113" draw:layer="layout" svg:width="0.174cm" svg:height="0.001cm" svg:x="10.711cm" svg:y="25.555cm" svg:viewBox="0 0 175 2" draw:points="0,0 175,0 175,2 0,2">
          <text:p/>
        </draw:polygon>
        <draw:polygon draw:style-name="gr150" draw:text-style-name="P150" draw:layer="layout" svg:width="0.174cm" svg:height="0.003cm" svg:x="10.711cm" svg:y="25.556cm" svg:viewBox="0 0 175 4" draw:points="0,0 175,0 175,4 0,4">
          <text:p/>
        </draw:polygon>
        <draw:polygon draw:style-name="gr114" draw:text-style-name="P114" draw:layer="layout" svg:width="0.174cm" svg:height="0.001cm" svg:x="10.711cm" svg:y="25.558cm" svg:viewBox="0 0 175 2" draw:points="0,0 175,0 175,2 0,2">
          <text:p/>
        </draw:polygon>
        <draw:polygon draw:style-name="gr115" draw:text-style-name="P115" draw:layer="layout" svg:width="0.174cm" svg:height="0.001cm" svg:x="10.711cm" svg:y="25.559cm" svg:viewBox="0 0 175 2" draw:points="0,0 175,0 175,2 0,2">
          <text:p/>
        </draw:polygon>
        <draw:polygon draw:style-name="gr116" draw:text-style-name="P116" draw:layer="layout" svg:width="0.174cm" svg:height="0.003cm" svg:x="10.711cm" svg:y="25.56cm" svg:viewBox="0 0 175 4" draw:points="0,0 175,0 175,4 0,4">
          <text:p/>
        </draw:polygon>
        <draw:polygon draw:style-name="gr116" draw:text-style-name="P116" draw:layer="layout" svg:width="0.174cm" svg:height="0.001cm" svg:x="10.711cm" svg:y="25.562cm" svg:viewBox="0 0 175 2" draw:points="0,0 175,0 175,2 0,2">
          <text:p/>
        </draw:polygon>
        <draw:polygon draw:style-name="gr117" draw:text-style-name="P117" draw:layer="layout" svg:width="0.174cm" svg:height="0.003cm" svg:x="10.711cm" svg:y="25.563cm" svg:viewBox="0 0 175 4" draw:points="0,0 175,0 175,4 0,4">
          <text:p/>
        </draw:polygon>
        <draw:polygon draw:style-name="gr118" draw:text-style-name="P118" draw:layer="layout" svg:width="0.174cm" svg:height="0.001cm" svg:x="10.711cm" svg:y="25.565cm" svg:viewBox="0 0 175 2" draw:points="0,0 175,0 175,2 0,2">
          <text:p/>
        </draw:polygon>
        <draw:polygon draw:style-name="gr118" draw:text-style-name="P118" draw:layer="layout" svg:width="0.174cm" svg:height="0.001cm" svg:x="10.711cm" svg:y="25.566cm" svg:viewBox="0 0 175 2" draw:points="0,0 175,0 175,2 0,2">
          <text:p/>
        </draw:polygon>
        <draw:polygon draw:style-name="gr119" draw:text-style-name="P119" draw:layer="layout" svg:width="0.174cm" svg:height="0.003cm" svg:x="10.711cm" svg:y="25.567cm" svg:viewBox="0 0 175 4" draw:points="0,0 175,0 175,4 0,4">
          <text:p/>
        </draw:polygon>
        <draw:polygon draw:style-name="gr120" draw:text-style-name="P120" draw:layer="layout" svg:width="0.174cm" svg:height="0.001cm" svg:x="10.711cm" svg:y="25.569cm" svg:viewBox="0 0 175 2" draw:points="0,0 175,0 175,2 0,2">
          <text:p/>
        </draw:polygon>
        <draw:polygon draw:style-name="gr121" draw:text-style-name="P121" draw:layer="layout" svg:width="0.174cm" svg:height="0.001cm" svg:x="10.711cm" svg:y="25.57cm" svg:viewBox="0 0 175 2" draw:points="0,0 175,0 175,2 0,2">
          <text:p/>
        </draw:polygon>
        <draw:polygon draw:style-name="gr121" draw:text-style-name="P121" draw:layer="layout" svg:width="0.174cm" svg:height="0.003cm" svg:x="10.711cm" svg:y="25.571cm" svg:viewBox="0 0 175 4" draw:points="0,0 175,0 175,4 0,4">
          <text:p/>
        </draw:polygon>
        <draw:polygon draw:style-name="gr122" draw:text-style-name="P122" draw:layer="layout" svg:width="0.174cm" svg:height="0.001cm" svg:x="10.711cm" svg:y="25.573cm" svg:viewBox="0 0 175 2" draw:points="0,0 175,0 175,2 0,2">
          <text:p/>
        </draw:polygon>
        <draw:polygon draw:style-name="gr123" draw:text-style-name="P123" draw:layer="layout" svg:width="0.174cm" svg:height="0.001cm" svg:x="10.711cm" svg:y="25.574cm" svg:viewBox="0 0 175 2" draw:points="0,0 175,0 175,2 0,2">
          <text:p/>
        </draw:polygon>
        <draw:polygon draw:style-name="gr123" draw:text-style-name="P123" draw:layer="layout" svg:width="0.174cm" svg:height="0.003cm" svg:x="10.711cm" svg:y="25.575cm" svg:viewBox="0 0 175 4" draw:points="0,0 175,0 175,4 0,4">
          <text:p/>
        </draw:polygon>
        <draw:polygon draw:style-name="gr124" draw:text-style-name="P124" draw:layer="layout" svg:width="0.174cm" svg:height="0.004cm" svg:x="10.711cm" svg:y="25.578cm" svg:viewBox="0 0 175 5" draw:points="0,0 175,0 175,5 0,5">
          <text:p/>
        </draw:polygon>
        <draw:polygon draw:style-name="gr124" draw:text-style-name="P124" draw:layer="layout" svg:width="0.174cm" svg:height="0.003cm" svg:x="10.711cm" svg:y="25.581cm" svg:viewBox="0 0 175 4" draw:points="0,0 175,0 175,4 0,4">
          <text:p/>
        </draw:polygon>
        <draw:polygon draw:style-name="gr125" draw:text-style-name="P125" draw:layer="layout" svg:width="0.174cm" svg:height="0.002cm" svg:x="10.711cm" svg:y="25.584cm" svg:viewBox="0 0 175 3" draw:points="0,0 175,0 175,3 0,3">
          <text:p/>
        </draw:polygon>
        <draw:polygon draw:style-name="gr125" draw:text-style-name="P125" draw:layer="layout" svg:width="0.174cm" svg:height="0.004cm" svg:x="10.711cm" svg:y="25.586cm" svg:viewBox="0 0 175 5" draw:points="0,0 175,0 175,5 0,5">
          <text:p/>
        </draw:polygon>
        <draw:polygon draw:style-name="gr126" draw:text-style-name="P126" draw:layer="layout" svg:width="0.174cm" svg:height="0.003cm" svg:x="10.711cm" svg:y="25.589cm" svg:viewBox="0 0 175 4" draw:points="0,0 175,0 175,4 0,4">
          <text:p/>
        </draw:polygon>
        <draw:polygon draw:style-name="gr126" draw:text-style-name="P126" draw:layer="layout" svg:width="0.174cm" svg:height="0.004cm" svg:x="10.711cm" svg:y="25.592cm" svg:viewBox="0 0 175 5" draw:points="0,0 175,0 175,5 0,5">
          <text:p/>
        </draw:polygon>
        <draw:polygon draw:style-name="gr127" draw:text-style-name="P127" draw:layer="layout" svg:width="0.174cm" svg:height="0.002cm" svg:x="10.711cm" svg:y="25.595cm" svg:viewBox="0 0 175 3" draw:points="0,0 175,0 175,3 0,3">
          <text:p/>
        </draw:polygon>
        <draw:polygon draw:style-name="gr151" draw:text-style-name="P151" draw:layer="layout" svg:width="0.174cm" svg:height="0.003cm" svg:x="10.711cm" svg:y="25.597cm" svg:viewBox="0 0 175 4" draw:points="0,0 175,0 175,4 0,4">
          <text:p/>
        </draw:polygon>
        <draw:polygon draw:style-name="gr128" draw:text-style-name="P128" draw:layer="layout" svg:width="0.174cm" svg:height="0.004cm" svg:x="10.711cm" svg:y="25.6cm" svg:viewBox="0 0 175 5" draw:points="0,0 175,0 175,5 0,5">
          <text:p/>
        </draw:polygon>
        <draw:polygon draw:style-name="gr129" draw:text-style-name="P129" draw:layer="layout" svg:width="0.174cm" svg:height="0.002cm" svg:x="10.711cm" svg:y="25.603cm" svg:viewBox="0 0 175 3" draw:points="0,0 175,0 175,3 0,3">
          <text:p/>
        </draw:polygon>
        <draw:polygon draw:style-name="gr130" draw:text-style-name="P130" draw:layer="layout" svg:width="0.174cm" svg:height="0.003cm" svg:x="10.711cm" svg:y="25.605cm" svg:viewBox="0 0 175 4" draw:points="0,0 175,0 175,4 0,4">
          <text:p/>
        </draw:polygon>
        <draw:polygon draw:style-name="gr131" draw:text-style-name="P131" draw:layer="layout" svg:width="0.174cm" svg:height="0.004cm" svg:x="10.711cm" svg:y="25.608cm" svg:viewBox="0 0 175 5" draw:points="0,0 175,0 175,5 0,5">
          <text:p/>
        </draw:polygon>
        <draw:polygon draw:style-name="gr132" draw:text-style-name="P132" draw:layer="layout" svg:width="0.174cm" svg:height="0.003cm" svg:x="10.711cm" svg:y="25.611cm" svg:viewBox="0 0 175 4" draw:points="0,0 175,0 175,4 0,4">
          <text:p/>
        </draw:polygon>
        <draw:polygon draw:style-name="gr133" draw:text-style-name="P133" draw:layer="layout" svg:width="0.174cm" svg:height="0.002cm" svg:x="10.711cm" svg:y="25.614cm" svg:viewBox="0 0 175 3" draw:points="0,0 175,0 175,3 0,3">
          <text:p/>
        </draw:polygon>
        <draw:polygon draw:style-name="gr134" draw:text-style-name="P134" draw:layer="layout" svg:width="0.174cm" svg:height="0.004cm" svg:x="10.711cm" svg:y="25.616cm" svg:viewBox="0 0 175 5" draw:points="0,0 175,0 175,5 0,5">
          <text:p/>
        </draw:polygon>
        <draw:polygon draw:style-name="gr135" draw:text-style-name="P135" draw:layer="layout" svg:width="0.174cm" svg:height="0.003cm" svg:x="10.711cm" svg:y="25.619cm" svg:viewBox="0 0 175 4" draw:points="0,0 175,0 175,4 0,4">
          <text:p/>
        </draw:polygon>
        <draw:polygon draw:style-name="gr136" draw:text-style-name="P136" draw:layer="layout" svg:width="0.174cm" svg:height="0.004cm" svg:x="10.711cm" svg:y="25.622cm" svg:viewBox="0 0 175 5" draw:points="0,0 175,0 175,5 0,5">
          <text:p/>
        </draw:polygon>
        <draw:polygon draw:style-name="gr137" draw:text-style-name="P137" draw:layer="layout" svg:width="0.174cm" svg:height="0.002cm" svg:x="10.711cm" svg:y="25.625cm" svg:viewBox="0 0 175 3" draw:points="0,0 175,0 175,3 0,3">
          <text:p/>
        </draw:polygon>
        <draw:polygon draw:style-name="gr138" draw:text-style-name="P138" draw:layer="layout" svg:width="0.174cm" svg:height="0.003cm" svg:x="10.711cm" svg:y="25.627cm" svg:viewBox="0 0 175 4" draw:points="0,0 175,0 175,4 0,4">
          <text:p/>
        </draw:polygon>
        <draw:polygon draw:style-name="gr139" draw:text-style-name="P139" draw:layer="layout" svg:width="0.174cm" svg:height="0.004cm" svg:x="10.711cm" svg:y="25.63cm" svg:viewBox="0 0 175 5" draw:points="0,0 175,0 175,5 0,5">
          <text:p/>
        </draw:polygon>
        <draw:polygon draw:style-name="gr140" draw:text-style-name="P140" draw:layer="layout" svg:width="0.174cm" svg:height="0.002cm" svg:x="10.711cm" svg:y="25.633cm" svg:viewBox="0 0 175 3" draw:points="0,0 175,0 175,3 0,3">
          <text:p/>
        </draw:polygon>
        <draw:polygon draw:style-name="gr141" draw:text-style-name="P141" draw:layer="layout" svg:width="0.174cm" svg:height="0.003cm" svg:x="10.711cm" svg:y="25.635cm" svg:viewBox="0 0 175 4" draw:points="0,0 175,0 175,4 0,4">
          <text:p/>
        </draw:polygon>
        <draw:polygon draw:style-name="gr142" draw:text-style-name="P142" draw:layer="layout" svg:width="0.174cm" svg:height="0.004cm" svg:x="10.711cm" svg:y="25.638cm" svg:viewBox="0 0 175 5" draw:points="0,0 175,0 175,5 0,5">
          <text:p/>
        </draw:polygon>
        <draw:polygon draw:style-name="gr143" draw:text-style-name="P143" draw:layer="layout" svg:width="0.174cm" svg:height="0.003cm" svg:x="10.711cm" svg:y="25.641cm" svg:viewBox="0 0 175 4" draw:points="0,0 175,0 175,4 0,4">
          <text:p/>
        </draw:polygon>
        <draw:polygon draw:style-name="gr144" draw:text-style-name="P144" draw:layer="layout" svg:width="0.174cm" svg:height="0.002cm" svg:x="10.711cm" svg:y="25.644cm" svg:viewBox="0 0 175 3" draw:points="0,0 175,0 175,3 0,3">
          <text:p/>
        </draw:polygon>
        <draw:polygon draw:style-name="gr144" draw:text-style-name="P144" draw:layer="layout" svg:width="0.174cm" svg:height="0.004cm" svg:x="10.711cm" svg:y="25.646cm" svg:viewBox="0 0 175 5" draw:points="0,0 175,0 175,5 0,5">
          <text:p/>
        </draw:polygon>
        <draw:polygon draw:style-name="gr145" draw:text-style-name="P145" draw:layer="layout" svg:width="0.174cm" svg:height="0.003cm" svg:x="10.711cm" svg:y="25.649cm" svg:viewBox="0 0 175 4" draw:points="0,0 175,0 175,4 0,4">
          <text:p/>
        </draw:polygon>
        <draw:polygon draw:style-name="gr145" draw:text-style-name="P145" draw:layer="layout" svg:width="0.174cm" svg:height="0.002cm" svg:x="10.711cm" svg:y="25.652cm" svg:viewBox="0 0 175 3" draw:points="0,0 175,0 175,3 0,3">
          <text:p/>
        </draw:polygon>
        <draw:polygon draw:style-name="gr146" draw:text-style-name="P146" draw:layer="layout" svg:width="0.174cm" svg:height="0.004cm" svg:x="10.711cm" svg:y="25.654cm" svg:viewBox="0 0 175 5" draw:points="0,0 175,0 175,5 0,5">
          <text:p/>
        </draw:polygon>
        <draw:polygon draw:style-name="gr146" draw:text-style-name="P146" draw:layer="layout" svg:width="0.174cm" svg:height="0.003cm" svg:x="10.711cm" svg:y="25.657cm" svg:viewBox="0 0 175 4" draw:points="0,0 175,0 175,4 0,4">
          <text:p/>
        </draw:polygon>
        <draw:polygon draw:style-name="gr147" draw:text-style-name="P147" draw:layer="layout" svg:width="0.174cm" svg:height="0.004cm" svg:x="10.711cm" svg:y="25.66cm" svg:viewBox="0 0 175 5" draw:points="0,0 175,0 175,5 0,5">
          <text:p/>
        </draw:polygon>
        <draw:frame draw:style-name="gr183" draw:text-style-name="P182" draw:layer="layout" svg:width="1.501cm" svg:height="0.433cm" svg:x="9.078cm" svg:y="25.34cm">
          <draw:text-box>
            <text:p text:style-name="P1"><text:span text:style-name="T4">CP</text:span><text:span text:style-name="T4">U-</text:span><text:span text:style-name="T4">mu</text:span><text:span text:style-name="T4">lti</text:span></text:p>
          </draw:text-box>
        </draw:frame>
        <draw:polygon draw:style-name="gr152" draw:text-style-name="P152" draw:layer="layout" svg:width="0.175cm" svg:height="0.006cm" svg:x="12.987cm" svg:y="25.488cm" svg:viewBox="0 0 176 7" draw:points="0,0 176,0 176,7 0,7">
          <text:p/>
        </draw:polygon>
        <draw:polygon draw:style-name="gr153" draw:text-style-name="P153" draw:layer="layout" svg:width="0.175cm" svg:height="0.005cm" svg:x="12.987cm" svg:y="25.494cm" svg:viewBox="0 0 176 6" draw:points="0,0 176,0 176,6 0,6">
          <text:p/>
        </draw:polygon>
        <draw:polygon draw:style-name="gr154" draw:text-style-name="P154" draw:layer="layout" svg:width="0.175cm" svg:height="0.006cm" svg:x="12.987cm" svg:y="25.499cm" svg:viewBox="0 0 176 7" draw:points="0,0 176,0 176,7 0,7">
          <text:p/>
        </draw:polygon>
        <draw:polygon draw:style-name="gr154" draw:text-style-name="P154" draw:layer="layout" svg:width="0.175cm" svg:height="0.005cm" svg:x="12.987cm" svg:y="25.505cm" svg:viewBox="0 0 176 6" draw:points="0,0 176,0 176,6 0,6">
          <text:p/>
        </draw:polygon>
        <draw:polygon draw:style-name="gr155" draw:text-style-name="P155" draw:layer="layout" svg:width="0.175cm" svg:height="0.006cm" svg:x="12.987cm" svg:y="25.51cm" svg:viewBox="0 0 176 7" draw:points="0,0 176,0 176,7 0,7">
          <text:p/>
        </draw:polygon>
        <draw:polygon draw:style-name="gr155" draw:text-style-name="P155" draw:layer="layout" svg:width="0.175cm" svg:height="0.005cm" svg:x="12.987cm" svg:y="25.516cm" svg:viewBox="0 0 176 6" draw:points="0,0 176,0 176,6 0,6">
          <text:p/>
        </draw:polygon>
        <draw:polygon draw:style-name="gr156" draw:text-style-name="P156" draw:layer="layout" svg:width="0.175cm" svg:height="0.005cm" svg:x="12.987cm" svg:y="25.521cm" svg:viewBox="0 0 176 6" draw:points="0,0 176,0 176,6 0,6">
          <text:p/>
        </draw:polygon>
        <draw:polygon draw:style-name="gr157" draw:text-style-name="P157" draw:layer="layout" svg:width="0.175cm" svg:height="0.006cm" svg:x="12.987cm" svg:y="25.526cm" svg:viewBox="0 0 176 7" draw:points="0,0 176,0 176,7 0,7">
          <text:p/>
        </draw:polygon>
        <draw:polygon draw:style-name="gr157" draw:text-style-name="P157" draw:layer="layout" svg:width="0.175cm" svg:height="0.005cm" svg:x="12.987cm" svg:y="25.532cm" svg:viewBox="0 0 176 6" draw:points="0,0 176,0 176,6 0,6">
          <text:p/>
        </draw:polygon>
        <draw:polygon draw:style-name="gr158" draw:text-style-name="P158" draw:layer="layout" svg:width="0.175cm" svg:height="0.007cm" svg:x="12.987cm" svg:y="25.537cm" svg:viewBox="0 0 176 8" draw:points="0,0 176,0 176,8 0,8">
          <text:p/>
        </draw:polygon>
        <draw:polygon draw:style-name="gr159" draw:text-style-name="P159" draw:layer="layout" svg:width="0.175cm" svg:height="0.005cm" svg:x="12.987cm" svg:y="25.543cm" svg:viewBox="0 0 176 6" draw:points="0,0 176,0 176,6 0,6">
          <text:p/>
        </draw:polygon>
        <draw:polygon draw:style-name="gr159" draw:text-style-name="P159" draw:layer="layout" svg:width="0.175cm" svg:height="0.006cm" svg:x="12.987cm" svg:y="25.548cm" svg:viewBox="0 0 176 7" draw:points="0,0 176,0 176,7 0,7">
          <text:p/>
        </draw:polygon>
        <draw:polygon draw:style-name="gr160" draw:text-style-name="P160" draw:layer="layout" svg:width="0.175cm" svg:height="0.005cm" svg:x="12.987cm" svg:y="25.554cm" svg:viewBox="0 0 176 6" draw:points="0,0 176,0 176,6 0,6">
          <text:p/>
        </draw:polygon>
        <draw:polygon draw:style-name="gr160" draw:text-style-name="P160" draw:layer="layout" svg:width="0.175cm" svg:height="0.006cm" svg:x="12.987cm" svg:y="25.559cm" svg:viewBox="0 0 176 7" draw:points="0,0 176,0 176,7 0,7">
          <text:p/>
        </draw:polygon>
        <draw:polygon draw:style-name="gr161" draw:text-style-name="P161" draw:layer="layout" svg:width="0.175cm" svg:height="0.005cm" svg:x="12.987cm" svg:y="25.565cm" svg:viewBox="0 0 176 6" draw:points="0,0 176,0 176,6 0,6">
          <text:p/>
        </draw:polygon>
        <draw:polygon draw:style-name="gr162" draw:text-style-name="P162" draw:layer="layout" svg:width="0.175cm" svg:height="0.005cm" svg:x="12.987cm" svg:y="25.57cm" svg:viewBox="0 0 176 6" draw:points="0,0 176,0 176,6 0,6">
          <text:p/>
        </draw:polygon>
        <draw:polygon draw:style-name="gr162" draw:text-style-name="P162" draw:layer="layout" svg:width="0.175cm" svg:height="0.003cm" svg:x="12.987cm" svg:y="25.575cm" svg:viewBox="0 0 176 4" draw:points="0,0 176,0 176,4 0,4">
          <text:p/>
        </draw:polygon>
        <draw:polygon draw:style-name="gr163" draw:text-style-name="P163" draw:layer="layout" svg:width="0.175cm" svg:height="0.004cm" svg:x="12.987cm" svg:y="25.578cm" svg:viewBox="0 0 176 5" draw:points="0,0 176,0 176,5 0,5">
          <text:p/>
        </draw:polygon>
        <draw:polygon draw:style-name="gr163" draw:text-style-name="P163" draw:layer="layout" svg:width="0.175cm" svg:height="0.003cm" svg:x="12.987cm" svg:y="25.581cm" svg:viewBox="0 0 176 4" draw:points="0,0 176,0 176,4 0,4">
          <text:p/>
        </draw:polygon>
        <draw:polygon draw:style-name="gr164" draw:text-style-name="P164" draw:layer="layout" svg:width="0.175cm" svg:height="0.002cm" svg:x="12.987cm" svg:y="25.584cm" svg:viewBox="0 0 176 3" draw:points="0,0 176,0 176,3 0,3">
          <text:p/>
        </draw:polygon>
        <draw:polygon draw:style-name="gr165" draw:text-style-name="P165" draw:layer="layout" svg:width="0.175cm" svg:height="0.004cm" svg:x="12.987cm" svg:y="25.586cm" svg:viewBox="0 0 176 5" draw:points="0,0 176,0 176,5 0,5">
          <text:p/>
        </draw:polygon>
        <draw:polygon draw:style-name="gr165" draw:text-style-name="P165" draw:layer="layout" svg:width="0.175cm" svg:height="0.003cm" svg:x="12.987cm" svg:y="25.589cm" svg:viewBox="0 0 176 4" draw:points="0,0 176,0 176,4 0,4">
          <text:p/>
        </draw:polygon>
        <draw:polygon draw:style-name="gr166" draw:text-style-name="P166" draw:layer="layout" svg:width="0.175cm" svg:height="0.004cm" svg:x="12.987cm" svg:y="25.592cm" svg:viewBox="0 0 176 5" draw:points="0,0 176,0 176,5 0,5">
          <text:p/>
        </draw:polygon>
        <draw:polygon draw:style-name="gr166" draw:text-style-name="P166" draw:layer="layout" svg:width="0.175cm" svg:height="0.002cm" svg:x="12.987cm" svg:y="25.595cm" svg:viewBox="0 0 176 3" draw:points="0,0 176,0 176,3 0,3">
          <text:p/>
        </draw:polygon>
        <draw:polygon draw:style-name="gr167" draw:text-style-name="P167" draw:layer="layout" svg:width="0.175cm" svg:height="0.003cm" svg:x="12.987cm" svg:y="25.597cm" svg:viewBox="0 0 176 4" draw:points="0,0 176,0 176,4 0,4">
          <text:p/>
        </draw:polygon>
        <draw:polygon draw:style-name="gr168" draw:text-style-name="P168" draw:layer="layout" svg:width="0.175cm" svg:height="0.004cm" svg:x="12.987cm" svg:y="25.6cm" svg:viewBox="0 0 176 5" draw:points="0,0 176,0 176,5 0,5">
          <text:p/>
        </draw:polygon>
        <draw:polygon draw:style-name="gr168" draw:text-style-name="P168" draw:layer="layout" svg:width="0.175cm" svg:height="0.002cm" svg:x="12.987cm" svg:y="25.603cm" svg:viewBox="0 0 176 3" draw:points="0,0 176,0 176,3 0,3">
          <text:p/>
        </draw:polygon>
        <draw:polygon draw:style-name="gr169" draw:text-style-name="P169" draw:layer="layout" svg:width="0.175cm" svg:height="0.003cm" svg:x="12.987cm" svg:y="25.605cm" svg:viewBox="0 0 176 4" draw:points="0,0 176,0 176,4 0,4">
          <text:p/>
        </draw:polygon>
        <draw:polygon draw:style-name="gr169" draw:text-style-name="P169" draw:layer="layout" svg:width="0.175cm" svg:height="0.004cm" svg:x="12.987cm" svg:y="25.608cm" svg:viewBox="0 0 176 5" draw:points="0,0 176,0 176,5 0,5">
          <text:p/>
        </draw:polygon>
        <draw:polygon draw:style-name="gr170" draw:text-style-name="P170" draw:layer="layout" svg:width="0.175cm" svg:height="0.003cm" svg:x="12.987cm" svg:y="25.611cm" svg:viewBox="0 0 176 4" draw:points="0,0 176,0 176,4 0,4">
          <text:p/>
        </draw:polygon>
        <draw:polygon draw:style-name="gr171" draw:text-style-name="P171" draw:layer="layout" svg:width="0.175cm" svg:height="0.002cm" svg:x="12.987cm" svg:y="25.614cm" svg:viewBox="0 0 176 3" draw:points="0,0 176,0 176,3 0,3">
          <text:p/>
        </draw:polygon>
        <draw:polygon draw:style-name="gr171" draw:text-style-name="P171" draw:layer="layout" svg:width="0.175cm" svg:height="0.004cm" svg:x="12.987cm" svg:y="25.616cm" svg:viewBox="0 0 176 5" draw:points="0,0 176,0 176,5 0,5">
          <text:p/>
        </draw:polygon>
        <draw:polygon draw:style-name="gr172" draw:text-style-name="P172" draw:layer="layout" svg:width="0.175cm" svg:height="0.003cm" svg:x="12.987cm" svg:y="25.619cm" svg:viewBox="0 0 176 4" draw:points="0,0 176,0 176,4 0,4">
          <text:p/>
        </draw:polygon>
        <draw:polygon draw:style-name="gr172" draw:text-style-name="P172" draw:layer="layout" svg:width="0.175cm" svg:height="0.004cm" svg:x="12.987cm" svg:y="25.622cm" svg:viewBox="0 0 176 5" draw:points="0,0 176,0 176,5 0,5">
          <text:p/>
        </draw:polygon>
        <draw:polygon draw:style-name="gr173" draw:text-style-name="P173" draw:layer="layout" svg:width="0.175cm" svg:height="0.002cm" svg:x="12.987cm" svg:y="25.625cm" svg:viewBox="0 0 176 3" draw:points="0,0 176,0 176,3 0,3">
          <text:p/>
        </draw:polygon>
        <draw:polygon draw:style-name="gr174" draw:text-style-name="P174" draw:layer="layout" svg:width="0.175cm" svg:height="0.003cm" svg:x="12.987cm" svg:y="25.627cm" svg:viewBox="0 0 176 4" draw:points="0,0 176,0 176,4 0,4">
          <text:p/>
        </draw:polygon>
        <draw:polygon draw:style-name="gr174" draw:text-style-name="P174" draw:layer="layout" svg:width="0.175cm" svg:height="0.004cm" svg:x="12.987cm" svg:y="25.63cm" svg:viewBox="0 0 176 5" draw:points="0,0 176,0 176,5 0,5">
          <text:p/>
        </draw:polygon>
        <draw:polygon draw:style-name="gr175" draw:text-style-name="P175" draw:layer="layout" svg:width="0.175cm" svg:height="0.002cm" svg:x="12.987cm" svg:y="25.633cm" svg:viewBox="0 0 176 3" draw:points="0,0 176,0 176,3 0,3">
          <text:p/>
        </draw:polygon>
        <draw:polygon draw:style-name="gr175" draw:text-style-name="P175" draw:layer="layout" svg:width="0.175cm" svg:height="0.003cm" svg:x="12.987cm" svg:y="25.635cm" svg:viewBox="0 0 176 4" draw:points="0,0 176,0 176,4 0,4">
          <text:p/>
        </draw:polygon>
        <draw:polygon draw:style-name="gr176" draw:text-style-name="P176" draw:layer="layout" svg:width="0.175cm" svg:height="0.004cm" svg:x="12.987cm" svg:y="25.638cm" svg:viewBox="0 0 176 5" draw:points="0,0 176,0 176,5 0,5">
          <text:p/>
        </draw:polygon>
        <draw:polygon draw:style-name="gr177" draw:text-style-name="P177" draw:layer="layout" svg:width="0.175cm" svg:height="0.003cm" svg:x="12.987cm" svg:y="25.641cm" svg:viewBox="0 0 176 4" draw:points="0,0 176,0 176,4 0,4">
          <text:p/>
        </draw:polygon>
        <draw:polygon draw:style-name="gr177" draw:text-style-name="P177" draw:layer="layout" svg:width="0.175cm" svg:height="0.002cm" svg:x="12.987cm" svg:y="25.644cm" svg:viewBox="0 0 176 3" draw:points="0,0 176,0 176,3 0,3">
          <text:p/>
        </draw:polygon>
        <draw:polygon draw:style-name="gr178" draw:text-style-name="P178" draw:layer="layout" svg:width="0.175cm" svg:height="0.004cm" svg:x="12.987cm" svg:y="25.646cm" svg:viewBox="0 0 176 5" draw:points="0,0 176,0 176,5 0,5">
          <text:p/>
        </draw:polygon>
        <draw:polygon draw:style-name="gr178" draw:text-style-name="P178" draw:layer="layout" svg:width="0.175cm" svg:height="0.003cm" svg:x="12.987cm" svg:y="25.649cm" svg:viewBox="0 0 176 4" draw:points="0,0 176,0 176,4 0,4">
          <text:p/>
        </draw:polygon>
        <draw:polygon draw:style-name="gr179" draw:text-style-name="P179" draw:layer="layout" svg:width="0.175cm" svg:height="0.002cm" svg:x="12.987cm" svg:y="25.652cm" svg:viewBox="0 0 176 3" draw:points="0,0 176,0 176,3 0,3">
          <text:p/>
        </draw:polygon>
        <draw:polygon draw:style-name="gr180" draw:text-style-name="P180" draw:layer="layout" svg:width="0.175cm" svg:height="0.004cm" svg:x="12.987cm" svg:y="25.654cm" svg:viewBox="0 0 176 5" draw:points="0,0 176,0 176,5 0,5">
          <text:p/>
        </draw:polygon>
        <draw:polygon draw:style-name="gr180" draw:text-style-name="P180" draw:layer="layout" svg:width="0.175cm" svg:height="0.003cm" svg:x="12.987cm" svg:y="25.657cm" svg:viewBox="0 0 176 4" draw:points="0,0 176,0 176,4 0,4">
          <text:p/>
        </draw:polygon>
        <draw:polygon draw:style-name="gr181" draw:text-style-name="P181" draw:layer="layout" svg:width="0.175cm" svg:height="0.004cm" svg:x="12.987cm" svg:y="25.66cm" svg:viewBox="0 0 176 5" draw:points="0,0 176,0 176,5 0,5">
          <text:p/>
        </draw:polygon>
        <draw:frame draw:style-name="gr183" draw:text-style-name="P182" draw:layer="layout" svg:width="1.951cm" svg:height="0.433cm" svg:x="10.966cm" svg:y="25.34cm">
          <draw:text-box>
            <text:p text:style-name="P1"><text:span text:style-name="T4">CPU-onecore</text:span></text:p>
          </draw:text-box>
        </draw:frame>
        <draw:polygon draw:style-name="gr4" draw:text-style-name="P5" draw:layer="layout" svg:width="15.241cm" svg:height="8.89cm" svg:x="3.631cm" svg:y="17.195cm" svg:viewBox="0 0 15242 8891" draw:points="0,0 15242,0 15242,8891 0,8891">
          <text:p/>
        </draw:polygon>
        <draw:frame draw:style-name="gr183" draw:text-style-name="P182" draw:layer="layout" svg:width="0.657cm" svg:height="0.433cm" svg:x="13.244cm" svg:y="25.34cm">
          <draw:text-box>
            <text:p text:style-name="P1"><text:span text:style-name="T4">GPU</text:span></text:p>
          </draw:text-box>
        </draw:frame>
      </draw:page>
      <draw:page draw:name="page3" draw:style-name="dp1" draw:master-page-name="master-page3">
        <draw:frame draw:style-name="gr1" draw:text-style-name="P184" draw:layer="layout" svg:width="13.089cm" svg:height="0.624cm" svg:x="4.676cm" svg:y="2.017cm">
          <draw:text-box>
            <text:p text:style-name="P183"><text:span text:style-name="T3">В</text:span><text:span text:style-name="T3">ы</text:span><text:span text:style-name="T3">по</text:span><text:span text:style-name="T3">лн</text:span><text:span text:style-name="T3">ен</text:span><text:span text:style-name="T3">ие </text:span><text:span text:style-name="T3">на </text:span><text:span text:style-name="T2">G</text:span><text:span text:style-name="T2">P</text:span><text:span text:style-name="T2">U </text:span><text:span text:style-name="T3">(о</text:span><text:span text:style-name="T3">пт</text:span><text:span text:style-name="T3">и</text:span><text:span text:style-name="T3">м</text:span><text:span text:style-name="T3">из</text:span><text:span text:style-name="T3">ир</text:span><text:span text:style-name="T3">ов</text:span><text:span text:style-name="T3">ан</text:span><text:span text:style-name="T3">н</text:span><text:span text:style-name="T3">ы</text:span><text:span text:style-name="T3">й </text:span><text:span text:style-name="T3">ва</text:span><text:span text:style-name="T3">ри</text:span><text:span text:style-name="T3">ан</text:span><text:span text:style-name="T3">т) </text:span></text:p>
          </draw:text-box>
        </draw:frame>
        <draw:frame draw:style-name="gr1" draw:text-style-name="P184" draw:layer="layout" svg:width="3.253cm" svg:height="0.624cm" svg:x="3.495cm" svg:y="3.022cm">
          <draw:text-box>
            <text:p text:style-name="P183"><text:span text:style-name="T1">Размер сетки </text:span></text:p>
          </draw:text-box>
        </draw:frame>
        <draw:frame draw:style-name="gr1" draw:text-style-name="P184" draw:layer="layout" svg:width="1.652cm" svg:height="0.624cm" svg:x="8.425cm" svg:y="3.022cm">
          <draw:text-box>
            <text:p text:style-name="P183"><text:span text:style-name="T1">Время </text:span></text:p>
          </draw:text-box>
        </draw:frame>
        <draw:frame draw:style-name="gr1" draw:text-style-name="P184" draw:layer="layout" svg:width="3.04cm" svg:height="0.624cm" svg:x="7.714cm" svg:y="3.669cm">
          <draw:text-box>
            <text:p text:style-name="P183"><text:span text:style-name="T1">выполнения </text:span></text:p>
          </draw:text-box>
        </draw:frame>
        <draw:frame draw:style-name="gr1" draw:text-style-name="P184" draw:layer="layout" svg:width="2.369cm" svg:height="0.624cm" svg:x="12.187cm" svg:y="3.022cm">
          <draw:text-box>
            <text:p text:style-name="P183"><text:span text:style-name="T1">Точность </text:span></text:p>
          </draw:text-box>
        </draw:frame>
        <draw:frame draw:style-name="gr1" draw:text-style-name="P184" draw:layer="layout" svg:width="2.936cm" svg:height="0.624cm" svg:x="16.037cm" svg:y="3.022cm">
          <draw:text-box>
            <text:p text:style-name="P183"><text:span text:style-name="T1">Количество </text:span></text:p>
          </draw:text-box>
        </draw:frame>
        <draw:polygon draw:style-name="gr2" draw:text-style-name="P3" draw:layer="layout" svg:width="0.013cm" svg:height="0.012cm" svg:x="2.998cm" svg:y="2.986cm" svg:viewBox="0 0 14 13" draw:points="0,0 14,0 14,13 0,13">
          <text:p/>
        </draw:polygon>
        <draw:polygon draw:style-name="gr2" draw:text-style-name="P3" draw:layer="layout" svg:width="0.013cm" svg:height="0.012cm" svg:x="2.998cm" svg:y="2.986cm" svg:viewBox="0 0 14 13" draw:points="0,0 14,0 14,13 0,13">
          <text:p/>
        </draw:polygon>
        <draw:polygon draw:style-name="gr2" draw:text-style-name="P3" draw:layer="layout" svg:width="4.105cm" svg:height="0.012cm" svg:x="3.011cm" svg:y="2.986cm" svg:viewBox="0 0 4106 13" draw:points="0,0 4106,0 4106,13 0,13">
          <text:p/>
        </draw:polygon>
        <draw:polygon draw:style-name="gr2" draw:text-style-name="P3" draw:layer="layout" svg:width="0.012cm" svg:height="0.012cm" svg:x="7.116cm" svg:y="2.986cm" svg:viewBox="0 0 13 13" draw:points="0,0 13,0 13,13 0,13">
          <text:p/>
        </draw:polygon>
        <draw:polygon draw:style-name="gr2" draw:text-style-name="P3" draw:layer="layout" svg:width="4.118cm" svg:height="0.012cm" svg:x="7.128cm" svg:y="2.986cm" svg:viewBox="0 0 4119 13" draw:points="0,0 4119,0 4119,13 0,13">
          <text:p/>
        </draw:polygon>
        <draw:polygon draw:style-name="gr2" draw:text-style-name="P3" draw:layer="layout" svg:width="0.012cm" svg:height="0.012cm" svg:x="11.246cm" svg:y="2.986cm" svg:viewBox="0 0 13 13" draw:points="0,0 13,0 13,13 0,13">
          <text:p/>
        </draw:polygon>
        <draw:polygon draw:style-name="gr2" draw:text-style-name="P3" draw:layer="layout" svg:width="4.105cm" svg:height="0.012cm" svg:x="11.258cm" svg:y="2.986cm" svg:viewBox="0 0 4106 13" draw:points="0,0 4106,0 4106,13 0,13">
          <text:p/>
        </draw:polygon>
        <draw:polygon draw:style-name="gr2" draw:text-style-name="P3" draw:layer="layout" svg:width="0.013cm" svg:height="0.012cm" svg:x="15.363cm" svg:y="2.986cm" svg:viewBox="0 0 14 13" draw:points="0,0 14,0 14,13 0,13">
          <text:p/>
        </draw:polygon>
        <draw:polygon draw:style-name="gr2" draw:text-style-name="P3" draw:layer="layout" svg:width="4.117cm" svg:height="0.012cm" svg:x="15.376cm" svg:y="2.986cm" svg:viewBox="0 0 4118 13" draw:points="0,0 4118,0 4118,13 0,13">
          <text:p/>
        </draw:polygon>
        <draw:polygon draw:style-name="gr2" draw:text-style-name="P3" draw:layer="layout" svg:width="0.014cm" svg:height="0.012cm" svg:x="19.493cm" svg:y="2.986cm" svg:viewBox="0 0 15 13" draw:points="0,0 15,0 15,13 0,13">
          <text:p/>
        </draw:polygon>
        <draw:polygon draw:style-name="gr2" draw:text-style-name="P3" draw:layer="layout" svg:width="0.014cm" svg:height="0.012cm" svg:x="19.493cm" svg:y="2.986cm" svg:viewBox="0 0 15 13" draw:points="0,0 15,0 15,13 0,13">
          <text:p/>
        </draw:polygon>
        <draw:polygon draw:style-name="gr2" draw:text-style-name="P3" draw:layer="layout" svg:width="0.013cm" svg:height="1.296cm" svg:x="2.998cm" svg:y="2.998cm" svg:viewBox="0 0 14 1297" draw:points="0,0 14,0 14,1297 0,1297">
          <text:p/>
        </draw:polygon>
        <draw:polygon draw:style-name="gr2" draw:text-style-name="P3" draw:layer="layout" svg:width="0.012cm" svg:height="1.296cm" svg:x="7.116cm" svg:y="2.998cm" svg:viewBox="0 0 13 1297" draw:points="0,0 13,0 13,1297 0,1297">
          <text:p/>
        </draw:polygon>
        <draw:polygon draw:style-name="gr2" draw:text-style-name="P3" draw:layer="layout" svg:width="0.012cm" svg:height="1.296cm" svg:x="11.246cm" svg:y="2.998cm" svg:viewBox="0 0 13 1297" draw:points="0,0 13,0 13,1297 0,1297">
          <text:p/>
        </draw:polygon>
        <draw:polygon draw:style-name="gr2" draw:text-style-name="P3" draw:layer="layout" svg:width="0.013cm" svg:height="1.296cm" svg:x="15.363cm" svg:y="2.998cm" svg:viewBox="0 0 14 1297" draw:points="0,0 14,0 14,1297 0,1297">
          <text:p/>
        </draw:polygon>
        <draw:polygon draw:style-name="gr2" draw:text-style-name="P3" draw:layer="layout" svg:width="0.014cm" svg:height="1.296cm" svg:x="19.493cm" svg:y="2.998cm" svg:viewBox="0 0 15 1297" draw:points="0,0 15,0 15,1297 0,1297">
          <text:p/>
        </draw:polygon>
        <draw:frame draw:style-name="gr1" draw:text-style-name="P184" draw:layer="layout" svg:width="2.358cm" svg:height="0.624cm" svg:x="16.317cm" svg:y="3.669cm">
          <draw:text-box>
            <text:p text:style-name="P183"><text:span text:style-name="T1">итераций </text:span></text:p>
          </draw:text-box>
        </draw:frame>
        <draw:frame draw:style-name="gr1" draw:text-style-name="P184" draw:layer="layout" svg:width="2.098cm" svg:height="0.624cm" svg:x="4.079cm" svg:y="4.343cm">
          <draw:text-box>
            <text:p text:style-name="P183"><text:span text:style-name="T2">128x128 </text:span></text:p>
          </draw:text-box>
        </draw:frame>
        <draw:frame draw:style-name="gr1" draw:text-style-name="P184" draw:layer="layout" svg:width="2.237cm" svg:height="0.624cm" svg:x="8.12cm" svg:y="4.343cm">
          <draw:text-box>
            <text:p text:style-name="P183"><text:span text:style-name="T2">0.488777 </text:span></text:p>
          </draw:text-box>
        </draw:frame>
        <draw:frame draw:style-name="gr1" draw:text-style-name="P184" draw:layer="layout" svg:width="2.951cm" svg:height="0.624cm" svg:x="11.895cm" svg:y="4.343cm">
          <draw:text-box>
            <text:p text:style-name="P183"><text:span text:style-name="T2">7.53014e-07 </text:span></text:p>
          </draw:text-box>
        </draw:frame>
        <draw:polygon draw:style-name="gr2" draw:text-style-name="P3" draw:layer="layout" svg:width="0.013cm" svg:height="0.013cm" svg:x="2.998cm" svg:y="4.294cm" svg:viewBox="0 0 14 14" draw:points="0,0 14,0 14,14 0,14">
          <text:p/>
        </draw:polygon>
        <draw:polygon draw:style-name="gr2" draw:text-style-name="P3" draw:layer="layout" svg:width="4.105cm" svg:height="0.013cm" svg:x="3.011cm" svg:y="4.294cm" svg:viewBox="0 0 4106 14" draw:points="0,0 4106,0 4106,14 0,14">
          <text:p/>
        </draw:polygon>
        <draw:polygon draw:style-name="gr2" draw:text-style-name="P3" draw:layer="layout" svg:width="0.012cm" svg:height="0.013cm" svg:x="7.116cm" svg:y="4.294cm" svg:viewBox="0 0 13 14" draw:points="0,0 13,0 13,14 0,14">
          <text:p/>
        </draw:polygon>
        <draw:polygon draw:style-name="gr2" draw:text-style-name="P3" draw:layer="layout" svg:width="4.118cm" svg:height="0.013cm" svg:x="7.128cm" svg:y="4.294cm" svg:viewBox="0 0 4119 14" draw:points="0,0 4119,0 4119,14 0,14">
          <text:p/>
        </draw:polygon>
        <draw:polygon draw:style-name="gr2" draw:text-style-name="P3" draw:layer="layout" svg:width="0.012cm" svg:height="0.013cm" svg:x="11.246cm" svg:y="4.294cm" svg:viewBox="0 0 13 14" draw:points="0,0 13,0 13,14 0,14">
          <text:p/>
        </draw:polygon>
        <draw:polygon draw:style-name="gr2" draw:text-style-name="P3" draw:layer="layout" svg:width="4.105cm" svg:height="0.013cm" svg:x="11.258cm" svg:y="4.294cm" svg:viewBox="0 0 4106 14" draw:points="0,0 4106,0 4106,14 0,14">
          <text:p/>
        </draw:polygon>
        <draw:polygon draw:style-name="gr2" draw:text-style-name="P3" draw:layer="layout" svg:width="0.013cm" svg:height="0.013cm" svg:x="15.363cm" svg:y="4.294cm" svg:viewBox="0 0 14 14" draw:points="0,0 14,0 14,14 0,14">
          <text:p/>
        </draw:polygon>
        <draw:polygon draw:style-name="gr2" draw:text-style-name="P3" draw:layer="layout" svg:width="4.117cm" svg:height="0.013cm" svg:x="15.376cm" svg:y="4.294cm" svg:viewBox="0 0 4118 14" draw:points="0,0 4118,0 4118,14 0,14">
          <text:p/>
        </draw:polygon>
        <draw:polygon draw:style-name="gr2" draw:text-style-name="P3" draw:layer="layout" svg:width="0.014cm" svg:height="0.013cm" svg:x="19.493cm" svg:y="4.294cm" svg:viewBox="0 0 15 14" draw:points="0,0 15,0 15,14 0,14">
          <text:p/>
        </draw:polygon>
        <draw:polygon draw:style-name="gr2" draw:text-style-name="P3" draw:layer="layout" svg:width="0.013cm" svg:height="0.662cm" svg:x="2.998cm" svg:y="4.306cm" svg:viewBox="0 0 14 663" draw:points="0,0 14,0 14,663 0,663">
          <text:p/>
        </draw:polygon>
        <draw:polygon draw:style-name="gr2" draw:text-style-name="P3" draw:layer="layout" svg:width="0.012cm" svg:height="0.662cm" svg:x="7.116cm" svg:y="4.306cm" svg:viewBox="0 0 13 663" draw:points="0,0 13,0 13,663 0,663">
          <text:p/>
        </draw:polygon>
        <draw:polygon draw:style-name="gr2" draw:text-style-name="P3" draw:layer="layout" svg:width="0.012cm" svg:height="0.662cm" svg:x="11.246cm" svg:y="4.306cm" svg:viewBox="0 0 13 663" draw:points="0,0 13,0 13,663 0,663">
          <text:p/>
        </draw:polygon>
        <draw:polygon draw:style-name="gr2" draw:text-style-name="P3" draw:layer="layout" svg:width="0.013cm" svg:height="0.662cm" svg:x="15.363cm" svg:y="4.306cm" svg:viewBox="0 0 14 663" draw:points="0,0 14,0 14,663 0,663">
          <text:p/>
        </draw:polygon>
        <draw:polygon draw:style-name="gr2" draw:text-style-name="P3" draw:layer="layout" svg:width="0.014cm" svg:height="0.662cm" svg:x="19.493cm" svg:y="4.306cm" svg:viewBox="0 0 15 663" draw:points="0,0 15,0 15,663 0,663">
          <text:p/>
        </draw:polygon>
        <draw:frame draw:style-name="gr1" draw:text-style-name="P184" draw:layer="layout" svg:width="2.377cm" svg:height="0.624cm" svg:x="16.304cm" svg:y="4.343cm">
          <draw:text-box>
            <text:p text:style-name="P183"><text:span text:style-name="T2">1.000.000 </text:span></text:p>
          </draw:text-box>
        </draw:frame>
        <draw:frame draw:style-name="gr1" draw:text-style-name="P184" draw:layer="layout" svg:width="2.098cm" svg:height="0.624cm" svg:x="4.079cm" svg:y="5.004cm">
          <draw:text-box>
            <text:p text:style-name="P183"><text:span text:style-name="T2">256x256 </text:span></text:p>
          </draw:text-box>
        </draw:frame>
        <draw:frame draw:style-name="gr1" draw:text-style-name="P184" draw:layer="layout" svg:width="1.958cm" svg:height="0.624cm" svg:x="8.273cm" svg:y="5.004cm">
          <draw:text-box>
            <text:p text:style-name="P183"><text:span text:style-name="T2">1.21184 </text:span></text:p>
          </draw:text-box>
        </draw:frame>
        <draw:frame draw:style-name="gr1" draw:text-style-name="P184" draw:layer="layout" svg:width="2.951cm" svg:height="0.624cm" svg:x="11.895cm" svg:y="5.004cm">
          <draw:text-box>
            <text:p text:style-name="P183"><text:span text:style-name="T2">9.91166e-07 </text:span></text:p>
          </draw:text-box>
        </draw:frame>
        <draw:polygon draw:style-name="gr2" draw:text-style-name="P3" draw:layer="layout" svg:width="0.013cm" svg:height="0.012cm" svg:x="2.998cm" svg:y="4.968cm" svg:viewBox="0 0 14 13" draw:points="0,0 14,0 14,13 0,13">
          <text:p/>
        </draw:polygon>
        <draw:polygon draw:style-name="gr2" draw:text-style-name="P3" draw:layer="layout" svg:width="4.105cm" svg:height="0.012cm" svg:x="3.011cm" svg:y="4.968cm" svg:viewBox="0 0 4106 13" draw:points="0,0 4106,0 4106,13 0,13">
          <text:p/>
        </draw:polygon>
        <draw:polygon draw:style-name="gr2" draw:text-style-name="P3" draw:layer="layout" svg:width="0.012cm" svg:height="0.012cm" svg:x="7.116cm" svg:y="4.968cm" svg:viewBox="0 0 13 13" draw:points="0,0 13,0 13,13 0,13">
          <text:p/>
        </draw:polygon>
        <draw:polygon draw:style-name="gr2" draw:text-style-name="P3" draw:layer="layout" svg:width="4.118cm" svg:height="0.012cm" svg:x="7.128cm" svg:y="4.968cm" svg:viewBox="0 0 4119 13" draw:points="0,0 4119,0 4119,13 0,13">
          <text:p/>
        </draw:polygon>
        <draw:polygon draw:style-name="gr2" draw:text-style-name="P3" draw:layer="layout" svg:width="0.012cm" svg:height="0.012cm" svg:x="11.246cm" svg:y="4.968cm" svg:viewBox="0 0 13 13" draw:points="0,0 13,0 13,13 0,13">
          <text:p/>
        </draw:polygon>
        <draw:polygon draw:style-name="gr2" draw:text-style-name="P3" draw:layer="layout" svg:width="4.105cm" svg:height="0.012cm" svg:x="11.258cm" svg:y="4.968cm" svg:viewBox="0 0 4106 13" draw:points="0,0 4106,0 4106,13 0,13">
          <text:p/>
        </draw:polygon>
        <draw:polygon draw:style-name="gr2" draw:text-style-name="P3" draw:layer="layout" svg:width="0.013cm" svg:height="0.012cm" svg:x="15.363cm" svg:y="4.968cm" svg:viewBox="0 0 14 13" draw:points="0,0 14,0 14,13 0,13">
          <text:p/>
        </draw:polygon>
        <draw:polygon draw:style-name="gr2" draw:text-style-name="P3" draw:layer="layout" svg:width="4.117cm" svg:height="0.012cm" svg:x="15.376cm" svg:y="4.968cm" svg:viewBox="0 0 4118 13" draw:points="0,0 4118,0 4118,13 0,13">
          <text:p/>
        </draw:polygon>
        <draw:polygon draw:style-name="gr2" draw:text-style-name="P3" draw:layer="layout" svg:width="0.014cm" svg:height="0.012cm" svg:x="19.493cm" svg:y="4.968cm" svg:viewBox="0 0 15 13" draw:points="0,0 15,0 15,13 0,13">
          <text:p/>
        </draw:polygon>
        <draw:polygon draw:style-name="gr2" draw:text-style-name="P3" draw:layer="layout" svg:width="0.013cm" svg:height="0.648cm" svg:x="2.998cm" svg:y="4.98cm" svg:viewBox="0 0 14 649" draw:points="0,0 14,0 14,649 0,649">
          <text:p/>
        </draw:polygon>
        <draw:polygon draw:style-name="gr2" draw:text-style-name="P3" draw:layer="layout" svg:width="0.012cm" svg:height="0.648cm" svg:x="7.116cm" svg:y="4.98cm" svg:viewBox="0 0 13 649" draw:points="0,0 13,0 13,649 0,649">
          <text:p/>
        </draw:polygon>
        <draw:polygon draw:style-name="gr2" draw:text-style-name="P3" draw:layer="layout" svg:width="0.012cm" svg:height="0.648cm" svg:x="11.246cm" svg:y="4.98cm" svg:viewBox="0 0 13 649" draw:points="0,0 13,0 13,649 0,649">
          <text:p/>
        </draw:polygon>
        <draw:polygon draw:style-name="gr2" draw:text-style-name="P3" draw:layer="layout" svg:width="0.013cm" svg:height="0.648cm" svg:x="15.363cm" svg:y="4.98cm" svg:viewBox="0 0 14 649" draw:points="0,0 14,0 14,649 0,649">
          <text:p/>
        </draw:polygon>
        <draw:polygon draw:style-name="gr2" draw:text-style-name="P3" draw:layer="layout" svg:width="0.014cm" svg:height="0.648cm" svg:x="19.493cm" svg:y="4.98cm" svg:viewBox="0 0 15 649" draw:points="0,0 15,0 15,649 0,649">
          <text:p/>
        </draw:polygon>
        <draw:frame draw:style-name="gr1" draw:text-style-name="P184" draw:layer="layout" svg:width="2.377cm" svg:height="0.624cm" svg:x="16.304cm" svg:y="5.004cm">
          <draw:text-box>
            <text:p text:style-name="P183"><text:span text:style-name="T2">1.000.000 </text:span></text:p>
          </draw:text-box>
        </draw:frame>
        <draw:frame draw:style-name="gr1" draw:text-style-name="P184" draw:layer="layout" svg:width="2.098cm" svg:height="0.624cm" svg:x="4.079cm" svg:y="5.677cm">
          <draw:text-box>
            <text:p text:style-name="P183"><text:span text:style-name="T2">512x512 </text:span></text:p>
          </draw:text-box>
        </draw:frame>
        <draw:frame draw:style-name="gr1" draw:text-style-name="P184" draw:layer="layout" svg:width="1.958cm" svg:height="0.624cm" svg:x="8.273cm" svg:y="5.677cm">
          <draw:text-box>
            <text:p text:style-name="P183"><text:span text:style-name="T2">4.74862 </text:span></text:p>
          </draw:text-box>
        </draw:frame>
        <draw:frame draw:style-name="gr1" draw:text-style-name="P184" draw:layer="layout" svg:width="2.951cm" svg:height="0.624cm" svg:x="11.895cm" svg:y="5.677cm">
          <draw:text-box>
            <text:p text:style-name="P183"><text:span text:style-name="T2">9.92416e-07 </text:span></text:p>
          </draw:text-box>
        </draw:frame>
        <draw:polygon draw:style-name="gr2" draw:text-style-name="P3" draw:layer="layout" svg:width="0.013cm" svg:height="0.013cm" svg:x="2.998cm" svg:y="5.628cm" svg:viewBox="0 0 14 14" draw:points="0,0 14,0 14,14 0,14">
          <text:p/>
        </draw:polygon>
        <draw:polygon draw:style-name="gr2" draw:text-style-name="P3" draw:layer="layout" svg:width="4.105cm" svg:height="0.013cm" svg:x="3.011cm" svg:y="5.628cm" svg:viewBox="0 0 4106 14" draw:points="0,0 4106,0 4106,14 0,14">
          <text:p/>
        </draw:polygon>
        <draw:polygon draw:style-name="gr2" draw:text-style-name="P3" draw:layer="layout" svg:width="0.012cm" svg:height="0.013cm" svg:x="7.116cm" svg:y="5.628cm" svg:viewBox="0 0 13 14" draw:points="0,0 13,0 13,14 0,14">
          <text:p/>
        </draw:polygon>
        <draw:polygon draw:style-name="gr2" draw:text-style-name="P3" draw:layer="layout" svg:width="4.118cm" svg:height="0.013cm" svg:x="7.128cm" svg:y="5.628cm" svg:viewBox="0 0 4119 14" draw:points="0,0 4119,0 4119,14 0,14">
          <text:p/>
        </draw:polygon>
        <draw:polygon draw:style-name="gr2" draw:text-style-name="P3" draw:layer="layout" svg:width="0.012cm" svg:height="0.013cm" svg:x="11.246cm" svg:y="5.628cm" svg:viewBox="0 0 13 14" draw:points="0,0 13,0 13,14 0,14">
          <text:p/>
        </draw:polygon>
        <draw:polygon draw:style-name="gr2" draw:text-style-name="P3" draw:layer="layout" svg:width="4.105cm" svg:height="0.013cm" svg:x="11.258cm" svg:y="5.628cm" svg:viewBox="0 0 4106 14" draw:points="0,0 4106,0 4106,14 0,14">
          <text:p/>
        </draw:polygon>
        <draw:polygon draw:style-name="gr2" draw:text-style-name="P3" draw:layer="layout" svg:width="0.013cm" svg:height="0.013cm" svg:x="15.363cm" svg:y="5.628cm" svg:viewBox="0 0 14 14" draw:points="0,0 14,0 14,14 0,14">
          <text:p/>
        </draw:polygon>
        <draw:polygon draw:style-name="gr2" draw:text-style-name="P3" draw:layer="layout" svg:width="4.117cm" svg:height="0.013cm" svg:x="15.376cm" svg:y="5.628cm" svg:viewBox="0 0 4118 14" draw:points="0,0 4118,0 4118,14 0,14">
          <text:p/>
        </draw:polygon>
        <draw:polygon draw:style-name="gr2" draw:text-style-name="P3" draw:layer="layout" svg:width="0.014cm" svg:height="0.013cm" svg:x="19.493cm" svg:y="5.628cm" svg:viewBox="0 0 15 14" draw:points="0,0 15,0 15,14 0,14">
          <text:p/>
        </draw:polygon>
        <draw:polygon draw:style-name="gr2" draw:text-style-name="P3" draw:layer="layout" svg:width="0.013cm" svg:height="0.66cm" svg:x="2.998cm" svg:y="5.641cm" svg:viewBox="0 0 14 661" draw:points="0,0 14,0 14,661 0,661">
          <text:p/>
        </draw:polygon>
        <draw:polygon draw:style-name="gr2" draw:text-style-name="P3" draw:layer="layout" svg:width="0.012cm" svg:height="0.66cm" svg:x="7.116cm" svg:y="5.641cm" svg:viewBox="0 0 13 661" draw:points="0,0 13,0 13,661 0,661">
          <text:p/>
        </draw:polygon>
        <draw:polygon draw:style-name="gr2" draw:text-style-name="P3" draw:layer="layout" svg:width="0.012cm" svg:height="0.66cm" svg:x="11.246cm" svg:y="5.641cm" svg:viewBox="0 0 13 661" draw:points="0,0 13,0 13,661 0,661">
          <text:p/>
        </draw:polygon>
        <draw:polygon draw:style-name="gr2" draw:text-style-name="P3" draw:layer="layout" svg:width="0.013cm" svg:height="0.66cm" svg:x="15.363cm" svg:y="5.641cm" svg:viewBox="0 0 14 661" draw:points="0,0 14,0 14,661 0,661">
          <text:p/>
        </draw:polygon>
        <draw:polygon draw:style-name="gr2" draw:text-style-name="P3" draw:layer="layout" svg:width="0.014cm" svg:height="0.66cm" svg:x="19.493cm" svg:y="5.641cm" svg:viewBox="0 0 15 661" draw:points="0,0 15,0 15,661 0,661">
          <text:p/>
        </draw:polygon>
        <draw:frame draw:style-name="gr1" draw:text-style-name="P184" draw:layer="layout" svg:width="2.377cm" svg:height="0.624cm" svg:x="16.304cm" svg:y="5.677cm">
          <draw:text-box>
            <text:p text:style-name="P183"><text:span text:style-name="T2">1.000.000 </text:span></text:p>
          </draw:text-box>
        </draw:frame>
        <draw:frame draw:style-name="gr1" draw:text-style-name="P184" draw:layer="layout" svg:width="2.656cm" svg:height="0.624cm" svg:x="3.8cm" svg:y="6.338cm">
          <draw:text-box>
            <text:p text:style-name="P183"><text:span text:style-name="T2">1024x1024 </text:span></text:p>
          </draw:text-box>
        </draw:frame>
        <draw:frame draw:style-name="gr1" draw:text-style-name="P184" draw:layer="layout" svg:width="1.958cm" svg:height="0.624cm" svg:x="8.273cm" svg:y="6.338cm">
          <draw:text-box>
            <text:p text:style-name="P183"><text:span text:style-name="T2">36.6044 </text:span></text:p>
          </draw:text-box>
        </draw:frame>
        <draw:frame draw:style-name="gr1" draw:text-style-name="P184" draw:layer="layout" svg:width="2.951cm" svg:height="0.624cm" svg:x="11.895cm" svg:y="6.338cm">
          <draw:text-box>
            <text:p text:style-name="P183"><text:span text:style-name="T2">1.37575e-06 </text:span></text:p>
          </draw:text-box>
        </draw:frame>
        <draw:polygon draw:style-name="gr2" draw:text-style-name="P3" draw:layer="layout" svg:width="0.013cm" svg:height="0.013cm" svg:x="2.998cm" svg:y="6.301cm" svg:viewBox="0 0 14 14" draw:points="0,0 14,0 14,14 0,14">
          <text:p/>
        </draw:polygon>
        <draw:polygon draw:style-name="gr2" draw:text-style-name="P3" draw:layer="layout" svg:width="4.105cm" svg:height="0.013cm" svg:x="3.011cm" svg:y="6.301cm" svg:viewBox="0 0 4106 14" draw:points="0,0 4106,0 4106,14 0,14">
          <text:p/>
        </draw:polygon>
        <draw:polygon draw:style-name="gr2" draw:text-style-name="P3" draw:layer="layout" svg:width="0.012cm" svg:height="0.013cm" svg:x="7.116cm" svg:y="6.301cm" svg:viewBox="0 0 13 14" draw:points="0,0 13,0 13,14 0,14">
          <text:p/>
        </draw:polygon>
        <draw:polygon draw:style-name="gr2" draw:text-style-name="P3" draw:layer="layout" svg:width="4.118cm" svg:height="0.013cm" svg:x="7.128cm" svg:y="6.301cm" svg:viewBox="0 0 4119 14" draw:points="0,0 4119,0 4119,14 0,14">
          <text:p/>
        </draw:polygon>
        <draw:polygon draw:style-name="gr2" draw:text-style-name="P3" draw:layer="layout" svg:width="0.012cm" svg:height="0.013cm" svg:x="11.246cm" svg:y="6.301cm" svg:viewBox="0 0 13 14" draw:points="0,0 13,0 13,14 0,14">
          <text:p/>
        </draw:polygon>
        <draw:polygon draw:style-name="gr2" draw:text-style-name="P3" draw:layer="layout" svg:width="4.105cm" svg:height="0.013cm" svg:x="11.258cm" svg:y="6.301cm" svg:viewBox="0 0 4106 14" draw:points="0,0 4106,0 4106,14 0,14">
          <text:p/>
        </draw:polygon>
        <draw:polygon draw:style-name="gr2" draw:text-style-name="P3" draw:layer="layout" svg:width="0.013cm" svg:height="0.013cm" svg:x="15.363cm" svg:y="6.301cm" svg:viewBox="0 0 14 14" draw:points="0,0 14,0 14,14 0,14">
          <text:p/>
        </draw:polygon>
        <draw:polygon draw:style-name="gr2" draw:text-style-name="P3" draw:layer="layout" svg:width="4.117cm" svg:height="0.013cm" svg:x="15.376cm" svg:y="6.301cm" svg:viewBox="0 0 4118 14" draw:points="0,0 4118,0 4118,14 0,14">
          <text:p/>
        </draw:polygon>
        <draw:polygon draw:style-name="gr2" draw:text-style-name="P3" draw:layer="layout" svg:width="0.014cm" svg:height="0.013cm" svg:x="19.493cm" svg:y="6.301cm" svg:viewBox="0 0 15 14" draw:points="0,0 15,0 15,14 0,14">
          <text:p/>
        </draw:polygon>
        <draw:polygon draw:style-name="gr2" draw:text-style-name="P3" draw:layer="layout" svg:width="0.013cm" svg:height="0.661cm" svg:x="2.998cm" svg:y="6.314cm" svg:viewBox="0 0 14 662" draw:points="0,0 14,0 14,662 0,662">
          <text:p/>
        </draw:polygon>
        <draw:polygon draw:style-name="gr2" draw:text-style-name="P3" draw:layer="layout" svg:width="0.013cm" svg:height="0.013cm" svg:x="2.998cm" svg:y="6.975cm" svg:viewBox="0 0 14 14" draw:points="0,0 14,0 14,14 0,14">
          <text:p/>
        </draw:polygon>
        <draw:polygon draw:style-name="gr2" draw:text-style-name="P3" draw:layer="layout" svg:width="0.013cm" svg:height="0.013cm" svg:x="2.998cm" svg:y="6.975cm" svg:viewBox="0 0 14 14" draw:points="0,0 14,0 14,14 0,14">
          <text:p/>
        </draw:polygon>
        <draw:polygon draw:style-name="gr2" draw:text-style-name="P3" draw:layer="layout" svg:width="4.105cm" svg:height="0.013cm" svg:x="3.011cm" svg:y="6.975cm" svg:viewBox="0 0 4106 14" draw:points="0,0 4106,0 4106,14 0,14">
          <text:p/>
        </draw:polygon>
        <draw:polygon draw:style-name="gr2" draw:text-style-name="P3" draw:layer="layout" svg:width="0.012cm" svg:height="0.661cm" svg:x="7.116cm" svg:y="6.314cm" svg:viewBox="0 0 13 662" draw:points="0,0 13,0 13,662 0,662">
          <text:p/>
        </draw:polygon>
        <draw:polygon draw:style-name="gr2" draw:text-style-name="P3" draw:layer="layout" svg:width="0.012cm" svg:height="0.013cm" svg:x="7.116cm" svg:y="6.975cm" svg:viewBox="0 0 13 14" draw:points="0,0 13,0 13,14 0,14">
          <text:p/>
        </draw:polygon>
        <draw:polygon draw:style-name="gr2" draw:text-style-name="P3" draw:layer="layout" svg:width="4.118cm" svg:height="0.013cm" svg:x="7.128cm" svg:y="6.975cm" svg:viewBox="0 0 4119 14" draw:points="0,0 4119,0 4119,14 0,14">
          <text:p/>
        </draw:polygon>
        <draw:polygon draw:style-name="gr2" draw:text-style-name="P3" draw:layer="layout" svg:width="0.012cm" svg:height="0.661cm" svg:x="11.246cm" svg:y="6.314cm" svg:viewBox="0 0 13 662" draw:points="0,0 13,0 13,662 0,662">
          <text:p/>
        </draw:polygon>
        <draw:polygon draw:style-name="gr2" draw:text-style-name="P3" draw:layer="layout" svg:width="0.012cm" svg:height="0.013cm" svg:x="11.246cm" svg:y="6.975cm" svg:viewBox="0 0 13 14" draw:points="0,0 13,0 13,14 0,14">
          <text:p/>
        </draw:polygon>
        <draw:polygon draw:style-name="gr2" draw:text-style-name="P3" draw:layer="layout" svg:width="4.105cm" svg:height="0.013cm" svg:x="11.258cm" svg:y="6.975cm" svg:viewBox="0 0 4106 14" draw:points="0,0 4106,0 4106,14 0,14">
          <text:p/>
        </draw:polygon>
        <draw:polygon draw:style-name="gr2" draw:text-style-name="P3" draw:layer="layout" svg:width="0.013cm" svg:height="0.661cm" svg:x="15.363cm" svg:y="6.314cm" svg:viewBox="0 0 14 662" draw:points="0,0 14,0 14,662 0,662">
          <text:p/>
        </draw:polygon>
        <draw:polygon draw:style-name="gr2" draw:text-style-name="P3" draw:layer="layout" svg:width="0.013cm" svg:height="0.013cm" svg:x="15.363cm" svg:y="6.975cm" svg:viewBox="0 0 14 14" draw:points="0,0 14,0 14,14 0,14">
          <text:p/>
        </draw:polygon>
        <draw:polygon draw:style-name="gr2" draw:text-style-name="P3" draw:layer="layout" svg:width="4.117cm" svg:height="0.013cm" svg:x="15.376cm" svg:y="6.975cm" svg:viewBox="0 0 4118 14" draw:points="0,0 4118,0 4118,14 0,14">
          <text:p/>
        </draw:polygon>
        <draw:polygon draw:style-name="gr2" draw:text-style-name="P3" draw:layer="layout" svg:width="0.014cm" svg:height="0.661cm" svg:x="19.493cm" svg:y="6.314cm" svg:viewBox="0 0 15 662" draw:points="0,0 15,0 15,662 0,662">
          <text:p/>
        </draw:polygon>
        <draw:polygon draw:style-name="gr2" draw:text-style-name="P3" draw:layer="layout" svg:width="0.014cm" svg:height="0.013cm" svg:x="19.493cm" svg:y="6.975cm" svg:viewBox="0 0 15 14" draw:points="0,0 15,0 15,14 0,14">
          <text:p/>
        </draw:polygon>
        <draw:polygon draw:style-name="gr2" draw:text-style-name="P3" draw:layer="layout" svg:width="0.014cm" svg:height="0.013cm" svg:x="19.493cm" svg:y="6.975cm" svg:viewBox="0 0 15 14" draw:points="0,0 15,0 15,14 0,14">
          <text:p/>
        </draw:polygon>
        <draw:frame draw:style-name="gr1" draw:text-style-name="P184" draw:layer="layout" svg:width="2.377cm" svg:height="0.624cm" svg:x="16.304cm" svg:y="6.338cm">
          <draw:text-box>
            <text:p text:style-name="P183"><text:span text:style-name="T2">1.000.000 </text:span></text:p>
          </draw:text-box>
        </draw:frame>
        <draw:frame draw:style-name="gr1" draw:text-style-name="P184" draw:layer="layout" svg:width="0.558cm" svg:height="0.624cm" svg:x="11.246cm" svg:y="7.011cm">
          <draw:text-box>
            <text:p text:style-name="P183"><text:span text:style-name="T2"><text:s/></text:span></text:p>
          </draw:text-box>
        </draw:frame>
        <draw:frame draw:style-name="gr1" draw:text-style-name="P184" draw:layer="layout" svg:width="9.139cm" svg:height="0.624cm" svg:x="6.443cm" svg:y="7.989cm">
          <draw:text-box>
            <text:p text:style-name="P183"><text:span text:style-name="T7">Этапы оптимизации на сетке 512x512 </text:span></text:p>
          </draw:text-box>
        </draw:frame>
        <draw:frame draw:style-name="gr1" draw:text-style-name="P184" draw:layer="layout" svg:width="1.302cm" svg:height="0.624cm" svg:x="3.421cm" svg:y="9.021cm">
          <draw:text-box>
            <text:p text:style-name="P183"><text:span text:style-name="T1">Этап </text:span></text:p>
          </draw:text-box>
        </draw:frame>
        <draw:frame draw:style-name="gr1" draw:text-style-name="P184" draw:layer="layout" svg:width="0.675cm" svg:height="0.624cm" svg:x="3.739cm" svg:y="9.67cm">
          <draw:text-box>
            <text:p text:style-name="P183"><text:span text:style-name="T1">№ </text:span></text:p>
          </draw:text-box>
        </draw:frame>
        <draw:frame draw:style-name="gr1" draw:text-style-name="P184" draw:layer="layout" svg:width="1.652cm" svg:height="0.624cm" svg:x="5.684cm" svg:y="9.021cm">
          <draw:text-box>
            <text:p text:style-name="P183"><text:span text:style-name="T1">Время </text:span></text:p>
          </draw:text-box>
        </draw:frame>
        <draw:frame draw:style-name="gr1" draw:text-style-name="P184" draw:layer="layout" svg:width="3.04cm" svg:height="0.624cm" svg:x="4.805cm" svg:y="9.631cm">
          <draw:text-box>
            <text:p text:style-name="P183"><text:span text:style-name="T1">выполнения </text:span></text:p>
          </draw:text-box>
        </draw:frame>
        <draw:polygon draw:style-name="gr2" draw:text-style-name="P3" draw:layer="layout" svg:width="0.013cm" svg:height="0.013cm" svg:x="3.217cm" svg:y="8.985cm" svg:viewBox="0 0 14 14" draw:points="0,0 14,0 14,14 0,14">
          <text:p/>
        </draw:polygon>
        <draw:polygon draw:style-name="gr2" draw:text-style-name="P3" draw:layer="layout" svg:width="0.013cm" svg:height="0.013cm" svg:x="3.217cm" svg:y="8.985cm" svg:viewBox="0 0 14 14" draw:points="0,0 14,0 14,14 0,14">
          <text:p/>
        </draw:polygon>
        <draw:polygon draw:style-name="gr2" draw:text-style-name="P3" draw:layer="layout" svg:width="1.538cm" svg:height="0.013cm" svg:x="3.23cm" svg:y="8.985cm" svg:viewBox="0 0 1539 14" draw:points="0,0 1539,0 1539,14 0,14">
          <text:p/>
        </draw:polygon>
        <draw:polygon draw:style-name="gr2" draw:text-style-name="P3" draw:layer="layout" svg:width="0.012cm" svg:height="0.013cm" svg:x="4.768cm" svg:y="8.985cm" svg:viewBox="0 0 13 14" draw:points="0,0 13,0 13,14 0,14">
          <text:p/>
        </draw:polygon>
        <draw:polygon draw:style-name="gr2" draw:text-style-name="P3" draw:layer="layout" svg:width="3.305cm" svg:height="0.013cm" svg:x="4.78cm" svg:y="8.985cm" svg:viewBox="0 0 3306 14" draw:points="0,0 3306,0 3306,14 0,14">
          <text:p/>
        </draw:polygon>
        <draw:polygon draw:style-name="gr2" draw:text-style-name="P3" draw:layer="layout" svg:width="0.012cm" svg:height="0.013cm" svg:x="7.879cm" svg:y="9.019cm" svg:viewBox="0 0 13 14" draw:points="0,0 13,0 13,14 0,14">
          <text:p/>
        </draw:polygon>
        <draw:polygon draw:style-name="gr2" draw:text-style-name="P3" draw:layer="layout" svg:width="3.012cm" svg:height="0.013cm" svg:x="8.097cm" svg:y="8.985cm" svg:viewBox="0 0 3013 14" draw:points="0,0 3013,0 3013,14 0,14">
          <text:p/>
        </draw:polygon>
        <draw:polygon draw:style-name="gr2" draw:text-style-name="P3" draw:layer="layout" svg:width="8.59cm" svg:height="0.013cm" svg:x="11.122cm" svg:y="8.985cm" svg:viewBox="0 0 8591 14" draw:points="0,0 8591,0 8591,14 0,14">
          <text:p/>
        </draw:polygon>
        <draw:polygon draw:style-name="gr2" draw:text-style-name="P3" draw:layer="layout" svg:width="0.014cm" svg:height="0.013cm" svg:x="19.712cm" svg:y="8.985cm" svg:viewBox="0 0 15 14" draw:points="0,0 15,0 15,14 0,14">
          <text:p/>
        </draw:polygon>
        <draw:polygon draw:style-name="gr2" draw:text-style-name="P3" draw:layer="layout" svg:width="0.014cm" svg:height="0.013cm" svg:x="19.712cm" svg:y="8.985cm" svg:viewBox="0 0 15 14" draw:points="0,0 15,0 15,14 0,14">
          <text:p/>
        </draw:polygon>
        <draw:polygon draw:style-name="gr2" draw:text-style-name="P3" draw:layer="layout" svg:width="0.013cm" svg:height="1.309cm" svg:x="3.217cm" svg:y="8.998cm" svg:viewBox="0 0 14 1310" draw:points="0,0 14,0 14,1310 0,1310">
          <text:p/>
        </draw:polygon>
        <draw:polygon draw:style-name="gr2" draw:text-style-name="P3" draw:layer="layout" svg:width="0.012cm" svg:height="1.309cm" svg:x="4.768cm" svg:y="8.998cm" svg:viewBox="0 0 13 1310" draw:points="0,0 13,0 13,1310 0,1310">
          <text:p/>
        </draw:polygon>
        <draw:polygon draw:style-name="gr2" draw:text-style-name="P3" draw:layer="layout" svg:width="0.012cm" svg:height="1.309cm" svg:x="7.879cm" svg:y="9.032cm" svg:viewBox="0 0 13 1310" draw:points="0,0 13,0 13,1310 0,1310">
          <text:p/>
        </draw:polygon>
        <draw:polygon draw:style-name="gr2" draw:text-style-name="P3" draw:layer="layout" svg:width="0.014cm" svg:height="1.309cm" svg:x="19.712cm" svg:y="8.998cm" svg:viewBox="0 0 15 1310" draw:points="0,0 15,0 15,1310 0,1310">
          <text:p/>
        </draw:polygon>
        <draw:frame draw:style-name="gr1" draw:text-style-name="P184" draw:layer="layout" svg:width="3.418cm" svg:height="0.624cm" svg:x="11.79cm" svg:y="9.313cm">
          <draw:text-box>
            <text:p text:style-name="P183"><text:span text:style-name="T1">Комментарии </text:span></text:p>
          </draw:text-box>
        </draw:frame>
        <draw:frame draw:style-name="gr1" draw:text-style-name="P184" draw:layer="layout" svg:width="0.558cm" svg:height="0.624cm" svg:x="3.866cm" svg:y="10.343cm">
          <draw:text-box>
            <text:p text:style-name="P183"><text:span text:style-name="T2">1 </text:span></text:p>
          </draw:text-box>
        </draw:frame>
        <draw:frame draw:style-name="gr1" draw:text-style-name="P184" draw:layer="layout" svg:width="1.958cm" svg:height="0.624cm" svg:x="5.518cm" svg:y="10.343cm">
          <draw:text-box>
            <text:p text:style-name="P183"><text:span text:style-name="T2">148.368 </text:span></text:p>
          </draw:text-box>
        </draw:frame>
        <draw:polygon draw:style-name="gr2" draw:text-style-name="P3" draw:layer="layout" svg:width="0.013cm" svg:height="0.012cm" svg:x="3.217cm" svg:y="10.307cm" svg:viewBox="0 0 14 13" draw:points="0,0 14,0 14,13 0,13">
          <text:p/>
        </draw:polygon>
        <draw:polygon draw:style-name="gr2" draw:text-style-name="P3" draw:layer="layout" svg:width="1.538cm" svg:height="0.012cm" svg:x="3.23cm" svg:y="10.307cm" svg:viewBox="0 0 1539 13" draw:points="0,0 1539,0 1539,13 0,13">
          <text:p/>
        </draw:polygon>
        <draw:polygon draw:style-name="gr2" draw:text-style-name="P3" draw:layer="layout" svg:width="0.012cm" svg:height="0.012cm" svg:x="4.768cm" svg:y="10.307cm" svg:viewBox="0 0 13 13" draw:points="0,0 13,0 13,13 0,13">
          <text:p/>
        </draw:polygon>
        <draw:polygon draw:style-name="gr2" draw:text-style-name="P3" draw:layer="layout" svg:width="3.305cm" svg:height="0.012cm" svg:x="4.78cm" svg:y="10.307cm" svg:viewBox="0 0 3306 13" draw:points="0,0 3306,0 3306,13 0,13">
          <text:p/>
        </draw:polygon>
        <draw:polygon draw:style-name="gr2" draw:text-style-name="P3" draw:layer="layout" svg:width="0.012cm" svg:height="0.012cm" svg:x="7.879cm" svg:y="10.341cm" svg:viewBox="0 0 13 13" draw:points="0,0 13,0 13,13 0,13">
          <text:p/>
        </draw:polygon>
        <draw:polygon draw:style-name="gr2" draw:text-style-name="P3" draw:layer="layout" svg:width="3.012cm" svg:height="0.012cm" svg:x="8.097cm" svg:y="10.307cm" svg:viewBox="0 0 3013 13" draw:points="0,0 3013,0 3013,13 0,13">
          <text:p/>
        </draw:polygon>
        <draw:polygon draw:style-name="gr2" draw:text-style-name="P3" draw:layer="layout" svg:width="8.59cm" svg:height="0.012cm" svg:x="11.122cm" svg:y="10.307cm" svg:viewBox="0 0 8591 13" draw:points="0,0 8591,0 8591,13 0,13">
          <text:p/>
        </draw:polygon>
        <draw:polygon draw:style-name="gr2" draw:text-style-name="P3" draw:layer="layout" svg:width="0.014cm" svg:height="0.012cm" svg:x="19.712cm" svg:y="10.307cm" svg:viewBox="0 0 15 13" draw:points="0,0 15,0 15,13 0,13">
          <text:p/>
        </draw:polygon>
        <draw:polygon draw:style-name="gr2" draw:text-style-name="P3" draw:layer="layout" svg:width="0.013cm" svg:height="1.296cm" svg:x="3.217cm" svg:y="10.32cm" svg:viewBox="0 0 14 1297" draw:points="0,0 14,0 14,1297 0,1297">
          <text:p/>
        </draw:polygon>
        <draw:polygon draw:style-name="gr2" draw:text-style-name="P3" draw:layer="layout" svg:width="0.012cm" svg:height="1.296cm" svg:x="4.768cm" svg:y="10.32cm" svg:viewBox="0 0 13 1297" draw:points="0,0 13,0 13,1297 0,1297">
          <text:p/>
        </draw:polygon>
        <draw:polygon draw:style-name="gr2" draw:text-style-name="P3" draw:layer="layout" svg:width="0.012cm" svg:height="1.296cm" svg:x="7.879cm" svg:y="10.354cm" svg:viewBox="0 0 13 1297" draw:points="0,0 13,0 13,1297 0,1297">
          <text:p/>
        </draw:polygon>
        <draw:polygon draw:style-name="gr2" draw:text-style-name="P3" draw:layer="layout" svg:width="0.014cm" svg:height="1.296cm" svg:x="19.712cm" svg:y="10.32cm" svg:viewBox="0 0 15 1297" draw:points="0,0 15,0 15,1297 0,1297">
          <text:p/>
        </draw:polygon>
        <draw:frame draw:style-name="gr1" draw:text-style-name="P184" draw:layer="layout" svg:width="4.382cm" svg:height="0.624cm" svg:x="11.384cm" svg:y="10.377cm">
          <draw:text-box>
            <text:p text:style-name="P183"><text:span text:style-name="T8">Начальная версия </text:span></text:p>
          </draw:text-box>
        </draw:frame>
        <draw:frame draw:style-name="gr1" draw:text-style-name="P184" draw:layer="layout" svg:width="0.558cm" svg:height="0.624cm" svg:x="3.866cm" svg:y="11.665cm">
          <draw:text-box>
            <text:p text:style-name="P183"><text:span text:style-name="T2">2 </text:span></text:p>
          </draw:text-box>
        </draw:frame>
        <draw:frame draw:style-name="gr1" draw:text-style-name="P184" draw:layer="layout" svg:width="2.237cm" svg:height="0.624cm" svg:x="5.379cm" svg:y="11.665cm">
          <draw:text-box>
            <text:p text:style-name="P183"><text:span text:style-name="T2">13.15386 </text:span></text:p>
          </draw:text-box>
        </draw:frame>
        <draw:frame draw:style-name="gr1" draw:text-style-name="P184" draw:layer="layout" svg:width="7.619cm" svg:height="0.624cm" svg:x="9.745cm" svg:y="11.699cm">
          <draw:text-box>
            <text:p text:style-name="P183"><text:span text:style-name="T8">Подсчет ошибки не на каждой </text:span></text:p>
          </draw:text-box>
        </draw:frame>
        <draw:frame draw:style-name="gr1" draw:text-style-name="P184" draw:layer="layout" svg:width="6.411cm" svg:height="0.624cm" svg:x="10.355cm" svg:y="12.346cm">
          <draw:text-box>
            <text:p text:style-name="P183"><text:span text:style-name="T8">итерации, а каждую 1000 </text:span></text:p>
          </draw:text-box>
        </draw:frame>
        <draw:polygon draw:style-name="gr2" draw:text-style-name="P3" draw:layer="layout" svg:width="0.013cm" svg:height="0.012cm" svg:x="3.217cm" svg:y="11.616cm" svg:viewBox="0 0 14 13" draw:points="0,0 14,0 14,13 0,13">
          <text:p/>
        </draw:polygon>
        <draw:polygon draw:style-name="gr2" draw:text-style-name="P3" draw:layer="layout" svg:width="1.538cm" svg:height="0.012cm" svg:x="3.23cm" svg:y="11.616cm" svg:viewBox="0 0 1539 13" draw:points="0,0 1539,0 1539,13 0,13">
          <text:p/>
        </draw:polygon>
        <draw:polygon draw:style-name="gr2" draw:text-style-name="P3" draw:layer="layout" svg:width="0.012cm" svg:height="0.012cm" svg:x="4.768cm" svg:y="11.616cm" svg:viewBox="0 0 13 13" draw:points="0,0 13,0 13,13 0,13">
          <text:p/>
        </draw:polygon>
        <draw:polygon draw:style-name="gr2" draw:text-style-name="P3" draw:layer="layout" svg:width="3.305cm" svg:height="0.012cm" svg:x="4.78cm" svg:y="11.616cm" svg:viewBox="0 0 3306 13" draw:points="0,0 3306,0 3306,13 0,13">
          <text:p/>
        </draw:polygon>
        <draw:polygon draw:style-name="gr2" draw:text-style-name="P3" draw:layer="layout" svg:width="0.012cm" svg:height="0.012cm" svg:x="7.879cm" svg:y="11.65cm" svg:viewBox="0 0 13 13" draw:points="0,0 13,0 13,13 0,13">
          <text:p/>
        </draw:polygon>
        <draw:polygon draw:style-name="gr2" draw:text-style-name="P3" draw:layer="layout" svg:width="3.012cm" svg:height="0.012cm" svg:x="8.097cm" svg:y="11.616cm" svg:viewBox="0 0 3013 13" draw:points="0,0 3013,0 3013,13 0,13">
          <text:p/>
        </draw:polygon>
        <draw:polygon draw:style-name="gr2" draw:text-style-name="P3" draw:layer="layout" svg:width="8.59cm" svg:height="0.012cm" svg:x="11.122cm" svg:y="11.616cm" svg:viewBox="0 0 8591 13" draw:points="0,0 8591,0 8591,13 0,13">
          <text:p/>
        </draw:polygon>
        <draw:polygon draw:style-name="gr2" draw:text-style-name="P3" draw:layer="layout" svg:width="0.014cm" svg:height="0.012cm" svg:x="19.712cm" svg:y="11.616cm" svg:viewBox="0 0 15 13" draw:points="0,0 15,0 15,13 0,13">
          <text:p/>
        </draw:polygon>
        <draw:polygon draw:style-name="gr2" draw:text-style-name="P3" draw:layer="layout" svg:width="0.013cm" svg:height="1.957cm" svg:x="3.217cm" svg:y="11.628cm" svg:viewBox="0 0 14 1958" draw:points="0,0 14,0 14,1958 0,1958">
          <text:p/>
        </draw:polygon>
        <draw:polygon draw:style-name="gr2" draw:text-style-name="P3" draw:layer="layout" svg:width="0.012cm" svg:height="1.957cm" svg:x="4.768cm" svg:y="11.628cm" svg:viewBox="0 0 13 1958" draw:points="0,0 13,0 13,1958 0,1958">
          <text:p/>
        </draw:polygon>
        <draw:polygon draw:style-name="gr2" draw:text-style-name="P3" draw:layer="layout" svg:width="0.012cm" svg:height="1.957cm" svg:x="7.879cm" svg:y="11.662cm" svg:viewBox="0 0 13 1958" draw:points="0,0 13,0 13,1958 0,1958">
          <text:p/>
        </draw:polygon>
        <draw:polygon draw:style-name="gr2" draw:text-style-name="P3" draw:layer="layout" svg:width="0.014cm" svg:height="1.957cm" svg:x="19.712cm" svg:y="11.628cm" svg:viewBox="0 0 15 1958" draw:points="0,0 15,0 15,1958 0,1958">
          <text:p/>
        </draw:polygon>
        <draw:frame draw:style-name="gr1" draw:text-style-name="P184" draw:layer="layout" svg:width="2.584cm" svg:height="0.624cm" svg:x="12.286cm" svg:y="12.994cm">
          <draw:text-box>
            <text:p text:style-name="P183"><text:span text:style-name="T8">и</text:span><text:span text:style-name="T8">т</text:span><text:span text:style-name="T8">е</text:span><text:span text:style-name="T8">р</text:span><text:span text:style-name="T8">а</text:span><text:span text:style-name="T8">ц</text:span><text:span text:style-name="T8">и</text:span><text:span text:style-name="T8">ю</text:span><text:span text:style-name="T8"> </text:span></text:p>
          </draw:text-box>
        </draw:frame>
        <draw:frame draw:style-name="gr1" draw:text-style-name="P184" draw:layer="layout" svg:width="0.558cm" svg:height="0.624cm" svg:x="3.866cm" svg:y="13.621cm">
          <draw:text-box>
            <text:p text:style-name="P183"><text:span text:style-name="T2">3</text:span><text:span text:style-name="T2"> </text:span></text:p>
          </draw:text-box>
        </draw:frame>
        <draw:frame draw:style-name="gr1" draw:text-style-name="P184" draw:layer="layout" svg:width="1.958cm" svg:height="0.624cm" svg:x="5.518cm" svg:y="13.621cm">
          <draw:text-box>
            <text:p text:style-name="P183"><text:span text:style-name="T2">8.97609 </text:span></text:p>
          </draw:text-box>
        </draw:frame>
        <draw:frame draw:style-name="gr1" draw:text-style-name="P184" draw:layer="layout" svg:width="7.161cm" svg:height="0.624cm" svg:x="9.986cm" svg:y="13.655cm">
          <draw:text-box>
            <text:p text:style-name="P183"><text:span text:style-name="T8">Вложенные #pragma acc loop </text:span></text:p>
          </draw:text-box>
        </draw:frame>
        <draw:frame draw:style-name="gr1" draw:text-style-name="P184" draw:layer="layout" svg:width="7.987cm" svg:height="0.624cm" svg:x="9.567cm" svg:y="14.303cm">
          <draw:text-box>
            <text:p text:style-name="P183"><text:span text:style-name="T8">внутри #pragma acc </text:span><text:span text:style-name="T9">parallel loop </text:span></text:p>
          </draw:text-box>
        </draw:frame>
        <draw:polygon draw:style-name="gr2" draw:text-style-name="P3" draw:layer="layout" svg:width="0.013cm" svg:height="0.013cm" svg:x="3.217cm" svg:y="13.585cm" svg:viewBox="0 0 14 14" draw:points="0,0 14,0 14,14 0,14">
          <text:p/>
        </draw:polygon>
        <draw:polygon draw:style-name="gr2" draw:text-style-name="P3" draw:layer="layout" svg:width="1.538cm" svg:height="0.013cm" svg:x="3.23cm" svg:y="13.585cm" svg:viewBox="0 0 1539 14" draw:points="0,0 1539,0 1539,14 0,14">
          <text:p/>
        </draw:polygon>
        <draw:polygon draw:style-name="gr2" draw:text-style-name="P3" draw:layer="layout" svg:width="0.012cm" svg:height="0.013cm" svg:x="4.768cm" svg:y="13.585cm" svg:viewBox="0 0 13 14" draw:points="0,0 13,0 13,14 0,14">
          <text:p/>
        </draw:polygon>
        <draw:polygon draw:style-name="gr2" draw:text-style-name="P3" draw:layer="layout" svg:width="3.305cm" svg:height="0.013cm" svg:x="4.78cm" svg:y="13.585cm" svg:viewBox="0 0 3306 14" draw:points="0,0 3306,0 3306,14 0,14">
          <text:p/>
        </draw:polygon>
        <draw:polygon draw:style-name="gr2" draw:text-style-name="P3" draw:layer="layout" svg:width="0.012cm" svg:height="0.013cm" svg:x="7.879cm" svg:y="13.619cm" svg:viewBox="0 0 13 14" draw:points="0,0 13,0 13,14 0,14">
          <text:p/>
        </draw:polygon>
        <draw:polygon draw:style-name="gr2" draw:text-style-name="P3" draw:layer="layout" svg:width="3.012cm" svg:height="0.013cm" svg:x="8.097cm" svg:y="13.585cm" svg:viewBox="0 0 3013 14" draw:points="0,0 3013,0 3013,14 0,14">
          <text:p/>
        </draw:polygon>
        <draw:polygon draw:style-name="gr2" draw:text-style-name="P3" draw:layer="layout" svg:width="8.59cm" svg:height="0.013cm" svg:x="11.122cm" svg:y="13.585cm" svg:viewBox="0 0 8591 14" draw:points="0,0 8591,0 8591,14 0,14">
          <text:p/>
        </draw:polygon>
        <draw:polygon draw:style-name="gr2" draw:text-style-name="P3" draw:layer="layout" svg:width="0.014cm" svg:height="0.013cm" svg:x="19.712cm" svg:y="13.585cm" svg:viewBox="0 0 15 14" draw:points="0,0 15,0 15,14 0,14">
          <text:p/>
        </draw:polygon>
        <draw:polygon draw:style-name="gr2" draw:text-style-name="P3" draw:layer="layout" svg:width="0.013cm" svg:height="1.957cm" svg:x="3.217cm" svg:y="13.598cm" svg:viewBox="0 0 14 1958" draw:points="0,0 14,0 14,1958 0,1958">
          <text:p/>
        </draw:polygon>
        <draw:polygon draw:style-name="gr2" draw:text-style-name="P3" draw:layer="layout" svg:width="0.012cm" svg:height="1.957cm" svg:x="4.768cm" svg:y="13.598cm" svg:viewBox="0 0 13 1958" draw:points="0,0 13,0 13,1958 0,1958">
          <text:p/>
        </draw:polygon>
        <draw:polygon draw:style-name="gr2" draw:text-style-name="P3" draw:layer="layout" svg:width="0.012cm" svg:height="1.957cm" svg:x="7.879cm" svg:y="13.632cm" svg:viewBox="0 0 13 1958" draw:points="0,0 13,0 13,1958 0,1958">
          <text:p/>
        </draw:polygon>
        <draw:polygon draw:style-name="gr2" draw:text-style-name="P3" draw:layer="layout" svg:width="0.014cm" svg:height="1.957cm" svg:x="19.712cm" svg:y="13.598cm" svg:viewBox="0 0 15 1958" draw:points="0,0 15,0 15,1958 0,1958">
          <text:p/>
        </draw:polygon>
        <draw:frame draw:style-name="gr1" draw:text-style-name="P184" draw:layer="layout" svg:width="5.673cm" svg:height="0.624cm" svg:x="10.724cm" svg:y="14.95cm">
          <draw:text-box>
            <text:p text:style-name="P183"><text:span text:style-name="T8">заменил</text:span><text:span text:style-name="T8">а на </text:span><text:span text:style-name="T9">collapse</text:span><text:span text:style-name="T9">(2) </text:span></text:p>
          </draw:text-box>
        </draw:frame>
        <draw:frame draw:style-name="gr1" draw:text-style-name="P184" draw:layer="layout" svg:width="0.558cm" svg:height="0.624cm" svg:x="3.866cm" svg:y="15.591cm">
          <draw:text-box>
            <text:p text:style-name="P183"><text:span text:style-name="T2">4 </text:span></text:p>
          </draw:text-box>
        </draw:frame>
        <draw:frame draw:style-name="gr1" draw:text-style-name="P184" draw:layer="layout" svg:width="1.958cm" svg:height="0.624cm" svg:x="5.518cm" svg:y="15.591cm">
          <draw:text-box>
            <text:p text:style-name="P183"><text:span text:style-name="T2">4.74862 </text:span></text:p>
          </draw:text-box>
        </draw:frame>
        <draw:frame draw:style-name="gr1" draw:text-style-name="P184" draw:layer="layout" svg:width="7.415cm" svg:height="0.624cm" svg:x="9.859cm" svg:y="15.625cm">
          <draw:text-box>
            <text:p text:style-name="P183"><text:span text:style-name="T8">Вместо копирования каждого </text:span></text:p>
          </draw:text-box>
        </draw:frame>
        <draw:frame draw:style-name="gr1" draw:text-style-name="P184" draw:layer="layout" svg:width="7.91cm" svg:height="0.624cm" svg:x="9.605cm" svg:y="16.272cm">
          <draw:text-box>
            <text:p text:style-name="P183"><text:span text:style-name="T8">элемента из </text:span><text:span text:style-name="T9">Anew </text:span><text:span text:style-name="T8">в </text:span><text:span text:style-name="T9">A </text:span><text:span text:style-name="T8">использую </text:span></text:p>
          </draw:text-box>
        </draw:frame>
        <draw:frame draw:style-name="gr1" draw:text-style-name="P184" draw:layer="layout" svg:width="8.259cm" svg:height="0.624cm" svg:x="9.246cm" svg:y="16.933cm">
          <draw:text-box>
            <text:p text:style-name="P183"><text:span text:style-name="T9">swap</text:span><text:span text:style-name="T8">, который мгновенно меняет </text:span></text:p>
          </draw:text-box>
        </draw:frame>
        <draw:polygon draw:style-name="gr2" draw:text-style-name="P3" draw:layer="layout" svg:width="0.013cm" svg:height="0.012cm" svg:x="3.217cm" svg:y="15.555cm" svg:viewBox="0 0 14 13" draw:points="0,0 14,0 14,13 0,13">
          <text:p/>
        </draw:polygon>
        <draw:polygon draw:style-name="gr2" draw:text-style-name="P3" draw:layer="layout" svg:width="1.538cm" svg:height="0.012cm" svg:x="3.23cm" svg:y="15.555cm" svg:viewBox="0 0 1539 13" draw:points="0,0 1539,0 1539,13 0,13">
          <text:p/>
        </draw:polygon>
        <draw:polygon draw:style-name="gr2" draw:text-style-name="P3" draw:layer="layout" svg:width="0.012cm" svg:height="0.012cm" svg:x="4.768cm" svg:y="15.555cm" svg:viewBox="0 0 13 13" draw:points="0,0 13,0 13,13 0,13">
          <text:p/>
        </draw:polygon>
        <draw:polygon draw:style-name="gr2" draw:text-style-name="P3" draw:layer="layout" svg:width="3.305cm" svg:height="0.012cm" svg:x="4.78cm" svg:y="15.555cm" svg:viewBox="0 0 3306 13" draw:points="0,0 3306,0 3306,13 0,13">
          <text:p/>
        </draw:polygon>
        <draw:polygon draw:style-name="gr2" draw:text-style-name="P3" draw:layer="layout" svg:width="0.012cm" svg:height="0.012cm" svg:x="7.879cm" svg:y="15.589cm" svg:viewBox="0 0 13 13" draw:points="0,0 13,0 13,13 0,13">
          <text:p/>
        </draw:polygon>
        <draw:polygon draw:style-name="gr2" draw:text-style-name="P3" draw:layer="layout" svg:width="3.012cm" svg:height="0.012cm" svg:x="8.097cm" svg:y="15.555cm" svg:viewBox="0 0 3013 13" draw:points="0,0 3013,0 3013,13 0,13">
          <text:p/>
        </draw:polygon>
        <draw:polygon draw:style-name="gr2" draw:text-style-name="P3" draw:layer="layout" svg:width="8.59cm" svg:height="0.012cm" svg:x="11.122cm" svg:y="15.555cm" svg:viewBox="0 0 8591 13" draw:points="0,0 8591,0 8591,13 0,13">
          <text:p/>
        </draw:polygon>
        <draw:polygon draw:style-name="gr2" draw:text-style-name="P3" draw:layer="layout" svg:width="0.014cm" svg:height="0.012cm" svg:x="19.712cm" svg:y="15.555cm" svg:viewBox="0 0 15 13" draw:points="0,0 15,0 15,13 0,13">
          <text:p/>
        </draw:polygon>
        <draw:polygon draw:style-name="gr2" draw:text-style-name="P3" draw:layer="layout" svg:width="0.013cm" svg:height="2.604cm" svg:x="3.217cm" svg:y="15.567cm" svg:viewBox="0 0 14 2605" draw:points="0,0 14,0 14,2605 0,2605">
          <text:p/>
        </draw:polygon>
        <draw:polygon draw:style-name="gr2" draw:text-style-name="P3" draw:layer="layout" svg:width="0.013cm" svg:height="0.014cm" svg:x="3.217cm" svg:y="18.171cm" svg:viewBox="0 0 14 15" draw:points="0,0 14,0 14,15 0,15">
          <text:p/>
        </draw:polygon>
        <draw:polygon draw:style-name="gr2" draw:text-style-name="P3" draw:layer="layout" svg:width="0.013cm" svg:height="0.014cm" svg:x="3.217cm" svg:y="18.171cm" svg:viewBox="0 0 14 15" draw:points="0,0 14,0 14,15 0,15">
          <text:p/>
        </draw:polygon>
        <draw:polygon draw:style-name="gr2" draw:text-style-name="P3" draw:layer="layout" svg:width="1.538cm" svg:height="0.014cm" svg:x="3.23cm" svg:y="18.171cm" svg:viewBox="0 0 1539 15" draw:points="0,0 1539,0 1539,15 0,15">
          <text:p/>
        </draw:polygon>
        <draw:polygon draw:style-name="gr2" draw:text-style-name="P3" draw:layer="layout" svg:width="0.012cm" svg:height="2.604cm" svg:x="4.768cm" svg:y="15.567cm" svg:viewBox="0 0 13 2605" draw:points="0,0 13,0 13,2605 0,2605">
          <text:p/>
        </draw:polygon>
        <draw:polygon draw:style-name="gr2" draw:text-style-name="P3" draw:layer="layout" svg:width="0.012cm" svg:height="0.014cm" svg:x="4.768cm" svg:y="18.171cm" svg:viewBox="0 0 13 15" draw:points="0,0 13,0 13,15 0,15">
          <text:p/>
        </draw:polygon>
        <draw:polygon draw:style-name="gr2" draw:text-style-name="P3" draw:layer="layout" svg:width="3.305cm" svg:height="0.014cm" svg:x="4.78cm" svg:y="18.171cm" svg:viewBox="0 0 3306 15" draw:points="0,0 3306,0 3306,15 0,15">
          <text:p/>
        </draw:polygon>
        <draw:polygon draw:style-name="gr2" draw:text-style-name="P3" draw:layer="layout" svg:width="0.012cm" svg:height="2.604cm" svg:x="7.879cm" svg:y="15.601cm" svg:viewBox="0 0 13 2605" draw:points="0,0 13,0 13,2605 0,2605">
          <text:p/>
        </draw:polygon>
        <draw:polygon draw:style-name="gr2" draw:text-style-name="P3" draw:layer="layout" svg:width="0.012cm" svg:height="0.014cm" svg:x="7.879cm" svg:y="18.205cm" svg:viewBox="0 0 13 15" draw:points="0,0 13,0 13,15 0,15">
          <text:p/>
        </draw:polygon>
        <draw:polygon draw:style-name="gr2" draw:text-style-name="P3" draw:layer="layout" svg:width="3.012cm" svg:height="0.014cm" svg:x="8.097cm" svg:y="18.171cm" svg:viewBox="0 0 3013 15" draw:points="0,0 3013,0 3013,15 0,15">
          <text:p/>
        </draw:polygon>
        <draw:polygon draw:style-name="gr2" draw:text-style-name="P3" draw:layer="layout" svg:width="8.59cm" svg:height="0.014cm" svg:x="11.122cm" svg:y="18.171cm" svg:viewBox="0 0 8591 15" draw:points="0,0 8591,0 8591,15 0,15">
          <text:p/>
        </draw:polygon>
        <draw:polygon draw:style-name="gr2" draw:text-style-name="P3" draw:layer="layout" svg:width="0.014cm" svg:height="2.604cm" svg:x="19.712cm" svg:y="15.567cm" svg:viewBox="0 0 15 2605" draw:points="0,0 15,0 15,2605 0,2605">
          <text:p/>
        </draw:polygon>
        <draw:polygon draw:style-name="gr2" draw:text-style-name="P3" draw:layer="layout" svg:width="0.014cm" svg:height="0.014cm" svg:x="19.712cm" svg:y="18.171cm" svg:viewBox="0 0 15 15" draw:points="0,0 15,0 15,15 0,15">
          <text:p/>
        </draw:polygon>
        <draw:polygon draw:style-name="gr2" draw:text-style-name="P3" draw:layer="layout" svg:width="0.014cm" svg:height="0.014cm" svg:x="19.712cm" svg:y="18.171cm" svg:viewBox="0 0 15 15" draw:points="0,0 15,0 15,15 0,15">
          <text:p/>
        </draw:polygon>
        <draw:frame draw:style-name="gr1" draw:text-style-name="P184" draw:layer="layout" svg:width="7.195cm" svg:height="0.624cm" svg:x="9.961cm" svg:y="17.568cm">
          <draw:text-box>
            <text:p text:style-name="P183"><text:span text:style-name="T8">местами указатели </text:span><text:span text:style-name="T9">A </text:span><text:span text:style-name="T8">и </text:span><text:span text:style-name="T9">Anew </text:span></text:p>
          </draw:text-box>
        </draw:frame>
      </draw:page>
      <draw:page draw:name="page4" draw:style-name="dp1" draw:master-page-name="master-page3">
        <draw:frame draw:style-name="gr1" draw:text-style-name="P184" draw:layer="layout" svg:width="0.607cm" svg:height="0.624cm" svg:x="3.032cm" svg:y="8.667cm">
          <draw:text-box>
            <text:p text:style-name="P183"><text:span text:style-name="T2">2) </text:span></text:p>
          </draw:text-box>
        </draw:frame>
        <draw:frame draw:style-name="gr1" draw:text-style-name="P184" draw:layer="layout" svg:width="0.558cm" svg:height="0.624cm" svg:x="19.07cm" svg:y="14.576cm">
          <draw:text-box>
            <text:p text:style-name="P183"><text:span text:style-name="T2"><text:s/></text:span></text:p>
          </draw:text-box>
        </draw:frame>
        <draw:frame draw:style-name="gr1" draw:text-style-name="P184" draw:layer="layout" svg:width="0.607cm" svg:height="0.624cm" svg:x="2.9cm" svg:y="15.369cm">
          <draw:text-box>
            <text:p text:style-name="P183"><text:span text:style-name="T2">3) </text:span></text:p>
          </draw:text-box>
        </draw:frame>
        <draw:frame draw:style-name="gr1" draw:text-style-name="P184" draw:layer="layout" svg:width="0.558cm" svg:height="0.624cm" svg:x="19.42cm" svg:y="20.426cm">
          <draw:text-box>
            <text:p text:style-name="P183"><text:span text:style-name="T2"><text:s/></text:span></text:p>
          </draw:text-box>
        </draw:frame>
        <draw:frame draw:style-name="gr184" draw:text-style-name="P184" draw:layer="layout" svg:width="0.853cm" svg:height="0.953cm" svg:x="2.9cm" svg:y="21.367cm">
          <draw:text-box>
            <text:p text:style-name="P183"><text:span text:style-name="T2">4) </text:span></text:p>
          </draw:text-box>
        </draw:frame>
        <draw:frame draw:style-name="gr1" draw:text-style-name="P184" draw:layer="layout" svg:width="0.558cm" svg:height="0.624cm" svg:x="19.42cm" svg:y="23.186cm">
          <draw:text-box>
            <text:p text:style-name="P183"><text:span text:style-name="T2"><text:s/></text:span></text:p>
          </draw:text-box>
        </draw:frame>
        <draw:frame draw:style-name="gr5" draw:text-style-name="P5" draw:layer="layout" svg:width="16.034cm" svg:height="5.702cm" svg:x="3.033cm" svg:y="9.351cm">
          <draw:image xlink:href="Pictures/10000000000002CD000000FFABCEB32B.png" xlink:type="simple" xlink:show="embed" xlink:actuate="onLoad" draw:mime-type="image/png">
            <text:p/>
          </draw:image>
        </draw:frame>
        <draw:frame draw:style-name="gr5" draw:text-style-name="P5" draw:layer="layout" svg:width="16.5cm" svg:height="4.862cm" svg:x="2.901cm" svg:y="16.036cm">
          <draw:image xlink:href="Pictures/10000000000002D6000000D60D6CD974.png" xlink:type="simple" xlink:show="embed" xlink:actuate="onLoad" draw:mime-type="image/png">
            <text:p/>
          </draw:image>
        </draw:frame>
        <draw:frame draw:style-name="gr5" draw:text-style-name="P5" draw:layer="layout" svg:width="16.5cm" svg:height="4.823cm" svg:x="3.128cm" svg:y="22.612cm">
          <draw:image xlink:href="Pictures/100000000000031D000000E9948E8E6E.png" xlink:type="simple" xlink:show="embed" xlink:actuate="onLoad" draw:mime-type="image/png">
            <text:p/>
          </draw:image>
        </draw:frame>
        <draw:frame draw:style-name="gr1" draw:text-style-name="P184" draw:layer="layout" svg:width="0.558cm" svg:height="0.624cm" svg:x="2.9cm" svg:y="25.727cm">
          <draw:text-box>
            <text:p text:style-name="P183"><text:span text:style-name="T9"><text:s/></text:span></text:p>
          </draw:text-box>
        </draw:frame>
        <draw:frame draw:style-name="gr1" draw:text-style-name="P184" draw:layer="layout" svg:width="0.607cm" svg:height="0.624cm" svg:x="3.095cm" svg:y="2.317cm">
          <draw:text-box>
            <text:p text:style-name="P183"><text:span text:style-name="T2">1) </text:span></text:p>
          </draw:text-box>
        </draw:frame>
        <draw:frame draw:style-name="gr1" draw:text-style-name="P184" draw:layer="layout" svg:width="0.558cm" svg:height="0.624cm" svg:x="19.348cm" svg:y="6.523cm">
          <draw:text-box>
            <text:p text:style-name="P183"><text:span text:style-name="T2"><text:s/></text:span></text:p>
          </draw:text-box>
        </draw:frame>
        <draw:frame draw:style-name="gr5" draw:text-style-name="P5" draw:layer="layout" svg:width="16.243cm" svg:height="4.02cm" svg:x="3.263cm" svg:y="3.231cm">
          <draw:image xlink:href="Pictures/1000000000000340000000CEA5747780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1" draw:text-style-name="P2" draw:layer="layout" svg:width="6.522cm" svg:height="0.624cm" svg:x="8.031cm" svg:y="2.017cm">
          <draw:text-box>
            <text:p text:style-name="P1"><text:span text:style-name="T3">Диаграмма оптимизации </text:span></text:p>
          </draw:text-box>
        </draw:frame>
        <draw:frame draw:style-name="gr1" draw:text-style-name="P2" draw:layer="layout" svg:width="0.558cm" svg:height="0.624cm" svg:x="18.248cm" svg:y="11.3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2.999cm" svg:y="12.2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58cm" svg:height="0.624cm" svg:x="19.519cm" svg:y="20.022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15.241cm" svg:height="8.89cm" svg:x="3cm" svg:y="2.982cm" svg:viewBox="0 0 15242 8891" draw:points="0,0 15242,0 15242,8891 0,8891">
          <text:p/>
        </draw:polygon>
        <draw:path draw:style-name="gr4" draw:text-style-name="P5" draw:layer="layout" svg:width="13.846cm" svg:height="5.208cm" svg:x="4.006cm" svg:y="4.291cm" svg:viewBox="0 0 13847 5209" svg:d="M0 5209h13847M0 4473h13847M0 3723h13847M0 2973h13847M0 2236h13847M0 1487h13847M0 750h13847M0 0h13847">
          <text:p/>
        </draw:path>
        <draw:path draw:style-name="gr185" draw:text-style-name="P185" draw:layer="layout" svg:width="11.468cm" svg:height="5.523cm" svg:x="5.194cm" svg:y="4.724cm" svg:viewBox="0 0 11469 5524" svg:d="M0 0h1080v5524h-1080zM3468 5030h1079v494h-1079zM6922 5195h1093v329h-1093zM10389 5348h1080v176h-1080z">
          <text:p/>
        </draw:path>
        <draw:line draw:style-name="gr4" draw:text-style-name="P5" draw:layer="layout" svg:x1="4.006cm" svg:y1="10.247cm" svg:x2="17.852cm" svg:y2="10.247cm">
          <text:p/>
        </draw:line>
        <draw:frame draw:style-name="gr1" draw:text-style-name="P2" draw:layer="layout" svg:width="0.558cm" svg:height="0.624cm" svg:x="19.519cm" svg:y="27.175cm">
          <draw:text-box>
            <text:p text:style-name="P1"><text:span text:style-name="T2"><text:s/></text:span></text:p>
          </draw:text-box>
        </draw:frame>
        <draw:frame draw:style-name="gr183" draw:text-style-name="P182" draw:layer="layout" svg:width="0.317cm" svg:height="0.433cm" svg:x="3.554cm" svg:y="10.006cm">
          <draw:text-box>
            <text:p text:style-name="P1"><text:span text:style-name="T4">0</text:span></text:p>
          </draw:text-box>
        </draw:frame>
        <draw:frame draw:style-name="gr183" draw:text-style-name="P182" draw:layer="layout" svg:width="0.365cm" svg:height="0.433cm" svg:x="3.393cm" svg:y="9.262cm">
          <draw:text-box>
            <text:p text:style-name="P1"><text:span text:style-name="T4">20</text:span></text:p>
          </draw:text-box>
        </draw:frame>
        <draw:frame draw:style-name="gr183" draw:text-style-name="P182" draw:layer="layout" svg:width="0.365cm" svg:height="0.433cm" svg:x="3.393cm" svg:y="8.517cm">
          <draw:text-box>
            <text:p text:style-name="P1"><text:span text:style-name="T4">40</text:span></text:p>
          </draw:text-box>
        </draw:frame>
        <draw:frame draw:style-name="gr183" draw:text-style-name="P182" draw:layer="layout" svg:width="0.365cm" svg:height="0.433cm" svg:x="3.393cm" svg:y="7.772cm">
          <draw:text-box>
            <text:p text:style-name="P1"><text:span text:style-name="T4">60</text:span></text:p>
          </draw:text-box>
        </draw:frame>
        <draw:frame draw:style-name="gr183" draw:text-style-name="P182" draw:layer="layout" svg:width="0.365cm" svg:height="0.433cm" svg:x="3.393cm" svg:y="7.027cm">
          <draw:text-box>
            <text:p text:style-name="P1"><text:span text:style-name="T4">80</text:span></text:p>
          </draw:text-box>
        </draw:frame>
        <draw:frame draw:style-name="gr183" draw:text-style-name="P182" draw:layer="layout" svg:width="0.547cm" svg:height="0.433cm" svg:x="3.232cm" svg:y="6.282cm">
          <draw:text-box>
            <text:p text:style-name="P1"><text:span text:style-name="T4">100</text:span></text:p>
          </draw:text-box>
        </draw:frame>
        <draw:frame draw:style-name="gr183" draw:text-style-name="P182" draw:layer="layout" svg:width="0.547cm" svg:height="0.433cm" svg:x="3.232cm" svg:y="5.537cm">
          <draw:text-box>
            <text:p text:style-name="P1"><text:span text:style-name="T4">120</text:span></text:p>
          </draw:text-box>
        </draw:frame>
        <draw:frame draw:style-name="gr183" draw:text-style-name="P182" draw:layer="layout" svg:width="0.547cm" svg:height="0.433cm" svg:x="3.232cm" svg:y="4.792cm">
          <draw:text-box>
            <text:p text:style-name="P1"><text:span text:style-name="T4">140</text:span></text:p>
          </draw:text-box>
        </draw:frame>
        <draw:frame draw:style-name="gr183" draw:text-style-name="P182" draw:layer="layout" svg:width="0.547cm" svg:height="0.433cm" svg:x="3.232cm" svg:y="4.047cm">
          <draw:text-box>
            <text:p text:style-name="P1"><text:span text:style-name="T4">160</text:span></text:p>
          </draw:text-box>
        </draw:frame>
        <draw:frame draw:style-name="gr183" draw:text-style-name="P182" draw:layer="layout" svg:width="0.988cm" svg:height="0.433cm" svg:x="5.318cm" svg:y="10.419cm">
          <draw:text-box>
            <text:p text:style-name="P1"><text:span text:style-name="T4">Этап 1</text:span></text:p>
          </draw:text-box>
        </draw:frame>
        <draw:frame draw:style-name="gr183" draw:text-style-name="P182" draw:layer="layout" svg:width="0.988cm" svg:height="0.433cm" svg:x="8.782cm" svg:y="10.419cm">
          <draw:text-box>
            <text:p text:style-name="P1"><text:span text:style-name="T4">Этап 2</text:span></text:p>
          </draw:text-box>
        </draw:frame>
        <draw:frame draw:style-name="gr183" draw:text-style-name="P182" draw:layer="layout" svg:width="0.988cm" svg:height="0.433cm" svg:x="12.245cm" svg:y="10.419cm">
          <draw:text-box>
            <text:p text:style-name="P1"><text:span text:style-name="T4">Этап 3</text:span></text:p>
          </draw:text-box>
        </draw:frame>
        <draw:frame draw:style-name="gr183" draw:text-style-name="P182" draw:layer="layout" svg:width="0.988cm" svg:height="0.433cm" svg:x="15.708cm" svg:y="10.419cm">
          <draw:text-box>
            <text:p text:style-name="P1"><text:span text:style-name="T4">Этап 4</text:span></text:p>
          </draw:text-box>
        </draw:frame>
        <draw:polygon draw:style-name="gr185" draw:text-style-name="P185" draw:layer="layout" svg:width="0.174cm" svg:height="0.174cm" svg:x="9.931cm" svg:y="11.276cm" svg:viewBox="0 0 175 175" draw:points="0,0 175,0 175,175 0,175">
          <text:p/>
        </draw:polygon>
        <draw:frame draw:style-name="gr186" draw:text-style-name="P186" draw:layer="layout" svg:width="2.233cm" svg:height="0.674cm" svg:x="9.64cm" svg:y="3.19cm">
          <draw:text-box>
            <text:p text:style-name="P1"><text:span text:style-name="T10">GPU-time</text:span></text:p>
          </draw:text-box>
        </draw:frame>
        <draw:polygon draw:style-name="gr4" draw:text-style-name="P5" draw:layer="layout" svg:width="15.241cm" svg:height="8.89cm" svg:x="3cm" svg:y="2.982cm" svg:viewBox="0 0 15242 8891" draw:points="0,0 15242,0 15242,8891 0,8891">
          <text:p/>
        </draw:polygon>
        <draw:frame draw:style-name="gr183" draw:text-style-name="P182" draw:layer="layout" svg:width="1.432cm" svg:height="0.433cm" svg:x="10.186cm" svg:y="11.123cm">
          <draw:text-box>
            <text:p text:style-name="P1"><text:span text:style-name="T4">GPU-time</text:span></text:p>
          </draw:text-box>
        </draw:frame>
        <draw:frame draw:style-name="gr1" draw:text-style-name="P2" draw:layer="layout" svg:width="13.128cm" svg:height="0.624cm" svg:x="3.217cm" svg:y="12.866cm">
          <draw:text-box>
            <text:p text:style-name="P1"><text:span text:style-name="T3">Вывод: </text:span><text:span text:style-name="T2">GPU-</text:span><text:span text:style-name="T1">реализация после оптимизаций показала </text:span></text:p>
          </draw:text-box>
        </draw:frame>
        <draw:frame draw:style-name="gr1" draw:text-style-name="P2" draw:layer="layout" svg:width="16.161cm" svg:height="0.624cm" svg:x="3.217cm" svg:y="13.579cm">
          <draw:text-box>
            <text:p text:style-name="P1"><text:span text:style-name="T1">значительный прирост производительности: с 148 сек до 4.7 сек на </text:span></text:p>
          </draw:text-box>
        </draw:frame>
        <draw:frame draw:style-name="gr1" draw:text-style-name="P2" draw:layer="layout" svg:width="9.383cm" svg:height="0.624cm" svg:x="3.217cm" svg:y="14.277cm">
          <draw:text-box>
            <text:p text:style-name="P1"><text:span text:style-name="T1">сетке 512x512 — ускорение более 30x.</text:span><text:span text:style-name="T2"> </text:span></text:p>
          </draw:text-box>
        </draw:frame>
        <draw:frame draw:style-name="gr1" draw:text-style-name="P2" draw:layer="layout" svg:width="5.777cm" svg:height="0.624cm" svg:x="3.217cm" svg:y="15.256cm">
          <draw:text-box>
            <text:p text:style-name="P1"><text:span text:style-name="T1">Сравнение GPU и CPU: </text:span></text:p>
          </draw:text-box>
        </draw:frame>
        <draw:frame draw:style-name="gr1" draw:text-style-name="P2" draw:layer="layout" svg:width="5.907cm" svg:height="0.624cm" svg:x="3.217cm" svg:y="16.246cm">
          <draw:text-box>
            <text:p text:style-name="P1"><text:span text:style-name="T1">GPU </text:span><text:span text:style-name="T1">(512x512)</text:span><text:span text:style-name="T1">: 4.75 сек </text:span></text:p>
          </draw:text-box>
        </draw:frame>
        <draw:frame draw:style-name="gr1" draw:text-style-name="P2" draw:layer="layout" svg:width="6.875cm" svg:height="0.624cm" svg:x="3.217cm" svg:y="17.225cm">
          <draw:text-box>
            <text:p text:style-name="P1"><text:span text:style-name="T1">CPU (один поток): 151.4 сек </text:span></text:p>
          </draw:text-box>
        </draw:frame>
        <draw:frame draw:style-name="gr1" draw:text-style-name="P2" draw:layer="layout" svg:width="8.07cm" svg:height="0.624cm" svg:x="3.217cm" svg:y="18.203cm">
          <draw:text-box>
            <text:p text:style-name="P1"><text:span text:style-name="T1">CPU (многопоточность): 68.6 сек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.9cm" fo:margin-right="1cm" fo:page-width="21.005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8T12:19:50.430866077</dc:date>
    <meta:editing-duration>PT10M43S</meta:editing-duration>
    <meta:editing-cycles>2</meta:editing-cycles>
    <meta:generator>LibreOffice/25.8.6.2$Linux_X86_64 LibreOffice_project/580$Build-2</meta:generator>
    <meta:document-statistic meta:object-count="1467"/>
  </office:meta>
</office:document-meta>
</file>