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1.4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font-name="Roboto Condensed Light" fo:font-size="14pt" style:font-size-asian="14pt" style:font-size-complex="14pt"/>
    </style:style>
    <style:style style:name="ce3" style:family="table-cell" style:parent-style-name="Default">
      <style:table-cell-properties fo:background-color="#c8e6c9"/>
      <style:text-properties style:font-name="Roboto Condensed Light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Roboto Condensed Light" fo:font-size="14pt" style:font-size-asian="14pt" style:font-size-complex="14pt"/>
    </style:style>
    <style:style style:name="ce5" style:family="table-cell" style:parent-style-name="Default">
      <style:table-cell-properties fo:background-color="#c8e6c9" style:text-align-source="fix" style:repeat-content="false" style:vertical-align="middle"/>
      <style:paragraph-properties fo:text-align="center" fo:margin-left="0in"/>
      <style:text-properties style:font-name="Roboto Condensed Light" fo:font-size="14pt" style:font-size-asian="14pt" style:font-size-complex="14pt"/>
    </style:style>
    <style:style style:name="ce6" style:family="table-cell" style:parent-style-name="Default">
      <style:table-cell-properties fo:background-color="#c8e6c9" style:text-align-source="fix" style:repeat-content="false"/>
      <style:paragraph-properties fo:text-align="center" fo:margin-left="0in"/>
      <style:text-properties style:font-name="Roboto Condensed Light" fo:font-size="14pt" style:font-size-asian="14pt" style:font-size-complex="14pt"/>
    </style:style>
    <style:style style:name="ce21" style:family="table-cell" style:parent-style-name="Default">
      <style:table-cell-properties fo:background-color="#d1c4e9" style:text-align-source="fix" style:repeat-content="false"/>
      <style:paragraph-properties fo:text-align="center" fo:margin-left="0in"/>
      <style:text-properties style:font-name="Roboto Condensed Light" fo:font-size="14pt" style:font-size-asian="14pt" style:font-size-complex="14pt"/>
    </style:style>
    <style:style style:name="ce7" style:family="table-cell" style:parent-style-name="Default">
      <style:table-cell-properties fo:background-color="#d1c4e9" style:text-align-source="fix" style:repeat-content="false"/>
      <style:paragraph-properties fo:text-align="center" fo:margin-left="0in"/>
      <style:text-properties style:font-name="Roboto Condensed Light" fo:font-size="14pt" style:font-size-asian="14pt" style:font-size-complex="14pt"/>
    </style:style>
    <style:style style:name="ce8" style:family="table-cell" style:parent-style-name="Default">
      <style:table-cell-properties fo:background-color="#d1c4e9" style:text-align-source="fix" style:repeat-content="false"/>
      <style:paragraph-properties fo:text-align="start" fo:margin-left="0in"/>
      <style:text-properties style:font-name="Roboto Condensed Light" fo:font-size="14pt" style:font-size-asian="14pt" style:font-size-complex="14pt"/>
    </style:style>
    <style:style style:name="ce9" style:family="table-cell" style:parent-style-name="Default">
      <style:table-cell-properties fo:background-color="#d1c4e9"/>
      <style:text-properties style:font-name="Roboto Condensed Light" fo:font-size="14pt" style:font-size-asian="14pt" style:font-size-complex="14pt"/>
    </style:style>
    <style:style style:name="ce10" style:family="table-cell" style:parent-style-name="Default">
      <style:text-properties style:font-name="Roboto Condensed" fo:font-size="14pt" style:font-size-asian="14pt" style:font-size-complex="14pt"/>
    </style:style>
    <style:style style:name="ce11" style:family="table-cell" style:parent-style-name="Default">
      <style:table-cell-properties fo:background-color="#c8e6c9" style:text-align-source="fix" style:repeat-content="false" style:vertical-align="middle"/>
      <style:paragraph-properties fo:text-align="center" fo:margin-left="0in"/>
      <style:text-properties style:font-name="Roboto Condensed" fo:font-size="14pt" style:font-size-asian="14pt" style:font-size-complex="14pt"/>
    </style:style>
    <style:style style:name="ce12" style:family="table-cell" style:parent-style-name="Default">
      <style:table-cell-properties fo:background-color="#c8e6c9"/>
      <style:text-properties style:font-name="Roboto Condensed" fo:font-size="14pt" style:font-size-asian="14pt" style:font-size-complex="14pt"/>
    </style:style>
    <style:style style:name="ce13" style:family="table-cell" style:parent-style-name="Default">
      <style:table-cell-properties fo:wrap-option="wrap" style:vertical-align="top"/>
      <style:text-properties style:font-name="Roboto Condensed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 Condensed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Roboto Condensed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6pt" fo:font-weight="bold" style:font-size-asian="16pt" style:font-size-complex="16pt" style:font-weight-asian="bold" style:font-weight-complex="bold"/>
    </style:style>
    <style:style style:name="T2" style:family="text">
      <style:text-properties style:font-name="Liberation Serif" fo:font-size="12pt" style:letter-kerning="true" style:language-complex="en" style:country-complex="US" style:font-name-complex="Liberation Serif" style:font-size-complex="12pt"/>
    </style:style>
    <style:style style:name="T3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Вычислительный узел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9" table:number-rows-spanned="39">
            <text:p><text:span text:style-name="T1">Вычислительный узел</text:span></text:p>
            <text:p><text:span text:style-name="T2">Описать вычислительный узел: наименование и краткая характеристика CPU (lscpu), наименование сервера (cat /sys/devices/virtual/dmi/id/product_name), сколько NUMA node (numactl --hardware), сколько памяти у каждой ноды, операционная система (cat /etc/os-release).</text:span></text:p>
            <text:p/>
            <text:p><text:span text:style-name="T2">Наименование сервера: ProLiant XL270d Gen10</text:span></text:p>
            <text:p><text:span text:style-name="T2">Количество узлов (нод): 2</text:span></text:p>
            <text:p><text:span text:style-name="T2">Память узлов:</text:span></text:p>
            <text:p><text:tab/><text:span text:style-name="T2">node 0 size: 385636 MB</text:span></text:p>
            <text:p><text:tab/><text:span text:style-name="T2">node 1 size: 387008 MB</text:span></text:p>
            <text:p><text:span text:style-name="T2">Операционная система: Ubuntu 22.04.5 LTS</text:span></text:p>
            <text:p/>
            <text:p><text:span text:style-name="T2">Architecture:                x86_64</text:span></text:p>
            <text:p><text:span text:style-name="T2">  CPU op-mode(s):            32-bit, 64-bit</text:span></text:p>
            <text:p><text:span text:style-name="T2">  Address sizes:             46 bits physical, 48 bits virtual</text:span></text:p>
            <text:p><text:span text:style-name="T2">  Byte Order:                Little Endian</text:span></text:p>
            <text:p><text:span text:style-name="T2">CPU(s):                      80</text:span></text:p>
            <text:p><text:span text:style-name="T2">  On-line CPU(s) list:       0-79</text:span></text:p>
            <text:p><text:span text:style-name="T2">Vendor ID:                   GenuineIntel</text:span></text:p>
            <text:p><text:span text:style-name="T2">  Model name:                Intel(R) Xeon(R) Gold 6248 CPU @ 2.50GHz</text:span></text:p>
            <text:p><text:span text:style-name="T2">    CPU family:              6</text:span></text:p>
            <text:p><text:span text:style-name="T2">    Model:                   85</text:span></text:p>
            <text:p><text:span text:style-name="T2">    Thread(s) per core:      2</text:span></text:p>
            <text:p><text:span text:style-name="T2">    Core(s) per socket:      20</text:span></text:p>
            <text:p><text:span text:style-name="T2">    Socket(s):               2</text:span></text:p>
            <text:p><text:span text:style-name="T2">    Stepping:                7</text:span></text:p>
            <text:p><text:span text:style-name="T2">    CPU max MHz:             3900.0000</text:span></text:p>
            <text:p><text:span text:style-name="T2">    CPU min MHz:             1000.0000</text:span></text:p>
          </table:table-cell>
          <table:covered-table-cell table:number-columns-repeated="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table table:name="2.1" table:style-name="ta1">
        <table:shapes>
          <draw:frame draw:z-index="0" draw:style-name="gr1" draw:text-style-name="P1" svg:width="6.298in" svg:height="3.5449in" svg:x="1.4374in" svg:y="3.2197in">
            <draw:object draw:notify-on-update-of-ranges="'2.1'.D8:'2.1'.J8 '2.1'.D9:'2.1'.J9 '2.1'.D8:'2.1'.J8 '2.1'.D10:'2.1'.J10 '2.1'.D8:'2.1'.J8 '2.1'.D11:'2.1'.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ce16"/>
        <table:table-column table:style-name="co1" table:number-columns-repeated="16362"/>
        <table:table-row table:style-name="ro2">
          <table:table-cell table:number-columns-repeated="22"/>
          <table:table-cell table:style-name="ce16" table:number-columns-repeated="16362"/>
        </table:table-row>
        <table:table-row table:style-name="ro2">
          <table:table-cell/>
          <table:table-cell table:style-name="ce3"/>
          <table:table-cell table:style-name="ce5" office:value-type="string" calcext:value-type="string" table:number-columns-spanned="8" table:number-rows-spanned="1">
            <text:p>Время выполнения</text:p>
          </table:table-cell>
          <table:covered-table-cell table:number-columns-repeated="7" table:style-name="ce6"/>
          <table:table-cell table:number-columns-repeated="4"/>
          <table:table-cell table:style-name="Default"/>
          <table:table-cell table:number-columns-repeated="7"/>
          <table:table-cell table:style-name="ce16" table:number-columns-repeated="16362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Seri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2"/>
          <table:table-cell table:style-name="ce16" table:number-columns-repeated="16362"/>
        </table:table-row>
        <table:table-row table:style-name="ro2">
          <table:table-cell/>
          <table:table-cell table:style-name="ce3" office:value-type="string" calcext:value-type="string">
            <text:p>20 000</text:p>
          </table:table-cell>
          <table:table-cell table:style-name="ce3" office:value-type="float" office:value="1.427522" calcext:value-type="float">
            <text:p>1.427522</text:p>
          </table:table-cell>
          <table:table-cell table:style-name="ce3" office:value-type="float" office:value="0.635788" calcext:value-type="float">
            <text:p>0.635788</text:p>
          </table:table-cell>
          <table:table-cell table:style-name="ce3" office:value-type="float" office:value="0.516913" calcext:value-type="float">
            <text:p>0.516913</text:p>
          </table:table-cell>
          <table:table-cell table:style-name="ce3" office:value-type="float" office:value="0.376678" calcext:value-type="float">
            <text:p>0.376678</text:p>
          </table:table-cell>
          <table:table-cell table:style-name="ce3" office:value-type="float" office:value="0.158213" calcext:value-type="float">
            <text:p>0.158213</text:p>
          </table:table-cell>
          <table:table-cell table:style-name="ce3" office:value-type="float" office:value="0.092456" calcext:value-type="float">
            <text:p>0.092456</text:p>
          </table:table-cell>
          <table:table-cell table:style-name="ce3" office:value-type="float" office:value="0.106785" calcext:value-type="float">
            <text:p>0.106785</text:p>
          </table:table-cell>
          <table:table-cell table:style-name="ce3" office:value-type="float" office:value="0.076954" calcext:value-type="float">
            <text:p>0.076954</text:p>
          </table:table-cell>
          <table:table-cell table:number-columns-repeated="6"/>
          <table:table-cell table:style-name="Default" table:number-columns-repeated="6"/>
          <table:table-cell table:style-name="ce16" table:number-columns-repeated="16362"/>
        </table:table-row>
        <table:table-row table:style-name="ro2">
          <table:table-cell/>
          <table:table-cell table:style-name="ce3" office:value-type="string" calcext:value-type="string">
            <text:p>40 000</text:p>
          </table:table-cell>
          <table:table-cell table:style-name="ce3" office:value-type="float" office:value="4.988745" calcext:value-type="float">
            <text:p>4.988745</text:p>
          </table:table-cell>
          <table:table-cell table:style-name="ce3" office:value-type="float" office:value="2.647036" calcext:value-type="float">
            <text:p>2.647036</text:p>
          </table:table-cell>
          <table:table-cell table:style-name="ce3" office:value-type="float" office:value="1.462196" calcext:value-type="float">
            <text:p>1.462196</text:p>
          </table:table-cell>
          <table:table-cell table:style-name="ce3" office:value-type="float" office:value="0.828222" calcext:value-type="float">
            <text:p>0.828222</text:p>
          </table:table-cell>
          <table:table-cell table:style-name="ce3" office:value-type="float" office:value="1.193987" calcext:value-type="float">
            <text:p>1.193987</text:p>
          </table:table-cell>
          <table:table-cell table:style-name="ce3" office:value-type="float" office:value="0.577716" calcext:value-type="float">
            <text:p>0.577716</text:p>
          </table:table-cell>
          <table:table-cell table:style-name="ce3" office:value-type="float" office:value="0.440542" calcext:value-type="float">
            <text:p>0.440542</text:p>
          </table:table-cell>
          <table:table-cell table:style-name="ce3" office:value-type="float" office:value="0.39042" calcext:value-type="float">
            <text:p>0.39042</text:p>
          </table:table-cell>
          <table:table-cell table:number-columns-repeated="6"/>
          <table:table-cell table:style-name="Default" table:number-columns-repeated="6"/>
          <table:table-cell table:style-name="ce16" table:number-columns-repeated="16362"/>
        </table:table-row>
        <table:table-row table:style-name="ro2">
          <table:table-cell table:number-columns-repeated="16"/>
          <table:table-cell table:style-name="Default" table:number-columns-repeated="6"/>
          <table:table-cell table:style-name="ce16" table:number-columns-repeated="16362"/>
        </table:table-row>
        <table:table-row table:style-name="ro2">
          <table:table-cell table:number-columns-repeated="2"/>
          <table:table-cell table:style-name="ce21" office:value-type="string" calcext:value-type="string" table:number-columns-spanned="8" table:number-rows-spanned="1">
            <text:p>Ускорение</text:p>
          </table:table-cell>
          <table:covered-table-cell table:number-columns-repeated="7" table:style-name="ce21"/>
          <table:table-cell table:number-columns-repeated="6"/>
          <table:table-cell table:style-name="Default" table:number-columns-repeated="6"/>
          <table:table-cell table:style-name="ce16" table:number-columns-repeated="16362"/>
        </table:table-row>
        <table:table-row table:style-name="ro2">
          <table:table-cell table:number-columns-repeated="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6"/>
          <table:table-cell table:style-name="ce16" table:number-columns-repeated="16362"/>
        </table:table-row>
        <table:table-row table:style-name="ro2">
          <table:table-cell table:number-columns-repeated="2"/>
          <table:table-cell table:style-name="ce8" office:value-type="string" calcext:value-type="string">
            <text:p>Lin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6"/>
          <table:table-cell table:style-name="ce16" table:number-columns-repeated="16362"/>
        </table:table-row>
        <table:table-row table:style-name="ro2">
          <table:table-cell table:number-columns-repeated="2"/>
          <table:table-cell table:style-name="ce9" office:value-type="string" calcext:value-type="string">
            <text:p>20 000</text:p>
          </table:table-cell>
          <table:table-cell table:style-name="ce9" table:formula="of:=[.C4]/[.D4]" office:value-type="float" office:value="2.24527987316527" calcext:value-type="float">
            <text:p>2.24527987316527</text:p>
          </table:table-cell>
          <table:table-cell table:style-name="ce9" table:formula="of:=[.C4]/[.E4]" office:value-type="float" office:value="2.76162913294887" calcext:value-type="float">
            <text:p>2.76162913294887</text:p>
          </table:table-cell>
          <table:table-cell table:style-name="ce9" table:formula="of:=[.C4]/[.F4]" office:value-type="float" office:value="3.78976738752993" calcext:value-type="float">
            <text:p>3.78976738752993</text:p>
          </table:table-cell>
          <table:table-cell table:style-name="ce9" table:formula="of:=[.C4]/[.G4]" office:value-type="float" office:value="9.02278573821367" calcext:value-type="float">
            <text:p>9.02278573821367</text:p>
          </table:table-cell>
          <table:table-cell table:style-name="ce9" table:formula="of:=[.C4]/[.H4]" office:value-type="float" office:value="15.4400147096998" calcext:value-type="float">
            <text:p>15.4400147096998</text:p>
          </table:table-cell>
          <table:table-cell table:style-name="ce9" table:formula="of:=[.C4]/[.I4]" office:value-type="float" office:value="13.368188415976" calcext:value-type="float">
            <text:p>13.368188415976</text:p>
          </table:table-cell>
          <table:table-cell table:style-name="ce9" table:formula="of:=[.C4]/[.J4]" office:value-type="float" office:value="18.5503287678353" calcext:value-type="float">
            <text:p>18.5503287678353</text:p>
          </table:table-cell>
          <table:table-cell table:number-columns-repeated="6"/>
          <table:table-cell table:style-name="Default" table:number-columns-repeated="6"/>
          <table:table-cell table:style-name="ce16" table:number-columns-repeated="16362"/>
        </table:table-row>
        <table:table-row table:style-name="ro2">
          <table:table-cell table:number-columns-repeated="2"/>
          <table:table-cell table:style-name="ce9" office:value-type="string" calcext:value-type="string">
            <text:p>40 000</text:p>
          </table:table-cell>
          <table:table-cell table:style-name="ce9" table:formula="of:=[.C5]/[.D5]" office:value-type="float" office:value="1.88465324989913" calcext:value-type="float">
            <text:p>1.88465324989913</text:p>
          </table:table-cell>
          <table:table-cell table:style-name="ce9" table:formula="of:=[.C5]/[.E5]" office:value-type="float" office:value="3.41181688364624" calcext:value-type="float">
            <text:p>3.41181688364624</text:p>
          </table:table-cell>
          <table:table-cell table:style-name="ce9" table:formula="of:=[.C5]/[.F5]" office:value-type="float" office:value="6.02343936770576" calcext:value-type="float">
            <text:p>6.02343936770576</text:p>
          </table:table-cell>
          <table:table-cell table:style-name="ce9" table:formula="of:=[.C5]/[.G5]" office:value-type="float" office:value="4.17822388350962" calcext:value-type="float">
            <text:p>4.17822388350962</text:p>
          </table:table-cell>
          <table:table-cell table:style-name="ce9" table:formula="of:=[.C5]/[.H5]" office:value-type="float" office:value="8.63528965789419" calcext:value-type="float">
            <text:p>8.63528965789419</text:p>
          </table:table-cell>
          <table:table-cell table:style-name="ce9" table:formula="of:=[.C5]/[.I5]" office:value-type="float" office:value="11.3241075765761" calcext:value-type="float">
            <text:p>11.3241075765761</text:p>
          </table:table-cell>
          <table:table-cell table:style-name="ce9" table:formula="of:=[.C5]/[.J5]" office:value-type="float" office:value="12.7778930382665" calcext:value-type="float">
            <text:p>12.7778930382665</text:p>
          </table:table-cell>
          <table:table-cell table:number-columns-repeated="6"/>
          <table:table-cell table:style-name="Default" table:number-columns-repeated="6"/>
          <table:table-cell table:style-name="ce16" table:number-columns-repeated="16362"/>
        </table:table-row>
        <table:table-row table:style-name="ro2" table:number-rows-repeated="2">
          <table:table-cell table:number-columns-repeated="16"/>
          <table:table-cell table:style-name="Default" table:number-columns-repeated="6"/>
          <table:table-cell table:style-name="ce16" table:number-columns-repeated="16362"/>
        </table:table-row>
        <table:table-row table:style-name="ro2" table:number-rows-repeated="18">
          <table:table-cell table:number-columns-repeated="22"/>
          <table:table-cell table:style-name="ce16" table:number-columns-repeated="16362"/>
        </table:table-row>
        <table:table-row table:style-name="ro2">
          <table:table-cell/>
          <table:table-cell table:style-name="ce4" office:value-type="string" calcext:value-type="string" table:number-columns-spanned="10" table:number-rows-spanned="11">
            <text:p>Вывод</text:p>
            <text:p>Ускорение постепенно сходит на нет, т.к. потом мы упираемся в пропускную способность памяти. Ускорение сходит на нет уже на 8-16 потоках.</text:p>
            <text:p/>
            <text:p>В вопросе выбора количества потоков можно: </text:p>
            <text:p>- Cмотреть на эффективность (S(p) / p). Когда эффективность становится ниже 0.5, дальнейшее увеличение потоков становится бессмысленным.</text:p>
            <text:p>- Выбрать такое количество потоков, при котором достигается 80-90% от максимального ускорения</text:p>
            <text:p>- Если прирост ускорения менее 10-15% на удвоение потоков, то дальнейшее увеличение количества потоков нецелесообразно</text:p>
            <text:p/>
          </table:table-cell>
          <table:covered-table-cell table:number-columns-repeated="9"/>
          <table:table-cell table:number-columns-repeated="11"/>
          <table:table-cell table:style-name="ce16" table:number-columns-repeated="16362"/>
        </table:table-row>
        <table:table-row table:style-name="ro2">
          <table:table-cell/>
          <table:covered-table-cell table:number-columns-repeated="10"/>
          <table:table-cell table:number-columns-repeated="11"/>
          <table:table-cell table:style-name="ce16" table:number-columns-repeated="16362"/>
        </table:table-row>
        <table:table-row table:style-name="ro2">
          <table:table-cell/>
          <table:covered-table-cell table:number-columns-repeated="10"/>
          <table:table-cell table:number-columns-repeated="11"/>
          <table:table-cell table:style-name="ce16" table:number-columns-repeated="16362"/>
        </table:table-row>
        <table:table-row table:style-name="ro2">
          <table:table-cell/>
          <table:covered-table-cell table:number-columns-repeated="10"/>
          <table:table-cell table:number-columns-repeated="11"/>
          <table:table-cell table:style-name="ce16" table:number-columns-repeated="16362"/>
        </table:table-row>
        <table:table-row table:style-name="ro2">
          <table:table-cell/>
          <table:covered-table-cell table:number-columns-repeated="10"/>
          <table:table-cell table:number-columns-repeated="11"/>
          <table:table-cell table:style-name="ce16" table:number-columns-repeated="16362"/>
        </table:table-row>
        <table:table-row table:style-name="ro2">
          <table:table-cell/>
          <table:covered-table-cell table:number-columns-repeated="10"/>
          <table:table-cell table:number-columns-repeated="11"/>
          <table:table-cell table:style-name="ce16" table:number-columns-repeated="16362"/>
        </table:table-row>
        <table:table-row table:style-name="ro2">
          <table:table-cell/>
          <table:covered-table-cell table:number-columns-repeated="10"/>
          <table:table-cell table:number-columns-repeated="11"/>
          <table:table-cell table:style-name="ce16" table:number-columns-repeated="16362"/>
        </table:table-row>
        <table:table-row table:style-name="ro2">
          <table:table-cell/>
          <table:covered-table-cell table:number-columns-repeated="10"/>
          <table:table-cell table:number-columns-repeated="11"/>
          <table:table-cell table:style-name="ce16" table:number-columns-repeated="16362"/>
        </table:table-row>
        <table:table-row table:style-name="ro2">
          <table:table-cell/>
          <table:covered-table-cell table:number-columns-repeated="10"/>
          <table:table-cell table:number-columns-repeated="11"/>
          <table:table-cell table:style-name="ce16" table:number-columns-repeated="16362"/>
        </table:table-row>
        <table:table-row table:style-name="ro2">
          <table:table-cell/>
          <table:covered-table-cell table:number-columns-repeated="10"/>
          <table:table-cell table:number-columns-repeated="11"/>
          <table:table-cell table:style-name="ce16" table:number-columns-repeated="16362"/>
        </table:table-row>
        <table:table-row table:style-name="ro2">
          <table:table-cell/>
          <table:covered-table-cell table:number-columns-repeated="10"/>
          <table:table-cell table:number-columns-repeated="11"/>
          <table:table-cell table:style-name="ce16" table:number-columns-repeated="16362"/>
        </table:table-row>
        <table:table-row table:style-name="ro2" table:number-rows-repeated="1048528">
          <table:table-cell table:number-columns-repeated="22"/>
          <table:table-cell table:style-name="ce16" table:number-columns-repeated="16362"/>
        </table:table-row>
        <table:table-row table:style-name="ro1" table:number-rows-repeated="5">
          <table:table-cell table:number-columns-repeated="22"/>
          <table:table-cell table:style-name="ce16" table:number-columns-repeated="16362"/>
        </table:table-row>
        <table:table-row table:style-name="ro1">
          <table:table-cell table:number-columns-repeated="22"/>
          <table:table-cell table:style-name="ce16" table:number-columns-repeated="16362"/>
        </table:table-row>
      </table:table>
      <table:table table:name="2.2" table:style-name="ta1">
        <table:shapes>
          <draw:frame draw:z-index="0" draw:style-name="gr1" draw:text-style-name="P1" svg:width="6.298in" svg:height="3.5449in" svg:x="0.876in" svg:y="2.9024in">
            <draw:object draw:notify-on-update-of-ranges="'2.2'.B3:'2.2'.B10 '2.2'.C3:'2.2'.C10 '2.2'.B3:'2.2'.B10 '2.2'.E3:'2.2'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ce10"/>
        <table:table-column table:style-name="co1" table:number-columns-repeated="16376"/>
        <table:table-row table:style-name="ro2">
          <table:table-cell table:number-columns-repeated="8"/>
          <table:table-cell table:style-name="ce10" table:number-columns-repeated="16376"/>
        </table:table-row>
        <table:table-row table:style-name="ro2">
          <table:table-cell/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Linear S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S(p)</text:p>
          </table:table-cell>
          <table:table-cell table:number-columns-repeated="3"/>
          <table:table-cell table:style-name="ce10" table:number-columns-repeated="16376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528078" calcext:value-type="float">
            <text:p>0.52807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0" table:number-columns-repeated="16376"/>
        </table:table-row>
        <table:table-row table:style-name="ro2">
          <table:table-cell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.271039" calcext:value-type="float">
            <text:p>0.271039</text:p>
          </table:table-cell>
          <table:table-cell table:style-name="ce12" office:value-type="float" office:value="1.95" calcext:value-type="float">
            <text:p>1.95</text:p>
          </table:table-cell>
          <table:table-cell table:number-columns-repeated="3"/>
          <table:table-cell table:style-name="ce10" table:number-columns-repeated="16376"/>
        </table:table-row>
        <table:table-row table:style-name="ro2">
          <table:table-cell/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0.149429" calcext:value-type="float">
            <text:p>0.149429</text:p>
          </table:table-cell>
          <table:table-cell table:style-name="ce12" office:value-type="float" office:value="3.53" calcext:value-type="float">
            <text:p>3.53</text:p>
          </table:table-cell>
          <table:table-cell table:number-columns-repeated="3"/>
          <table:table-cell table:style-name="ce10" table:number-columns-repeated="16376"/>
        </table:table-row>
        <table:table-row table:style-name="ro2">
          <table:table-cell/>
          <table:table-cell table:number-columns-repeated="2" table:style-name="ce12" office:value-type="float" office:value="7" calcext:value-type="float">
            <text:p>7</text:p>
          </table:table-cell>
          <table:table-cell table:style-name="ce12" office:value-type="float" office:value="0.089133" calcext:value-type="float">
            <text:p>0.089133</text:p>
          </table:table-cell>
          <table:table-cell table:style-name="ce12" office:value-type="float" office:value="5.92" calcext:value-type="float">
            <text:p>5.92</text:p>
          </table:table-cell>
          <table:table-cell table:number-columns-repeated="3"/>
          <table:table-cell table:style-name="ce10" table:number-columns-repeated="16376"/>
        </table:table-row>
        <table:table-row table:style-name="ro2">
          <table:table-cell/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0.077398" calcext:value-type="float">
            <text:p>0.077398</text:p>
          </table:table-cell>
          <table:table-cell table:style-name="ce12" office:value-type="float" office:value="6.82" calcext:value-type="float">
            <text:p>6.82</text:p>
          </table:table-cell>
          <table:table-cell table:number-columns-repeated="3"/>
          <table:table-cell table:style-name="ce10" table:number-columns-repeated="16376"/>
        </table:table-row>
        <table:table-row table:style-name="ro2">
          <table:table-cell/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0.054355" calcext:value-type="float">
            <text:p>0.054355</text:p>
          </table:table-cell>
          <table:table-cell table:style-name="ce12" office:value-type="float" office:value="9.72" calcext:value-type="float">
            <text:p>9.72</text:p>
          </table:table-cell>
          <table:table-cell table:number-columns-repeated="3"/>
          <table:table-cell table:style-name="ce10" table:number-columns-repeated="16376"/>
        </table:table-row>
        <table:table-row table:style-name="ro2">
          <table:table-cell/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0.048577" calcext:value-type="float">
            <text:p>0.048577</text:p>
          </table:table-cell>
          <table:table-cell table:style-name="ce12" office:value-type="float" office:value="10.87" calcext:value-type="float">
            <text:p>10.87</text:p>
          </table:table-cell>
          <table:table-cell table:number-columns-repeated="3"/>
          <table:table-cell table:style-name="ce10" table:number-columns-repeated="16376"/>
        </table:table-row>
        <table:table-row table:style-name="ro2">
          <table:table-cell/>
          <table:table-cell table:number-columns-repeated="2" table:style-name="ce12" office:value-type="float" office:value="40" calcext:value-type="float">
            <text:p>40</text:p>
          </table:table-cell>
          <table:table-cell table:style-name="ce12" office:value-type="float" office:value="0.027484" calcext:value-type="float">
            <text:p>0.027484</text:p>
          </table:table-cell>
          <table:table-cell table:style-name="ce12" office:value-type="float" office:value="19.21" calcext:value-type="float">
            <text:p>19.21</text:p>
          </table:table-cell>
          <table:table-cell table:number-columns-repeated="3"/>
          <table:table-cell table:style-name="ce10" table:number-columns-repeated="16376"/>
        </table:table-row>
        <table:table-row table:style-name="ro2" table:number-rows-repeated="19">
          <table:table-cell table:number-columns-repeated="8"/>
          <table:table-cell table:style-name="ce10" table:number-columns-repeated="16376"/>
        </table:table-row>
        <table:table-row table:style-name="ro2">
          <table:table-cell/>
          <table:table-cell table:style-name="ce13" office:value-type="string" calcext:value-type="string" table:number-columns-spanned="7" table:number-rows-spanned="7">
            <text:p>Вывод</text:p>
            <text:p>atomic-секция создаёт небольшую задержку, однако вычисление функции доминирует. Ускорение постепенно сходит на нет после 8го потока, после чего замедляется, видимо, из-за накладных расходов на синхронизацию и разделяемую переменную.</text:p>
          </table:table-cell>
          <table:covered-table-cell table:number-columns-repeated="6"/>
          <table:table-cell table:style-name="ce10" table:number-columns-repeated="16376"/>
        </table:table-row>
        <table:table-row table:style-name="ro2">
          <table:table-cell/>
          <table:covered-table-cell table:number-columns-repeated="7"/>
          <table:table-cell table:style-name="ce10" table:number-columns-repeated="16376"/>
        </table:table-row>
        <table:table-row table:style-name="ro2">
          <table:table-cell/>
          <table:covered-table-cell table:number-columns-repeated="7"/>
          <table:table-cell table:style-name="ce10" table:number-columns-repeated="16376"/>
        </table:table-row>
        <table:table-row table:style-name="ro2">
          <table:table-cell/>
          <table:covered-table-cell table:number-columns-repeated="7"/>
          <table:table-cell table:style-name="ce10" table:number-columns-repeated="16376"/>
        </table:table-row>
        <table:table-row table:style-name="ro2">
          <table:table-cell/>
          <table:covered-table-cell table:number-columns-repeated="7"/>
          <table:table-cell table:style-name="ce10" table:number-columns-repeated="16376"/>
        </table:table-row>
        <table:table-row table:style-name="ro2">
          <table:table-cell/>
          <table:covered-table-cell table:number-columns-repeated="7"/>
          <table:table-cell table:style-name="ce10" table:number-columns-repeated="16376"/>
        </table:table-row>
        <table:table-row table:style-name="ro2">
          <table:table-cell/>
          <table:covered-table-cell table:number-columns-repeated="7"/>
          <table:table-cell table:style-name="ce10" table:number-columns-repeated="16376"/>
        </table:table-row>
        <table:table-row table:style-name="ro2" table:number-rows-repeated="1048535">
          <table:table-cell table:number-columns-repeated="8"/>
          <table:table-cell table:style-name="ce10" table:number-columns-repeated="16376"/>
        </table:table-row>
        <table:table-row table:style-name="ro1" table:number-rows-repeated="4">
          <table:table-cell table:number-columns-repeated="8"/>
          <table:table-cell table:style-name="ce10" table:number-columns-repeated="16376"/>
        </table:table-row>
        <table:table-row table:style-name="ro1">
          <table:table-cell table:number-columns-repeated="8"/>
          <table:table-cell table:style-name="ce10" table:number-columns-repeated="16376"/>
        </table:table-row>
      </table:table>
      <table:table table:name="2.3" table:style-name="ta1">
        <table:shapes>
          <draw:frame draw:z-index="0" draw:style-name="gr1" draw:text-style-name="P1" svg:width="6.2988in" svg:height="3.5425in" svg:x="1.0028in" svg:y="5.789in">
            <draw:object draw:notify-on-update-of-ranges="'2.3'.B4:'2.3'.B11 '2.3'.D15:'2.3'.D22 '2.3'.B4:'2.3'.B11 '2.3'.B4:'2.3'.B11 '2.3'.B4:'2.3'.B11 '2.3'.E15:'2.3'.E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ce10"/>
        <table:table-column table:style-name="co2" table:default-cell-style-name="ce10"/>
        <table:table-column table:style-name="co3" table:default-cell-style-name="ce10"/>
        <table:table-column table:style-name="co1" table:number-columns-repeated="5" table:default-cell-style-name="ce10"/>
        <table:table-column table:style-name="co1" table:number-columns-repeated="16368"/>
        <table:table-row table:style-name="ro2">
          <table:table-cell table:number-columns-repeated="16"/>
          <table:table-cell table:style-name="ce10" table:number-columns-repeated="16368"/>
        </table:table-row>
        <table:table-row table:style-name="ro2">
          <table:table-cell table:number-columns-repeated="9"/>
          <table:table-cell table:style-name="ce14" office:value-type="string" calcext:value-type="string" table:number-columns-spanned="3" table:number-rows-spanned="1">
            <text:p>Schedule_study for 8 threads</text:p>
          </table:table-cell>
          <table:covered-table-cell table:number-columns-repeated="2"/>
          <table:table-cell table:number-columns-repeated="4"/>
          <table:table-cell table:style-name="ce10">
            <draw:frame draw:z-index="1" draw:style-name="gr1" draw:text-style-name="P1" svg:width="6.2988in" svg:height="3.5425in" svg:x="0.1138in" svg:y="0.1272in">
              <draw:object draw:notify-on-update-of-ranges="'2.3'.K4:'2.3'.K6 '2.3'.J4:'2.3'.J4 '2.3'.L4:'2.3'.L6 '2.3'.K7:'2.3'.K9 '2.3'.J7:'2.3'.J7 '2.3'.L7:'2.3'.L9 '2.3'.K10:'2.3'.K12 '2.3'.J10:'2.3'.J10 '2.3'.L10:'2.3'.L1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0" table:number-columns-repeated="16367"/>
        </table:table-row>
        <table:table-row table:style-name="ro2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ariant1</text:p>
          </table:table-cell>
          <table:table-cell office:value-type="string" calcext:value-type="string">
            <text:p>Variant2</text:p>
          </table:table-cell>
          <table:table-cell table:number-columns-repeated="4"/>
          <table:table-cell office:value-type="string" calcext:value-type="string">
            <text:p>static,0: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647912" calcext:value-type="float">
            <text:p>5.647912</text:p>
          </table:table-cell>
          <table:table-cell table:number-columns-repeated="4"/>
          <table:table-cell table:style-name="ce10" table:number-columns-repeated="1636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0.885894" calcext:value-type="float">
            <text:p>30.885894</text:p>
          </table:table-cell>
          <table:table-cell office:value-type="float" office:value="37.970908" calcext:value-type="float">
            <text:p>37.970908</text:p>
          </table:table-cell>
          <table:table-cell office:value-type="float" office:value="36.299759" calcext:value-type="float">
            <text:p>36.299759</text:p>
          </table:table-cell>
          <table:table-cell table:number-columns-repeated="4"/>
          <table:table-cell office:value-type="string" calcext:value-type="string">
            <text:p>static,1: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.139887" calcext:value-type="float">
            <text:p>5.139887</text:p>
          </table:table-cell>
          <table:table-cell table:number-columns-repeated="4"/>
          <table:table-cell table:style-name="ce10" table:number-columns-repeated="1636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0.885894" calcext:value-type="float">
            <text:p>30.885894</text:p>
          </table:table-cell>
          <table:table-cell office:value-type="float" office:value="22.552394" calcext:value-type="float">
            <text:p>22.552394</text:p>
          </table:table-cell>
          <table:table-cell office:value-type="float" office:value="20.107208" calcext:value-type="float">
            <text:p>20.107208</text:p>
          </table:table-cell>
          <table:table-cell table:number-columns-repeated="4"/>
          <table:table-cell office:value-type="string" calcext:value-type="string">
            <text:p>static,16: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.832671" calcext:value-type="float">
            <text:p>4.832671</text:p>
          </table:table-cell>
          <table:table-cell table:number-columns-repeated="4"/>
          <table:table-cell table:style-name="ce10" table:number-columns-repeated="1636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0.885894" calcext:value-type="float">
            <text:p>30.885894</text:p>
          </table:table-cell>
          <table:table-cell office:value-type="float" office:value="11.309551" calcext:value-type="float">
            <text:p>11.309551</text:p>
          </table:table-cell>
          <table:table-cell office:value-type="float" office:value="11.052498" calcext:value-type="float">
            <text:p>11.052498</text:p>
          </table:table-cell>
          <table:table-cell table:number-columns-repeated="4"/>
          <table:table-cell office:value-type="string" calcext:value-type="string">
            <text:p>static,64: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4.744004" calcext:value-type="float">
            <text:p>4.744004</text:p>
          </table:table-cell>
          <table:table-cell table:number-columns-repeated="4"/>
          <table:table-cell table:style-name="ce10" table:number-columns-repeated="1636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0.885894" calcext:value-type="float">
            <text:p>30.885894</text:p>
          </table:table-cell>
          <table:table-cell office:value-type="float" office:value="6.939963" calcext:value-type="float">
            <text:p>6.939963</text:p>
          </table:table-cell>
          <table:table-cell office:value-type="float" office:value="7.089093" calcext:value-type="float">
            <text:p>7.089093</text:p>
          </table:table-cell>
          <table:table-cell table:number-columns-repeated="4"/>
          <table:table-cell office:value-type="string" calcext:value-type="string">
            <text:p>dynamic,1: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.735699" calcext:value-type="float">
            <text:p>4.735699</text:p>
          </table:table-cell>
          <table:table-cell table:number-columns-repeated="4"/>
          <table:table-cell table:style-name="ce10" table:number-columns-repeated="1636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0.885894" calcext:value-type="float">
            <text:p>30.885894</text:p>
          </table:table-cell>
          <table:table-cell office:value-type="float" office:value="7.419046" calcext:value-type="float">
            <text:p>7.419046</text:p>
          </table:table-cell>
          <table:table-cell office:value-type="float" office:value="6.178874" calcext:value-type="float">
            <text:p>6.178874</text:p>
          </table:table-cell>
          <table:table-cell table:number-columns-repeated="4"/>
          <table:table-cell office:value-type="string" calcext:value-type="string">
            <text:p>dynamic,16: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.665522" calcext:value-type="float">
            <text:p>4.665522</text:p>
          </table:table-cell>
          <table:table-cell table:number-columns-repeated="4"/>
          <table:table-cell table:style-name="ce10" table:number-columns-repeated="1636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0.885894" calcext:value-type="float">
            <text:p>30.885894</text:p>
          </table:table-cell>
          <table:table-cell office:value-type="float" office:value="2.988275" calcext:value-type="float">
            <text:p>2.988275</text:p>
          </table:table-cell>
          <table:table-cell office:value-type="float" office:value="2.9478" calcext:value-type="float">
            <text:p>2.9478</text:p>
          </table:table-cell>
          <table:table-cell table:number-columns-repeated="4"/>
          <table:table-cell office:value-type="string" calcext:value-type="string">
            <text:p>dynamic,64: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4.635498" calcext:value-type="float">
            <text:p>4.635498</text:p>
          </table:table-cell>
          <table:table-cell table:number-columns-repeated="4"/>
          <table:table-cell table:style-name="ce10" table:number-columns-repeated="16368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0.885894" calcext:value-type="float">
            <text:p>30.885894</text:p>
          </table:table-cell>
          <table:table-cell office:value-type="float" office:value="2.729156" calcext:value-type="float">
            <text:p>2.729156</text:p>
          </table:table-cell>
          <table:table-cell office:value-type="float" office:value="2.94158" calcext:value-type="float">
            <text:p>2.94158</text:p>
          </table:table-cell>
          <table:table-cell table:number-columns-repeated="4"/>
          <table:table-cell office:value-type="string" calcext:value-type="string">
            <text:p>guided,1: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.614243" calcext:value-type="float">
            <text:p>4.614243</text:p>
          </table:table-cell>
          <table:table-cell table:number-columns-repeated="4"/>
          <table:table-cell table:style-name="ce10" table:number-columns-repeated="16368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30.885894" calcext:value-type="float">
            <text:p>30.885894</text:p>
          </table:table-cell>
          <table:table-cell office:value-type="float" office:value="2.732314" calcext:value-type="float">
            <text:p>2.732314</text:p>
          </table:table-cell>
          <table:table-cell office:value-type="float" office:value="2.21307" calcext:value-type="float">
            <text:p>2.21307</text:p>
          </table:table-cell>
          <table:table-cell table:number-columns-repeated="4"/>
          <table:table-cell office:value-type="string" calcext:value-type="string">
            <text:p>guided,16: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.670448" calcext:value-type="float">
            <text:p>4.670448</text:p>
          </table:table-cell>
          <table:table-cell table:number-columns-repeated="4"/>
          <table:table-cell table:style-name="ce10" table:number-columns-repeated="16368"/>
        </table:table-row>
        <table:table-row table:style-name="ro2">
          <table:table-cell table:number-columns-repeated="9"/>
          <table:table-cell office:value-type="string" calcext:value-type="string">
            <text:p>guided,64: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4.660633" calcext:value-type="float">
            <text:p>4.660633</text:p>
          </table:table-cell>
          <table:table-cell table:number-columns-repeated="4"/>
          <table:table-cell table:style-name="ce10" table:number-columns-repeated="16368"/>
        </table:table-row>
        <table:table-row table:style-name="ro2">
          <table:table-cell table:number-columns-repeated="9"/>
          <table:table-cell office:value-type="string" calcext:value-type="string">
            <text:p>auto,0: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039778" calcext:value-type="float">
            <text:p>5.039778</text:p>
          </table:table-cell>
          <table:table-cell table:number-columns-repeated="4"/>
          <table:table-cell table:style-name="ce10" table:number-columns-repeated="16368"/>
        </table:table-row>
        <table:table-row table:style-name="ro2">
          <table:table-cell table:number-columns-repeated="3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style-name="ce10" table:number-columns-repeated="16368"/>
        </table:table-row>
        <table:table-row table:style-name="ro2">
          <table:table-cell table:number-columns-repeated="3"/>
          <table:table-cell table:formula="of:=[.C4]/[.D4]" office:value-type="float" office:value="0.813409413332965" calcext:value-type="float">
            <text:p>0.813409413332965</text:p>
          </table:table-cell>
          <table:table-cell table:formula="of:=[.C4]/[.E4]" office:value-type="float" office:value="0.850856723318742" calcext:value-type="float">
            <text:p>0.850856723318742</text:p>
          </table:table-cell>
          <table:table-cell table:number-columns-repeated="11"/>
          <table:table-cell table:style-name="ce10" table:number-columns-repeated="16368"/>
        </table:table-row>
        <table:table-row table:style-name="ro2">
          <table:table-cell table:number-columns-repeated="3"/>
          <table:table-cell table:formula="of:=[.C5]/[.D5]" office:value-type="float" office:value="1.3695173115546" calcext:value-type="float">
            <text:p>1.3695173115546</text:p>
          </table:table-cell>
          <table:table-cell table:formula="of:=[.C5]/[.E5]" office:value-type="float" office:value="1.53606079968935" calcext:value-type="float">
            <text:p>1.53606079968935</text:p>
          </table:table-cell>
          <table:table-cell table:number-columns-repeated="4"/>
          <table:table-cell table:style-name="ce15" office:value-type="string" calcext:value-type="string" table:number-columns-spanned="7" table:number-rows-spanned="24">
            <text:p>Выводы</text:p>
            <text:p>- Масштабируемость. На задачах с большим N ускорение обычно растёт до 8–16 потоков, затем замедляется или выходит на плато.</text:p>
            <text:p>- Сравнение вариантов. Вариант 2 (одна параллельная область) показывает меньшее время из-за отсутствия накладных расходов на многократное порождение параллельных секций. Разница особенно заметна при большом числе итераций.</text:p>
            <text:p>- Влияние schedule. Для равномерной вычислительной нагрузки (все строки матрицы одинаковы) оптимален static с chunk = 0 (блоки примерно поровну). dynamic/guided могут проигрывать из-за накладных расходов на динамическое назначение. Небольшой chunk (16–64) иногда улучшает балансировку при неравномерных помехах, но здесь задача сбалансирована, поэтому лучшим является static с большим блоком.</text:p>
          </table:table-cell>
          <table:covered-table-cell table:number-columns-repeated="6"/>
          <table:table-cell table:style-name="ce10" table:number-columns-repeated="16368"/>
        </table:table-row>
        <table:table-row table:style-name="ro2">
          <table:table-cell table:number-columns-repeated="3"/>
          <table:table-cell table:formula="of:=[.C6]/[.D6]" office:value-type="float" office:value="2.73095669315254" calcext:value-type="float">
            <text:p>2.73095669315254</text:p>
          </table:table-cell>
          <table:table-cell table:formula="of:=[.C6]/[.E6]" office:value-type="float" office:value="2.7944718017592" calcext:value-type="float">
            <text:p>2.7944718017592</text:p>
          </table:table-cell>
          <table:table-cell table:number-columns-repeated="4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3"/>
          <table:table-cell table:formula="of:=[.C7]/[.D7]" office:value-type="float" office:value="4.45044073001542" calcext:value-type="float">
            <text:p>4.45044073001542</text:p>
          </table:table-cell>
          <table:table-cell table:formula="of:=[.C7]/[.E7]" office:value-type="float" office:value="4.35681884833504" calcext:value-type="float">
            <text:p>4.35681884833504</text:p>
          </table:table-cell>
          <table:table-cell table:number-columns-repeated="4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3"/>
          <table:table-cell table:formula="of:=[.C8]/[.D8]" office:value-type="float" office:value="4.16305465689254" calcext:value-type="float">
            <text:p>4.16305465689254</text:p>
          </table:table-cell>
          <table:table-cell table:formula="of:=[.C8]/[.E8]" office:value-type="float" office:value="4.99862822902684" calcext:value-type="float">
            <text:p>4.99862822902684</text:p>
          </table:table-cell>
          <table:table-cell table:number-columns-repeated="4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3"/>
          <table:table-cell table:formula="of:=[.C9]/[.D9]" office:value-type="float" office:value="10.3356933347834" calcext:value-type="float">
            <text:p>10.3356933347834</text:p>
          </table:table-cell>
          <table:table-cell table:formula="of:=[.C9]/[.E9]" office:value-type="float" office:value="10.4776083859149" calcext:value-type="float">
            <text:p>10.4776083859149</text:p>
          </table:table-cell>
          <table:table-cell table:number-columns-repeated="4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3"/>
          <table:table-cell table:formula="of:=[.C10]/[.D10]" office:value-type="float" office:value="11.3170130252723" calcext:value-type="float">
            <text:p>11.3170130252723</text:p>
          </table:table-cell>
          <table:table-cell table:formula="of:=[.C10]/[.E10]" office:value-type="float" office:value="10.4997633924626" calcext:value-type="float">
            <text:p>10.4997633924626</text:p>
          </table:table-cell>
          <table:table-cell table:number-columns-repeated="4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3"/>
          <table:table-cell table:formula="of:=[.C11]/[.D11]" office:value-type="float" office:value="11.3039328569118" calcext:value-type="float">
            <text:p>11.3039328569118</text:p>
          </table:table-cell>
          <table:table-cell table:formula="of:=[.C11]/[.E11]" office:value-type="float" office:value="13.9561306239748" calcext:value-type="float">
            <text:p>13.9561306239748</text:p>
          </table:table-cell>
          <table:table-cell table:number-columns-repeated="4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>
          <table:table-cell table:number-columns-repeated="9"/>
          <table:covered-table-cell table:number-columns-repeated="7"/>
          <table:table-cell table:style-name="ce10" table:number-columns-repeated="16368"/>
        </table:table-row>
        <table:table-row table:style-name="ro2" table:number-rows-repeated="1048536">
          <table:table-cell table:number-columns-repeated="16"/>
          <table:table-cell table:style-name="ce10" table:number-columns-repeated="16368"/>
        </table:table-row>
        <table:table-row table:style-name="ro2">
          <table:table-cell table:number-columns-repeated="16"/>
          <table:table-cell table:style-name="ce10" table:number-columns-repeated="16368"/>
        </table:table-row>
      </table:table>
      <table:table table:name="3.1" table:style-name="ta1">
        <table:shapes>
          <draw:frame draw:z-index="0" draw:style-name="gr1" draw:text-style-name="P1" svg:width="6.2984in" svg:height="3.5425in" svg:x="9.1177in" svg:y="0.9906in">
            <draw:object draw:notify-on-update-of-ranges="'3.1'.C4:'3.1'.C11 '3.1'.C3:'3.1'.C3 '3.1'.C4:'3.1'.C11 '3.1'.C4:'3.1'.C11 '3.1'.D3:'3.1'.D3 '3.1'.G4:'3.1'.G11 '3.1'.C13:'3.1'.C20 '3.1'.E3:'3.1'.E3 '3.1'.G13:'3.1'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ce10"/>
        <table:table-column table:style-name="co1" table:number-columns-repeated="16373"/>
        <table:table-row table:style-name="ro2" table:number-rows-repeated="2">
          <table:table-cell table:number-columns-repeated="11"/>
          <table:table-cell table:style-name="ce10" table:number-columns-repeated="16373"/>
        </table:table-row>
        <table:table-row table:style-name="ro2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Thread</text:p>
          </table:table-cell>
          <table:table-cell/>
          <table:table-cell office:value-type="string" calcext:value-type="string">
            <text:p>Speed up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5954" calcext:value-type="float">
            <text:p>1.225954</text:p>
          </table:table-cell>
          <table:table-cell/>
          <table:table-cell table:formula="of:=[.D4]/[.E4]" office:value-type="float" office:value="1" calcext:value-type="float">
            <text:p>1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.225954" calcext:value-type="float">
            <text:p>1.225954</text:p>
          </table:table-cell>
          <table:table-cell office:value-type="float" office:value="0.347945" calcext:value-type="float">
            <text:p>0.347945</text:p>
          </table:table-cell>
          <table:table-cell/>
          <table:table-cell table:formula="of:=[.D5]/[.E5]" office:value-type="float" office:value="3.52341318311802" calcext:value-type="float">
            <text:p>3.52341318311802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.225954" calcext:value-type="float">
            <text:p>1.225954</text:p>
          </table:table-cell>
          <table:table-cell office:value-type="float" office:value="0.175363" calcext:value-type="float">
            <text:p>0.175363</text:p>
          </table:table-cell>
          <table:table-cell/>
          <table:table-cell table:formula="of:=[.D6]/[.E6]" office:value-type="float" office:value="6.99095020044137" calcext:value-type="float">
            <text:p>6.99095020044137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7" calcext:value-type="float">
            <text:p>7</text:p>
          </table:table-cell>
          <table:table-cell office:value-type="float" office:value="1.225954" calcext:value-type="float">
            <text:p>1.225954</text:p>
          </table:table-cell>
          <table:table-cell office:value-type="float" office:value="0.102065" calcext:value-type="float">
            <text:p>0.102065</text:p>
          </table:table-cell>
          <table:table-cell/>
          <table:table-cell table:formula="of:=[.D7]/[.E7]" office:value-type="float" office:value="12.0115024739137" calcext:value-type="float">
            <text:p>12.0115024739137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.225954" calcext:value-type="float">
            <text:p>1.225954</text:p>
          </table:table-cell>
          <table:table-cell office:value-type="float" office:value="0.090582" calcext:value-type="float">
            <text:p>0.090582</text:p>
          </table:table-cell>
          <table:table-cell/>
          <table:table-cell table:formula="of:=[.D8]/[.E8]" office:value-type="float" office:value="13.5341900156764" calcext:value-type="float">
            <text:p>13.5341900156764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1.225954" calcext:value-type="float">
            <text:p>1.225954</text:p>
          </table:table-cell>
          <table:table-cell office:value-type="float" office:value="0.046327" calcext:value-type="float">
            <text:p>0.046327</text:p>
          </table:table-cell>
          <table:table-cell/>
          <table:table-cell table:formula="of:=[.D9]/[.E9]" office:value-type="float" office:value="26.4630561011937" calcext:value-type="float">
            <text:p>26.4630561011937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.225954" calcext:value-type="float">
            <text:p>1.225954</text:p>
          </table:table-cell>
          <table:table-cell office:value-type="float" office:value="0.041698" calcext:value-type="float">
            <text:p>0.041698</text:p>
          </table:table-cell>
          <table:table-cell/>
          <table:table-cell table:formula="of:=[.D10]/[.E10]" office:value-type="float" office:value="29.4007866084704" calcext:value-type="float">
            <text:p>29.4007866084704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1.225954" calcext:value-type="float">
            <text:p>1.225954</text:p>
          </table:table-cell>
          <table:table-cell office:value-type="float" office:value="0.034875" calcext:value-type="float">
            <text:p>0.034875</text:p>
          </table:table-cell>
          <table:table-cell/>
          <table:table-cell table:formula="of:=[.D11]/[.E11]" office:value-type="float" office:value="35.1528028673835" calcext:value-type="float">
            <text:p>35.1528028673835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 table:number-columns-repeated="11"/>
          <table:table-cell table:style-name="ce10" table:number-columns-repeated="16373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34496" calcext:value-type="float">
            <text:p>2.534496</text:p>
          </table:table-cell>
          <table:table-cell/>
          <table:table-cell table:formula="of:=[.D13]/[.E13]" office:value-type="float" office:value="1" calcext:value-type="float">
            <text:p>1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2.534496" calcext:value-type="float">
            <text:p>2.534496</text:p>
          </table:table-cell>
          <table:table-cell office:value-type="float" office:value="1.428206" calcext:value-type="float">
            <text:p>1.428206</text:p>
          </table:table-cell>
          <table:table-cell/>
          <table:table-cell table:formula="of:=[.D14]/[.E14]" office:value-type="float" office:value="1.77460114297237" calcext:value-type="float">
            <text:p>1.77460114297237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2.534496" calcext:value-type="float">
            <text:p>2.534496</text:p>
          </table:table-cell>
          <table:table-cell office:value-type="float" office:value="0.678719" calcext:value-type="float">
            <text:p>0.678719</text:p>
          </table:table-cell>
          <table:table-cell/>
          <table:table-cell table:formula="of:=[.D15]/[.E15]" office:value-type="float" office:value="3.73423463907744" calcext:value-type="float">
            <text:p>3.73423463907744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7" calcext:value-type="float">
            <text:p>7</text:p>
          </table:table-cell>
          <table:table-cell office:value-type="float" office:value="2.534496" calcext:value-type="float">
            <text:p>2.534496</text:p>
          </table:table-cell>
          <table:table-cell office:value-type="float" office:value="0.389399" calcext:value-type="float">
            <text:p>0.389399</text:p>
          </table:table-cell>
          <table:table-cell/>
          <table:table-cell table:formula="of:=[.D16]/[.E16]" office:value-type="float" office:value="6.50873782418548" calcext:value-type="float">
            <text:p>6.50873782418548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8" calcext:value-type="float">
            <text:p>8</text:p>
          </table:table-cell>
          <table:table-cell office:value-type="float" office:value="2.534496" calcext:value-type="float">
            <text:p>2.534496</text:p>
          </table:table-cell>
          <table:table-cell office:value-type="float" office:value="0.382205" calcext:value-type="float">
            <text:p>0.382205</text:p>
          </table:table-cell>
          <table:table-cell/>
          <table:table-cell table:formula="of:=[.D17]/[.E17]" office:value-type="float" office:value="6.63124762889026" calcext:value-type="float">
            <text:p>6.63124762889026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16" calcext:value-type="float">
            <text:p>16</text:p>
          </table:table-cell>
          <table:table-cell office:value-type="float" office:value="2.534496" calcext:value-type="float">
            <text:p>2.534496</text:p>
          </table:table-cell>
          <table:table-cell office:value-type="float" office:value="0.167436" calcext:value-type="float">
            <text:p>0.167436</text:p>
          </table:table-cell>
          <table:table-cell/>
          <table:table-cell table:formula="of:=[.D18]/[.E18]" office:value-type="float" office:value="15.137103131943" calcext:value-type="float">
            <text:p>15.137103131943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2.534496" calcext:value-type="float">
            <text:p>2.534496</text:p>
          </table:table-cell>
          <table:table-cell office:value-type="float" office:value="0.15706" calcext:value-type="float">
            <text:p>0.15706</text:p>
          </table:table-cell>
          <table:table-cell/>
          <table:table-cell table:formula="of:=[.D19]/[.E19]" office:value-type="float" office:value="16.137119572138" calcext:value-type="float">
            <text:p>16.137119572138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40" calcext:value-type="float">
            <text:p>40</text:p>
          </table:table-cell>
          <table:table-cell office:value-type="float" office:value="2.534496" calcext:value-type="float">
            <text:p>2.534496</text:p>
          </table:table-cell>
          <table:table-cell office:value-type="float" office:value="0.144108" calcext:value-type="float">
            <text:p>0.144108</text:p>
          </table:table-cell>
          <table:table-cell/>
          <table:table-cell table:formula="of:=[.D20]/[.E20]" office:value-type="float" office:value="17.587476059622" calcext:value-type="float">
            <text:p>17.587476059622</text:p>
          </table:table-cell>
          <table:table-cell table:number-columns-repeated="4"/>
          <table:table-cell table:style-name="ce10" table:number-columns-repeated="16373"/>
        </table:table-row>
        <table:table-row table:style-name="ro2">
          <table:table-cell table:number-columns-repeated="11"/>
          <table:table-cell table:style-name="ce10" table:number-columns-repeated="16373"/>
        </table:table-row>
        <table:table-row table:style-name="ro2">
          <table:table-cell/>
          <table:table-cell table:style-name="ce13" office:value-type="string" calcext:value-type="string" table:number-columns-spanned="10" table:number-rows-spanned="11">
            <text:p><text:span text:style-name="T3">Масштабируемость хорошая до достижения предела пропускной способности памяти. На малом размере (20000) ускорение растёт почти линейно до 16-20 потоков, после чего прирост замедляется.</text:span></text:p>
            <text:p><text:span text:style-name="T3"/></text:p>
            <text:p><text:span text:style-name="T3">На большом размере (40000) ускорение выходит на плато уже к 16 потокам.</text:span></text:p>
          </table:table-cell>
          <table:covered-table-cell table:number-columns-repeated="9"/>
          <table:table-cell table:style-name="ce10" table:number-columns-repeated="16373"/>
        </table:table-row>
        <table:table-row table:style-name="ro2">
          <table:table-cell/>
          <table:covered-table-cell table:number-columns-repeated="10"/>
          <table:table-cell table:style-name="ce10" table:number-columns-repeated="16373"/>
        </table:table-row>
        <table:table-row table:style-name="ro2">
          <table:table-cell/>
          <table:covered-table-cell table:number-columns-repeated="10"/>
          <table:table-cell table:style-name="ce10" table:number-columns-repeated="16373"/>
        </table:table-row>
        <table:table-row table:style-name="ro2">
          <table:table-cell/>
          <table:covered-table-cell table:number-columns-repeated="10"/>
          <table:table-cell table:style-name="ce10" table:number-columns-repeated="16373"/>
        </table:table-row>
        <table:table-row table:style-name="ro2">
          <table:table-cell/>
          <table:covered-table-cell table:number-columns-repeated="10"/>
          <table:table-cell table:style-name="ce10" table:number-columns-repeated="16373"/>
        </table:table-row>
        <table:table-row table:style-name="ro2">
          <table:table-cell/>
          <table:covered-table-cell table:number-columns-repeated="10"/>
          <table:table-cell table:style-name="ce10" table:number-columns-repeated="16373"/>
        </table:table-row>
        <table:table-row table:style-name="ro2">
          <table:table-cell/>
          <table:covered-table-cell table:number-columns-repeated="10"/>
          <table:table-cell table:style-name="ce10" table:number-columns-repeated="16373"/>
        </table:table-row>
        <table:table-row table:style-name="ro2">
          <table:table-cell/>
          <table:covered-table-cell table:number-columns-repeated="10"/>
          <table:table-cell table:style-name="ce10" table:number-columns-repeated="16373"/>
        </table:table-row>
        <table:table-row table:style-name="ro2">
          <table:table-cell/>
          <table:covered-table-cell table:number-columns-repeated="10"/>
          <table:table-cell table:style-name="ce10" table:number-columns-repeated="16373"/>
        </table:table-row>
        <table:table-row table:style-name="ro2">
          <table:table-cell/>
          <table:covered-table-cell table:number-columns-repeated="10"/>
          <table:table-cell table:style-name="ce10" table:number-columns-repeated="16373"/>
        </table:table-row>
        <table:table-row table:style-name="ro2">
          <table:table-cell/>
          <table:covered-table-cell table:number-columns-repeated="10"/>
          <table:table-cell table:style-name="ce10" table:number-columns-repeated="16373"/>
        </table:table-row>
        <table:table-row table:style-name="ro2" table:number-rows-repeated="1048543">
          <table:table-cell table:number-columns-repeated="11"/>
          <table:table-cell table:style-name="ce10" table:number-columns-repeated="16373"/>
        </table:table-row>
        <table:table-row table:style-name="ro2">
          <table:table-cell table:number-columns-repeated="11"/>
          <table:table-cell table:style-name="ce10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1">00/00/0000</text:date>, <text:time style:data-style-name="N2" text:time-value="10:07:25.7397591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02:25:42.873216604</meta:creation-date>
    <dc:date>2026-05-21T13:18:11.062084244</dc:date>
    <meta:editing-duration>PT2H27M28S</meta:editing-duration>
    <meta:editing-cycles>10</meta:editing-cycles>
    <meta:generator>LibreOffice/25.8.6.2$Linux_X86_64 LibreOffice_project/580$Build-2</meta:generator>
    <meta:document-statistic meta:table-count="5" meta:cell-count="273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svg:x="0.319cm" svg:y="0.18cm" svg:width="15.36cm" svg:height="8.645cm">
          <chart:coordinate-region svg:x="0.953cm" svg:y="0.38cm" svg:width="14.533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2.1'.D9:'2.1'.J9" chart:class="chart:scatter">
            <chart:domain table:cell-range-address="'2.1'.D8:'2.1'.J8"/>
            <chart:data-point chart:repeated="7"/>
          </chart:series>
          <chart:series chart:style-name="ch6" chart:values-cell-range-address="'2.1'.D10:'2.1'.J10" chart:class="chart:scatter">
            <chart:data-point chart:repeated="7"/>
          </chart:series>
          <chart:series chart:style-name="ch7" chart:values-cell-range-address="'2.1'.D11:'2.1'.J1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2.1'.D8:'2.1'.J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2.1'.D9:'2.1'.J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.24527987316527">
                <text:p>2.24527987316527</text:p>
                <draw:g>
                  <svg:desc>'2.1'.D10:'2.1'.J10</svg:desc>
                </draw:g>
              </table:table-cell>
              <table:table-cell office:value-type="float" office:value="2.76162913294887">
                <text:p>2.76162913294887</text:p>
              </table:table-cell>
              <table:table-cell office:value-type="float" office:value="3.78976738752993">
                <text:p>3.78976738752993</text:p>
              </table:table-cell>
              <table:table-cell office:value-type="float" office:value="9.02278573821367">
                <text:p>9.02278573821367</text:p>
              </table:table-cell>
              <table:table-cell office:value-type="float" office:value="15.4400147096998">
                <text:p>15.4400147096998</text:p>
              </table:table-cell>
              <table:table-cell office:value-type="float" office:value="13.368188415976">
                <text:p>13.368188415976</text:p>
              </table:table-cell>
              <table:table-cell office:value-type="float" office:value="18.5503287678353">
                <text:p>18.5503287678353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.88465324989913">
                <text:p>1.88465324989913</text:p>
                <draw:g>
                  <svg:desc>'2.1'.D11:'2.1'.J11</svg:desc>
                </draw:g>
              </table:table-cell>
              <table:table-cell office:value-type="float" office:value="3.41181688364624">
                <text:p>3.41181688364624</text:p>
              </table:table-cell>
              <table:table-cell office:value-type="float" office:value="6.02343936770576">
                <text:p>6.02343936770576</text:p>
              </table:table-cell>
              <table:table-cell office:value-type="float" office:value="4.17822388350962">
                <text:p>4.17822388350962</text:p>
              </table:table-cell>
              <table:table-cell office:value-type="float" office:value="8.63528965789419">
                <text:p>8.63528965789419</text:p>
              </table:table-cell>
              <table:table-cell office:value-type="float" office:value="11.3241075765761">
                <text:p>11.3241075765761</text:p>
              </table:table-cell>
              <table:table-cell office:value-type="float" office:value="12.7778930382665">
                <text:p>12.7778930382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369a3" draw:fill-color="#0369a3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svg:x="0.319cm" svg:y="0.18cm" svg:width="15.36cm" svg:height="8.645cm">
          <chart:coordinate-region svg:x="0.953cm" svg:y="0.38cm" svg:width="14.533cm" svg:height="7.7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2.2'.C3:'2.2'.C10" chart:class="chart:scatter">
            <chart:domain table:cell-range-address="'2.2'.B3:'2.2'.B10"/>
            <chart:data-point chart:repeated="8"/>
          </chart:series>
          <chart:series chart:style-name="ch7" chart:values-cell-range-address="'2.2'.E3:'2.2'.E10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.2'.B3:'2.2'.B10</svg:desc>
                </draw:g>
              </table:table-cell>
              <table:table-cell office:value-type="float" office:value="1">
                <text:p>1</text:p>
                <draw:g>
                  <svg:desc>'2.2'.C3:'2.2'.C10</svg:desc>
                </draw:g>
              </table:table-cell>
              <table:table-cell office:value-type="float" office:value="1">
                <text:p>1</text:p>
                <draw:g>
                  <svg:desc>'2.2'.E3:'2.2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.21">
                <text:p>19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scatter" chart:style-name="ch1">
        <chart:plot-area chart:style-name="ch2" svg:x="0.319cm" svg:y="0.179cm" svg:width="15.361cm" svg:height="8.641cm">
          <chart:coordinate-region svg:x="0.953cm" svg:y="0.378cm" svg:width="14.534cm" svg:height="7.7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3.1'.C4:'3.1'.C11" chart:label-cell-address="'3.1'.C3:'3.1'.C3" chart:class="chart:scatter">
            <chart:domain table:cell-range-address="'3.1'.C4:'3.1'.C11"/>
            <chart:data-point chart:repeated="8"/>
          </chart:series>
          <chart:series chart:style-name="ch7" chart:values-cell-range-address="'3.1'.G4:'3.1'.G11" chart:label-cell-address="'3.1'.D3:'3.1'.D3" chart:class="chart:scatter">
            <chart:data-point chart:repeated="8"/>
          </chart:series>
          <chart:series chart:style-name="ch8" chart:values-cell-range-address="'3.1'.G13:'3.1'.G20" chart:label-cell-address="'3.1'.E3:'3.1'.E3" chart:class="chart:scatter">
            <chart:domain table:cell-range-address="'3.1'.C13:'3.1'.C2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reads</text:p>
                <draw:g>
                  <svg:desc>'3.1'.C3:'3.1'.C3</svg:desc>
                </draw:g>
              </table:table-cell>
              <table:table-cell office:value-type="string">
                <text:p>Serial</text:p>
                <draw:g>
                  <svg:desc>'3.1'.D3:'3.1'.D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hread</text:p>
                <draw:g>
                  <svg:desc>'3.1'.E3:'3.1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.1'.C4:'3.1'.C11</svg:desc>
                </draw:g>
              </table:table-cell>
              <table:table-cell office:value-type="float" office:value="1">
                <text:p>1</text:p>
                <draw:g>
                  <svg:desc>'3.1'.C4:'3.1'.C11</svg:desc>
                </draw:g>
              </table:table-cell>
              <table:table-cell office:value-type="float" office:value="1">
                <text:p>1</text:p>
                <draw:g>
                  <svg:desc>'3.1'.G4:'3.1'.G11</svg:desc>
                </draw:g>
              </table:table-cell>
              <table:table-cell office:value-type="float" office:value="1">
                <text:p>1</text:p>
                <draw:g>
                  <svg:desc>'3.1'.C13:'3.1'.C20</svg:desc>
                </draw:g>
              </table:table-cell>
              <table:table-cell office:value-type="float" office:value="1">
                <text:p>1</text:p>
                <draw:g>
                  <svg:desc>'3.1'.G13:'3.1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2341318311802">
                <text:p>3.52341318311802</text:p>
              </table:table-cell>
              <table:table-cell office:value-type="float" office:value="2">
                <text:p>2</text:p>
              </table:table-cell>
              <table:table-cell office:value-type="float" office:value="1.77460114297237">
                <text:p>1.77460114297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9095020044137">
                <text:p>6.99095020044137</text:p>
              </table:table-cell>
              <table:table-cell office:value-type="float" office:value="4">
                <text:p>4</text:p>
              </table:table-cell>
              <table:table-cell office:value-type="float" office:value="3.73423463907744">
                <text:p>3.73423463907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0115024739137">
                <text:p>12.0115024739137</text:p>
              </table:table-cell>
              <table:table-cell office:value-type="float" office:value="7">
                <text:p>7</text:p>
              </table:table-cell>
              <table:table-cell office:value-type="float" office:value="6.50873782418548">
                <text:p>6.50873782418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5341900156764">
                <text:p>13.5341900156764</text:p>
              </table:table-cell>
              <table:table-cell office:value-type="float" office:value="8">
                <text:p>8</text:p>
              </table:table-cell>
              <table:table-cell office:value-type="float" office:value="6.63124762889026">
                <text:p>6.63124762889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.4630561011937">
                <text:p>26.4630561011937</text:p>
              </table:table-cell>
              <table:table-cell office:value-type="float" office:value="16">
                <text:p>16</text:p>
              </table:table-cell>
              <table:table-cell office:value-type="float" office:value="15.137103131943">
                <text:p>15.137103131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9.4007866084704">
                <text:p>29.4007866084704</text:p>
              </table:table-cell>
              <table:table-cell office:value-type="float" office:value="20">
                <text:p>20</text:p>
              </table:table-cell>
              <table:table-cell office:value-type="float" office:value="16.137119572138">
                <text:p>16.137119572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5.1528028673835">
                <text:p>35.1528028673835</text:p>
              </table:table-cell>
              <table:table-cell office:value-type="float" office:value="40">
                <text:p>40</text:p>
              </table:table-cell>
              <table:table-cell office:value-type="float" office:value="17.587476059622">
                <text:p>17.5874760596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plot-area chart:style-name="ch2" svg:x="0.32cm" svg:y="0.179cm" svg:width="15.36cm" svg:height="8.641cm">
          <chart:coordinate-region svg:x="0.954cm" svg:y="0.378cm" svg:width="14.533cm" svg:height="7.7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2.3'.D15:'2.3'.D22" chart:class="chart:scatter">
            <chart:domain table:cell-range-address="'2.3'.B4:'2.3'.B11"/>
            <chart:data-point chart:repeated="8"/>
          </chart:series>
          <chart:series chart:style-name="ch7" chart:values-cell-range-address="'2.3'.B4:'2.3'.B11" chart:class="chart:scatter">
            <chart:data-point chart:repeated="8"/>
          </chart:series>
          <chart:series chart:style-name="ch8" chart:values-cell-range-address="'2.3'.E15:'2.3'.E22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.3'.B4:'2.3'.B11</svg:desc>
                </draw:g>
              </table:table-cell>
              <table:table-cell office:value-type="float" office:value="0.813409413332965">
                <text:p>0.813409413332965</text:p>
                <draw:g>
                  <svg:desc>'2.3'.D15:'2.3'.D22</svg:desc>
                </draw:g>
              </table:table-cell>
              <table:table-cell office:value-type="float" office:value="1">
                <text:p>1</text:p>
                <draw:g>
                  <svg:desc>'2.3'.B4:'2.3'.B11</svg:desc>
                </draw:g>
              </table:table-cell>
              <table:table-cell office:value-type="float" office:value="0.850856723318742">
                <text:p>0.850856723318742</text:p>
                <draw:g>
                  <svg:desc>'2.3'.E15:'2.3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695173115546">
                <text:p>1.3695173115546</text:p>
              </table:table-cell>
              <table:table-cell office:value-type="float" office:value="2">
                <text:p>2</text:p>
              </table:table-cell>
              <table:table-cell office:value-type="float" office:value="1.53606079968935">
                <text:p>1.53606079968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73095669315254">
                <text:p>2.73095669315254</text:p>
              </table:table-cell>
              <table:table-cell office:value-type="float" office:value="4">
                <text:p>4</text:p>
              </table:table-cell>
              <table:table-cell office:value-type="float" office:value="2.7944718017592">
                <text:p>2.7944718017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.45044073001542">
                <text:p>4.45044073001542</text:p>
              </table:table-cell>
              <table:table-cell office:value-type="float" office:value="7">
                <text:p>7</text:p>
              </table:table-cell>
              <table:table-cell office:value-type="float" office:value="4.35681884833504">
                <text:p>4.35681884833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16305465689254">
                <text:p>4.16305465689254</text:p>
              </table:table-cell>
              <table:table-cell office:value-type="float" office:value="8">
                <text:p>8</text:p>
              </table:table-cell>
              <table:table-cell office:value-type="float" office:value="4.99862822902684">
                <text:p>4.99862822902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0.3356933347834">
                <text:p>10.3356933347834</text:p>
              </table:table-cell>
              <table:table-cell office:value-type="float" office:value="16">
                <text:p>16</text:p>
              </table:table-cell>
              <table:table-cell office:value-type="float" office:value="10.4776083859149">
                <text:p>10.4776083859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1.3170130252723">
                <text:p>11.3170130252723</text:p>
              </table:table-cell>
              <table:table-cell office:value-type="float" office:value="20">
                <text:p>20</text:p>
              </table:table-cell>
              <table:table-cell office:value-type="float" office:value="10.4997633924626">
                <text:p>10.4997633924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039328569118">
                <text:p>11.3039328569118</text:p>
              </table:table-cell>
              <table:table-cell office:value-type="float" office:value="40">
                <text:p>40</text:p>
              </table:table-cell>
              <table:table-cell office:value-type="float" office:value="13.9561306239748">
                <text:p>13.95613062397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2.993cm" svg:y="3.702cm" style:legend-expansion="high" chart:style-name="ch2"/>
        <chart:plot-area chart:style-name="ch3" svg:x="0.32cm" svg:y="0.179cm" svg:width="12.353cm" svg:height="8.641cm">
          <chart:coordinate-region svg:x="1.049cm" svg:y="0.378cm" svg:width="11.431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.3'.L4:'2.3'.L6" chart:label-cell-address="'2.3'.J4:'2.3'.J4" chart:class="chart:scatter">
            <chart:domain table:cell-range-address="'2.3'.K4:'2.3'.K6"/>
            <chart:data-point chart:repeated="3"/>
          </chart:series>
          <chart:series chart:style-name="ch8" chart:values-cell-range-address="'2.3'.L7:'2.3'.L9" chart:label-cell-address="'2.3'.J7:'2.3'.J7" chart:class="chart:scatter">
            <chart:domain table:cell-range-address="'2.3'.K7:'2.3'.K9"/>
            <chart:data-point chart:repeated="3"/>
          </chart:series>
          <chart:series chart:style-name="ch9" chart:values-cell-range-address="'2.3'.L10:'2.3'.L12" chart:label-cell-address="'2.3'.J10:'2.3'.J10" chart:class="chart:scatter">
            <chart:domain table:cell-range-address="'2.3'.K10:'2.3'.K1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tatic,1:</text:p>
                <draw:g>
                  <svg:desc>'2.3'.J4:'2.3'.J4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dynamic,1:</text:p>
                <draw:g>
                  <svg:desc>'2.3'.J7:'2.3'.J7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guided,1:</text:p>
                <draw:g>
                  <svg:desc>'2.3'.J10:'2.3'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.3'.K4:'2.3'.K6</svg:desc>
                </draw:g>
              </table:table-cell>
              <table:table-cell office:value-type="float" office:value="5.139887">
                <text:p>5.139887</text:p>
                <draw:g>
                  <svg:desc>'2.3'.L4:'2.3'.L6</svg:desc>
                </draw:g>
              </table:table-cell>
              <table:table-cell office:value-type="float" office:value="1">
                <text:p>1</text:p>
                <draw:g>
                  <svg:desc>'2.3'.K7:'2.3'.K9</svg:desc>
                </draw:g>
              </table:table-cell>
              <table:table-cell office:value-type="float" office:value="4.735699">
                <text:p>4.735699</text:p>
                <draw:g>
                  <svg:desc>'2.3'.L7:'2.3'.L9</svg:desc>
                </draw:g>
              </table:table-cell>
              <table:table-cell office:value-type="float" office:value="1">
                <text:p>1</text:p>
                <draw:g>
                  <svg:desc>'2.3'.K10:'2.3'.K12</svg:desc>
                </draw:g>
              </table:table-cell>
              <table:table-cell office:value-type="float" office:value="4.614243">
                <text:p>4.614243</text:p>
                <draw:g>
                  <svg:desc>'2.3'.L10:'2.3'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4.832671">
                <text:p>4.832671</text:p>
              </table:table-cell>
              <table:table-cell office:value-type="float" office:value="16">
                <text:p>16</text:p>
              </table:table-cell>
              <table:table-cell office:value-type="float" office:value="4.665522">
                <text:p>4.665522</text:p>
              </table:table-cell>
              <table:table-cell office:value-type="float" office:value="16">
                <text:p>16</text:p>
              </table:table-cell>
              <table:table-cell office:value-type="float" office:value="4.670448">
                <text:p>4.670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4.744004">
                <text:p>4.744004</text:p>
              </table:table-cell>
              <table:table-cell office:value-type="float" office:value="64">
                <text:p>64</text:p>
              </table:table-cell>
              <table:table-cell office:value-type="float" office:value="4.635498">
                <text:p>4.635498</text:p>
              </table:table-cell>
              <table:table-cell office:value-type="float" office:value="64">
                <text:p>64</text:p>
              </table:table-cell>
              <table:table-cell office:value-type="float" office:value="4.660633">
                <text:p>4.6606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