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.1" table:style-name="ta1">
        <table:shapes>
          <draw:frame draw:z-index="0" draw:style-name="gr1" draw:text-style-name="P1" svg:width="6.298in" svg:height="3.5449in" svg:x="1.3984in" svg:y="2.5094in">
            <draw:object draw:notify-on-update-of-ranges="'2.1'.C7:'2.1'.I7 '2.1'.C8:'2.1'.I8 '2.1'.C7:'2.1'.I7 '2.1'.C9:'2.1'.I9 '2.1'.C7:'2.1'.I7 '2.1'.C10:'2.1'.I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.427522" calcext:value-type="float">
            <text:p>1.427522</text:p>
          </table:table-cell>
          <table:table-cell office:value-type="float" office:value="0.635788" calcext:value-type="float">
            <text:p>0.635788</text:p>
          </table:table-cell>
          <table:table-cell office:value-type="float" office:value="0.516913" calcext:value-type="float">
            <text:p>0.516913</text:p>
          </table:table-cell>
          <table:table-cell office:value-type="float" office:value="0.376678" calcext:value-type="float">
            <text:p>0.376678</text:p>
          </table:table-cell>
          <table:table-cell office:value-type="float" office:value="0.158213" calcext:value-type="float">
            <text:p>0.158213</text:p>
          </table:table-cell>
          <table:table-cell office:value-type="float" office:value="0.092456" calcext:value-type="float">
            <text:p>0.092456</text:p>
          </table:table-cell>
          <table:table-cell office:value-type="float" office:value="0.106785" calcext:value-type="float">
            <text:p>0.106785</text:p>
          </table:table-cell>
          <table:table-cell office:value-type="float" office:value="0.076954" calcext:value-type="float">
            <text:p>0.076954</text:p>
          </table:table-cell>
        </table:table-row>
        <table:table-row table:style-name="ro1">
          <table:table-cell/>
          <table:table-cell office:value-type="float" office:value="4.988745" calcext:value-type="float">
            <text:p>4.988745</text:p>
          </table:table-cell>
          <table:table-cell office:value-type="float" office:value="2.647036" calcext:value-type="float">
            <text:p>2.647036</text:p>
          </table:table-cell>
          <table:table-cell office:value-type="float" office:value="1.462196" calcext:value-type="float">
            <text:p>1.462196</text:p>
          </table:table-cell>
          <table:table-cell office:value-type="float" office:value="0.828222" calcext:value-type="float">
            <text:p>0.828222</text:p>
          </table:table-cell>
          <table:table-cell office:value-type="float" office:value="1.193987" calcext:value-type="float">
            <text:p>1.193987</text:p>
          </table:table-cell>
          <table:table-cell office:value-type="float" office:value="0.577716" calcext:value-type="float">
            <text:p>0.577716</text:p>
          </table:table-cell>
          <table:table-cell office:value-type="float" office:value="0.440542" calcext:value-type="float">
            <text:p>0.440542</text:p>
          </table:table-cell>
          <table:table-cell office:value-type="float" office:value="0.39042" calcext:value-type="float">
            <text:p>0.3904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formula="of:=[.B3]/[.C3]" office:value-type="float" office:value="2.24527987316527" calcext:value-type="float">
            <text:p>2.24527987316527</text:p>
          </table:table-cell>
          <table:table-cell table:formula="of:=[.B3]/[.D3]" office:value-type="float" office:value="2.76162913294887" calcext:value-type="float">
            <text:p>2.76162913294887</text:p>
          </table:table-cell>
          <table:table-cell table:formula="of:=[.B3]/[.E3]" office:value-type="float" office:value="3.78976738752993" calcext:value-type="float">
            <text:p>3.78976738752993</text:p>
          </table:table-cell>
          <table:table-cell table:formula="of:=[.B3]/[.F3]" office:value-type="float" office:value="9.02278573821367" calcext:value-type="float">
            <text:p>9.02278573821367</text:p>
          </table:table-cell>
          <table:table-cell table:formula="of:=[.B3]/[.G3]" office:value-type="float" office:value="15.4400147096998" calcext:value-type="float">
            <text:p>15.4400147096998</text:p>
          </table:table-cell>
          <table:table-cell table:formula="of:=[.B3]/[.H3]" office:value-type="float" office:value="13.368188415976" calcext:value-type="float">
            <text:p>13.368188415976</text:p>
          </table:table-cell>
          <table:table-cell table:formula="of:=[.B3]/[.I3]" office:value-type="float" office:value="18.5503287678353" calcext:value-type="float">
            <text:p>18.5503287678353</text:p>
          </table:table-cell>
        </table:table-row>
        <table:table-row table:style-name="ro1">
          <table:table-cell table:number-columns-repeated="2"/>
          <table:table-cell table:formula="of:=[.B4]/[.C4]" office:value-type="float" office:value="1.88465324989913" calcext:value-type="float">
            <text:p>1.88465324989913</text:p>
          </table:table-cell>
          <table:table-cell table:formula="of:=[.B4]/[.D4]" office:value-type="float" office:value="3.41181688364624" calcext:value-type="float">
            <text:p>3.41181688364624</text:p>
          </table:table-cell>
          <table:table-cell table:formula="of:=[.B4]/[.E4]" office:value-type="float" office:value="6.02343936770576" calcext:value-type="float">
            <text:p>6.02343936770576</text:p>
          </table:table-cell>
          <table:table-cell table:formula="of:=[.B4]/[.F4]" office:value-type="float" office:value="4.17822388350962" calcext:value-type="float">
            <text:p>4.17822388350962</text:p>
          </table:table-cell>
          <table:table-cell table:formula="of:=[.B4]/[.G4]" office:value-type="float" office:value="8.63528965789419" calcext:value-type="float">
            <text:p>8.63528965789419</text:p>
          </table:table-cell>
          <table:table-cell table:formula="of:=[.B4]/[.H4]" office:value-type="float" office:value="11.3241075765761" calcext:value-type="float">
            <text:p>11.3241075765761</text:p>
          </table:table-cell>
          <table:table-cell table:formula="of:=[.B4]/[.I4]" office:value-type="float" office:value="12.7778930382665" calcext:value-type="float">
            <text:p>12.7778930382665</text:p>
          </table:table-cell>
        </table:table-row>
      </table:table>
      <table:table table:name="2.2" table:style-name="ta1">
        <table:shapes>
          <draw:frame draw:z-index="0" draw:style-name="gr1" draw:text-style-name="P1" svg:width="6.298in" svg:height="3.5449in" svg:x="0.889in" svg:y="1.8614in">
            <draw:object draw:notify-on-update-of-ranges="'2.2'.B1:'2.2'.B8 '2.2'.C1:'2.2'.C8 '2.2'.B1:'2.2'.B8 '2.2'.E1:'2.2'.E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528078" calcext:value-type="float">
            <text:p>0.528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271039" calcext:value-type="float">
            <text:p>0.271039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.149429" calcext:value-type="float">
            <text:p>0.149429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0.089133" calcext:value-type="float">
            <text:p>0.089133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.077398" calcext:value-type="float">
            <text:p>0.077398</text:p>
          </table:table-cell>
          <table:table-cell office:value-type="float" office:value="6.82" calcext:value-type="float">
            <text:p>6.82</text:p>
          </table:table-cell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0.054355" calcext:value-type="float">
            <text:p>0.054355</text:p>
          </table:table-cell>
          <table:table-cell office:value-type="float" office:value="9.72" calcext:value-type="float">
            <text:p>9.72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0.048577" calcext:value-type="float">
            <text:p>0.048577</text:p>
          </table:table-cell>
          <table:table-cell office:value-type="float" office:value="10.87" calcext:value-type="float">
            <text:p>10.87</text:p>
          </table:table-cell>
        </table:table-row>
        <table:table-row table:style-name="ro1">
          <table:table-cell/>
          <table:table-cell table:number-columns-repeated="2" office:value-type="float" office:value="40" calcext:value-type="float">
            <text:p>40</text:p>
          </table:table-cell>
          <table:table-cell office:value-type="float" office:value="0.027484" calcext:value-type="float">
            <text:p>0.027484</text:p>
          </table:table-cell>
          <table:table-cell office:value-type="float" office:value="19.21" calcext:value-type="float">
            <text:p>19.21</text:p>
          </table:table-cell>
        </table:table-row>
      </table:table>
      <table:table table:name="2.3" table:style-name="ta1">
        <table:table-column table:style-name="co1" table:number-columns-repeated="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60463" calcext:value-type="float">
            <text:p>1.160463</text:p>
          </table:table-cell>
          <table:table-cell table:number-columns-repeated="7"/>
          <table:table-cell office:value-type="string" calcext:value-type="string">
            <text:p>static</text:p>
          </table:table-cell>
          <table:table-cell office:value-type="float" office:value="0" calcext:value-type="float">
            <text:p>0</text:p>
          </table:table-cell>
          <table:table-cell office:value-type="float" office:value="0.132092" calcext:value-type="float">
            <text:p>0.1320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0354" calcext:value-type="float">
            <text:p>0.510354</text:p>
          </table:table-cell>
          <table:table-cell office:value-type="float" office:value="0.502002" calcext:value-type="float">
            <text:p>0.502002</text:p>
          </table:table-cell>
          <table:table-cell table:number-columns-repeated="7"/>
          <table:table-cell office:value-type="string" calcext:value-type="string">
            <text:p>static</text:p>
          </table:table-cell>
          <table:table-cell office:value-type="float" office:value="1" calcext:value-type="float">
            <text:p>1</text:p>
          </table:table-cell>
          <table:table-cell office:value-type="float" office:value="0.138669" calcext:value-type="float">
            <text:p>0.1386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94009" calcext:value-type="float">
            <text:p>0.294009</text:p>
          </table:table-cell>
          <table:table-cell office:value-type="float" office:value="0.266566" calcext:value-type="float">
            <text:p>0.266566</text:p>
          </table:table-cell>
          <table:table-cell table:number-columns-repeated="7"/>
          <table:table-cell office:value-type="string" calcext:value-type="string">
            <text:p>static</text:p>
          </table:table-cell>
          <table:table-cell office:value-type="float" office:value="16" calcext:value-type="float">
            <text:p>16</text:p>
          </table:table-cell>
          <table:table-cell office:value-type="float" office:value="0.130567" calcext:value-type="float">
            <text:p>0.1305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65712" calcext:value-type="float">
            <text:p>0.165712</text:p>
          </table:table-cell>
          <table:table-cell office:value-type="float" office:value="0.144558" calcext:value-type="float">
            <text:p>0.144558</text:p>
          </table:table-cell>
          <table:table-cell table:number-columns-repeated="7"/>
          <table:table-cell office:value-type="string" calcext:value-type="string">
            <text:p>static</text:p>
          </table:table-cell>
          <table:table-cell office:value-type="float" office:value="64" calcext:value-type="float">
            <text:p>64</text:p>
          </table:table-cell>
          <table:table-cell office:value-type="float" office:value="0.131755" calcext:value-type="float">
            <text:p>0.1317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0476" calcext:value-type="float">
            <text:p>0.130476</text:p>
          </table:table-cell>
          <table:table-cell office:value-type="float" office:value="0.13015" calcext:value-type="float">
            <text:p>0.13015</text:p>
          </table:table-cell>
          <table:table-cell table:number-columns-repeated="7"/>
          <table:table-cell office:value-type="string" calcext:value-type="string">
            <text:p>dynamic</text:p>
          </table:table-cell>
          <table:table-cell office:value-type="float" office:value="1" calcext:value-type="float">
            <text:p>1</text:p>
          </table:table-cell>
          <table:table-cell office:value-type="float" office:value="0.129965" calcext:value-type="float">
            <text:p>0.1299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87632" calcext:value-type="float">
            <text:p>0.087632</text:p>
          </table:table-cell>
          <table:table-cell office:value-type="float" office:value="0.074285" calcext:value-type="float">
            <text:p>0.074285</text:p>
          </table:table-cell>
          <table:table-cell table:number-columns-repeated="7"/>
          <table:table-cell office:value-type="string" calcext:value-type="string">
            <text:p>dynamic</text:p>
          </table:table-cell>
          <table:table-cell office:value-type="float" office:value="16" calcext:value-type="float">
            <text:p>16</text:p>
          </table:table-cell>
          <table:table-cell office:value-type="float" office:value="0.128964" calcext:value-type="float">
            <text:p>0.1289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13807" calcext:value-type="float">
            <text:p>0.113807</text:p>
          </table:table-cell>
          <table:table-cell office:value-type="float" office:value="0.111704" calcext:value-type="float">
            <text:p>0.111704</text:p>
          </table:table-cell>
          <table:table-cell table:number-columns-repeated="7"/>
          <table:table-cell office:value-type="string" calcext:value-type="string">
            <text:p>dynamic</text:p>
          </table:table-cell>
          <table:table-cell office:value-type="float" office:value="64" calcext:value-type="float">
            <text:p>64</text:p>
          </table:table-cell>
          <table:table-cell office:value-type="float" office:value="0.129953" calcext:value-type="float">
            <text:p>0.1299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185" calcext:value-type="float">
            <text:p>0.06185</text:p>
          </table:table-cell>
          <table:table-cell office:value-type="float" office:value="0.055578" calcext:value-type="float">
            <text:p>0.055578</text:p>
          </table:table-cell>
          <table:table-cell table:number-columns-repeated="7"/>
          <table:table-cell office:value-type="string" calcext:value-type="string">
            <text:p>guided</text:p>
          </table:table-cell>
          <table:table-cell office:value-type="float" office:value="1" calcext:value-type="float">
            <text:p>1</text:p>
          </table:table-cell>
          <table:table-cell office:value-type="float" office:value="0.126607" calcext:value-type="float">
            <text:p>0.12660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uided</text:p>
          </table:table-cell>
          <table:table-cell office:value-type="float" office:value="16" calcext:value-type="float">
            <text:p>16</text:p>
          </table:table-cell>
          <table:table-cell office:value-type="float" office:value="0.128757" calcext:value-type="float">
            <text:p>0.1287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guided</text:p>
          </table:table-cell>
          <table:table-cell office:value-type="float" office:value="64" calcext:value-type="float">
            <text:p>64</text:p>
          </table:table-cell>
          <table:table-cell office:value-type="float" office:value="0.132103" calcext:value-type="float">
            <text:p>0.132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auto</text:p>
          </table:table-cell>
          <table:table-cell office:value-type="float" office:value="0" calcext:value-type="float">
            <text:p>0</text:p>
          </table:table-cell>
          <table:table-cell office:value-type="float" office:value="0.132455" calcext:value-type="float">
            <text:p>0.132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02:25:42.873216604</meta:creation-date>
    <dc:date>2026-05-21T02:49:13.052185230</dc:date>
    <meta:editing-duration>PT11M50S</meta:editing-duration>
    <meta:editing-cycles>2</meta:editing-cycles>
    <meta:generator>LibreOffice/25.8.6.2$Linux_X86_64 LibreOffice_project/580$Build-2</meta:generator>
    <meta:document-statistic meta:table-count="3" meta:cell-count="14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svg:x="0.319cm" svg:y="0.18cm" svg:width="15.36cm" svg:height="8.645cm">
          <chart:coordinate-region svg:x="0.953cm" svg:y="0.38cm" svg:width="14.533cm" svg:height="7.79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2.1'.C8:'2.1'.I8" chart:class="chart:scatter">
            <chart:domain table:cell-range-address="'2.1'.C7:'2.1'.I7"/>
            <chart:data-point chart:repeated="7"/>
          </chart:series>
          <chart:series chart:style-name="ch6" chart:values-cell-range-address="'2.1'.C9:'2.1'.I9" chart:class="chart:scatter">
            <chart:data-point chart:repeated="7"/>
          </chart:series>
          <chart:series chart:style-name="ch7" chart:values-cell-range-address="'2.1'.C10:'2.1'.I10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2.1'.C7:'2.1'.I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2.1'.C8:'2.1'.I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2.24527987316527">
                <text:p>2.24527987316527</text:p>
                <draw:g>
                  <svg:desc>'2.1'.C9:'2.1'.I9</svg:desc>
                </draw:g>
              </table:table-cell>
              <table:table-cell office:value-type="float" office:value="2.76162913294887">
                <text:p>2.76162913294887</text:p>
              </table:table-cell>
              <table:table-cell office:value-type="float" office:value="3.78976738752993">
                <text:p>3.78976738752993</text:p>
              </table:table-cell>
              <table:table-cell office:value-type="float" office:value="9.02278573821367">
                <text:p>9.02278573821367</text:p>
              </table:table-cell>
              <table:table-cell office:value-type="float" office:value="15.4400147096998">
                <text:p>15.4400147096998</text:p>
              </table:table-cell>
              <table:table-cell office:value-type="float" office:value="13.368188415976">
                <text:p>13.368188415976</text:p>
              </table:table-cell>
              <table:table-cell office:value-type="float" office:value="18.5503287678353">
                <text:p>18.5503287678353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.88465324989913">
                <text:p>1.88465324989913</text:p>
                <draw:g>
                  <svg:desc>'2.1'.C10:'2.1'.I10</svg:desc>
                </draw:g>
              </table:table-cell>
              <table:table-cell office:value-type="float" office:value="3.41181688364624">
                <text:p>3.41181688364624</text:p>
              </table:table-cell>
              <table:table-cell office:value-type="float" office:value="6.02343936770576">
                <text:p>6.02343936770576</text:p>
              </table:table-cell>
              <table:table-cell office:value-type="float" office:value="4.17822388350962">
                <text:p>4.17822388350962</text:p>
              </table:table-cell>
              <table:table-cell office:value-type="float" office:value="8.63528965789419">
                <text:p>8.63528965789419</text:p>
              </table:table-cell>
              <table:table-cell office:value-type="float" office:value="11.3241075765761">
                <text:p>11.3241075765761</text:p>
              </table:table-cell>
              <table:table-cell office:value-type="float" office:value="12.7778930382665">
                <text:p>12.77789303826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8a303" draw:fill-color="#18a303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369a3" draw:fill-color="#0369a3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svg:x="0.319cm" svg:y="0.18cm" svg:width="15.36cm" svg:height="8.645cm">
          <chart:coordinate-region svg:x="0.953cm" svg:y="0.38cm" svg:width="14.533cm" svg:height="7.79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2.2'.C1:'2.2'.C8" chart:class="chart:scatter">
            <chart:domain table:cell-range-address="'2.2'.B1:'2.2'.B8"/>
            <chart:data-point chart:repeated="8"/>
          </chart:series>
          <chart:series chart:style-name="ch7" chart:values-cell-range-address="'2.2'.E1:'2.2'.E8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.2'.B1:'2.2'.B8</svg:desc>
                </draw:g>
              </table:table-cell>
              <table:table-cell office:value-type="float" office:value="1">
                <text:p>1</text:p>
                <draw:g>
                  <svg:desc>'2.2'.C1:'2.2'.C8</svg:desc>
                </draw:g>
              </table:table-cell>
              <table:table-cell office:value-type="float" office:value="1">
                <text:p>1</text:p>
                <draw:g>
                  <svg:desc>'2.2'.E1:'2.2'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9.21">
                <text:p>19.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